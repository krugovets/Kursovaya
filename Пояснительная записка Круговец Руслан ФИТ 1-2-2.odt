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size="14pt" style:font-size-asian="14pt" style:font-size-complex="14pt"/>
    </style:style>
    <style:style style:name="P2" style:parent-style-name="Обычный" style:family="paragraph">
      <style:paragraph-properties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Обычный" style:family="paragraph">
      <style:paragraph-properties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5" style:parent-style-name="Обычный" style:family="paragraph">
      <style:paragraph-properties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7" style:parent-style-name="Обычный" style:family="paragraph">
      <style:paragraph-properties fo:text-align="center"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" style:parent-style-name="Безинтервала" style:family="paragraph">
      <style:text-properties style:font-name="Times New Roman" fo:font-size="14pt" style:font-size-asian="14pt" style:font-size-complex="14pt"/>
    </style:style>
    <style:style style:name="P20" style:parent-style-name="Безинтервала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style:font-name-complex="Times New Roman"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3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4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5" style:parent-style-name="Обычный" style:family="paragraph">
      <style:paragraph-properties fo:margin-left="4in" fo:text-indent="-4in">
        <style:tab-stops>
          <style:tab-stop style:type="left" style:position="-2.7333in"/>
          <style:tab-stop style:type="center" style:position="-0.752in"/>
        </style:tab-stops>
      </style:paragraph-properties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0pt" style:font-size-asian="10pt" style:font-size-complex="10pt"/>
    </style:style>
    <style:style style:name="P38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39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40" style:parent-style-name="Безинтервала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style:font-name="Times New Roman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6" style:parent-style-name="Основнойшрифтабзаца" style:family="text">
      <style:text-properties style:font-name="Times New Roman"/>
    </style:style>
    <style:style style:name="T4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48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style:font-name-complex="Times New Roman" fo:font-size="14pt" style:font-size-asian="14pt" style:font-size-complex="14pt"/>
    </style:style>
    <style:style style:name="P49" style:parent-style-name="Обычный" style:family="paragraph">
      <style:paragraph-properties style:snap-to-layout-grid="false">
        <style:tab-stops>
          <style:tab-stop style:type="left" style:position="1.5in"/>
          <style:tab-stop style:type="left" style:position="3in"/>
          <style:tab-stop style:type="left" style:position="3.0222in"/>
          <style:tab-stop style:type="left" style:position="5in"/>
          <style:tab-stop style:type="left" style:position="6.875in"/>
        </style:tab-stops>
      </style:paragraph-properties>
      <style:text-properties fo:font-size="14pt" style:font-size-asian="14pt" style:font-size-complex="14pt"/>
    </style:style>
    <style:style style:name="P50" style:parent-style-name="Обычный" style:family="paragraph">
      <style:paragraph-properties style:snap-to-layout-grid="false" fo:text-align="justify">
        <style:tab-stops>
          <style:tab-stop style:type="left" style:position="1.5in"/>
          <style:tab-stop style:type="left" style:position="3in"/>
          <style:tab-stop style:type="left" style:position="3.0222in"/>
          <style:tab-stop style:type="left" style:position="5in"/>
          <style:tab-stop style:type="left" style:position="6.875in"/>
        </style:tab-stops>
      </style:paragraph-properties>
      <style:text-properties fo:font-size="14pt" style:font-size-asian="14pt" style:font-size-complex="14pt"/>
    </style:style>
    <style:style style:name="P51" style:parent-style-name="Обычный" style:family="paragraph">
      <style:paragraph-properties style:snap-to-layout-grid="false" fo:text-align="justify" fo:text-indent="1.8277in">
        <style:tab-stops>
          <style:tab-stop style:type="left" style:position="1.5in"/>
          <style:tab-stop style:type="left" style:position="3in"/>
          <style:tab-stop style:type="left" style:position="3.0222in"/>
          <style:tab-stop style:type="left" style:position="5in"/>
          <style:tab-stop style:type="left" style:position="6.875in"/>
        </style:tab-stops>
      </style:paragraph-properties>
      <style:text-properties fo:font-size="14pt" style:font-size-asian="14pt" style:font-size-complex="14pt"/>
    </style:style>
    <style:style style:name="P52" style:parent-style-name="Обычный" style:family="paragraph">
      <style:paragraph-properties style:snap-to-layout-grid="false" fo:text-align="justify" fo:text-indent="1.8277in">
        <style:tab-stops>
          <style:tab-stop style:type="left" style:position="1.5in"/>
          <style:tab-stop style:type="left" style:position="3in"/>
          <style:tab-stop style:type="left" style:position="3.0222in"/>
          <style:tab-stop style:type="left" style:position="5in"/>
          <style:tab-stop style:type="left" style:position="6.875in"/>
        </style:tab-stops>
      </style:paragraph-properties>
      <style:text-properties fo:font-size="14pt" style:font-size-asian="14pt" style:font-size-complex="14pt"/>
    </style:style>
    <style:style style:name="P53" style:parent-style-name="Обычный" style:family="paragraph">
      <style:paragraph-properties fo:margin-bottom="0.8333in" fo:text-indent="5.6111in">
        <style:tab-stops>
          <style:tab-stop style:type="left" style:position="1.2604in"/>
          <style:tab-stop style:type="center" style:position="3.4944in"/>
        </style:tab-stops>
      </style:paragraph-properties>
      <style:text-properties fo:font-size="10pt" style:font-size-asian="10pt" style:font-size-complex="10pt"/>
    </style:style>
    <style:style style:name="P54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>
        <style:tab-stops>
          <style:tab-stop style:type="left" style:position="1.2666in"/>
          <style:tab-stop style:type="center" style:position="3.2479in"/>
        </style:tab-stops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Обычный" style:family="paragraph">
      <style:paragraph-properties>
        <style:tab-stops>
          <style:tab-stop style:type="left" style:position="1.2666in"/>
          <style:tab-stop style:type="center" style:position="3.2479in"/>
        </style:tab-stops>
      </style:paragraph-properties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77" style:parent-style-name="Обычный" style:master-page-name="MP1" style:family="paragraph">
      <style:paragraph-properties fo:break-before="page" fo:margin-bottom="0.1111in"/>
      <style:text-properties fo:font-weight="bold" style:font-weight-asian="bold" fo:font-size="16pt" style:font-size-asian="16pt"/>
    </style:style>
    <style:style style:name="P78" style:parent-style-name="Обычный" style:family="paragraph">
      <style:paragraph-properties fo:text-align="center"/>
    </style:style>
    <style:style style:name="T79" style:parent-style-name="Основнойшрифтабзаца" style:family="text">
      <style:text-properties fo:font-weight="bold" style:font-weight-asian="bold" fo:font-size="16pt" style:font-size-asian="16pt"/>
    </style:style>
    <style:style style:name="P80" style:parent-style-name="Обычный" style:family="paragraph">
      <style:paragraph-properties fo:text-align="center"/>
      <style:text-properties fo:font-weight="bold" style:font-weight-asian="bold" fo:font-size="14pt" style:font-size-asian="14pt"/>
    </style:style>
    <style:style style:name="P81" style:parent-style-name="Обычный" style:family="paragraph">
      <style:paragraph-properties fo:text-align="center" fo:margin-bottom="0.1666in"/>
    </style:style>
    <style:style style:name="T82" style:parent-style-name="Основнойшрифтабзаца" style:family="text">
      <style:text-properties fo:font-size="14pt" style:font-size-asian="14pt"/>
    </style:style>
    <style:style style:name="T83" style:parent-style-name="Основнойшрифтабзаца" style:family="text">
      <style:text-properties fo:font-weight="bold" style:font-weight-asian="bold" fo:font-size="14pt" style:font-size-asian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Обычный" style:family="paragraph">
      <style:paragraph-properties fo:text-align="justify"/>
    </style:style>
    <style:style style:name="T86" style:parent-style-name="Основнойшрифтабзаца" style:family="text">
      <style:text-properties fo:font-size="14pt" style:font-size-asian="14pt"/>
    </style:style>
    <style:style style:name="T87" style:parent-style-name="Основнойшрифтабзаца" style:family="text">
      <style:text-properties fo:font-size="14pt" style:font-size-asian="14pt" fo:language="uk" fo:country="UA"/>
    </style:style>
    <style:style style:name="T88" style:parent-style-name="Основнойшрифтабзаца" style:family="text">
      <style:text-properties fo:color="#000000" fo:letter-spacing="-0.0006in" fo:font-size="14pt" style:font-size-asian="14pt" style:font-size-complex="14pt"/>
    </style:style>
    <style:style style:name="P89" style:parent-style-name="Обычный" style:family="paragraph">
      <style:paragraph-properties fo:text-align="justify"/>
    </style:style>
    <style:style style:name="T90" style:parent-style-name="Основнойшрифтабзаца" style:family="text">
      <style:text-properties fo:font-size="14pt" style:font-size-asian="14pt"/>
    </style:style>
    <style:style style:name="T91" style:parent-style-name="Основнойшрифтабзаца" style:family="text">
      <style:text-properties fo:font-size="14pt" style:font-size-asian="14pt" fo:language="ru" fo:country="RU"/>
    </style:style>
    <style:style style:name="P92" style:parent-style-name="Обычный" style:family="paragraph">
      <style:paragraph-properties>
        <style:tab-stops>
          <style:tab-stop style:type="left" style:position="-1.2798in"/>
        </style:tab-stops>
      </style:paragraph-properties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8" style:parent-style-name="Обычный" style:family="paragraph">
      <style:paragraph-properties fo:text-align="justify" fo:margin-left="0.3736in" fo:text-indent="-0.3736in">
        <style:tab-stops/>
      </style:paragraph-properties>
    </style:style>
    <style:style style:name="T99" style:parent-style-name="Основнойшрифтабзаца" style:family="text">
      <style:text-properties fo:font-weight="bold" style:font-weight-asian="bold" fo:font-size="14pt" style:font-size-asian="14pt"/>
    </style:style>
    <style:style style:name="T100" style:parent-style-name="Основнойшрифтабзаца" style:family="text">
      <style:text-properties fo:font-weight="bold" style:font-weight-asian="bold" fo:font-size="14pt" style:font-size-asian="14pt"/>
    </style:style>
    <style:style style:name="T101" style:parent-style-name="Основнойшрифтабзаца" style:family="text">
      <style:text-properties fo:font-size="14pt" style:font-size-asian="14pt"/>
    </style:style>
    <style:style style:name="T102" style:parent-style-name="Основнойшрифтабзаца" style:family="text">
      <style:text-properties fo:font-size="14pt" style:font-size-asian="14pt" fo:language="uk" fo:country="UA"/>
    </style:style>
    <style:style style:name="T103" style:parent-style-name="Основнойшрифтабзаца" style:family="text">
      <style:text-properties fo:font-size="14pt" style:font-size-asian="14pt"/>
    </style:style>
    <style:style style:name="T104" style:parent-style-name="Основнойшрифтабзаца" style:family="text">
      <style:text-properties fo:font-size="14pt" style:font-size-asian="14pt" fo:language="uk" fo:country="UA"/>
    </style:style>
    <style:style style:name="T105" style:parent-style-name="Основнойшрифтабзаца" style:family="text">
      <style:text-properties fo:font-size="14pt" style:font-size-asian="14pt"/>
    </style:style>
    <style:style style:name="P106" style:parent-style-name="Обычный" style:family="paragraph">
      <style:paragraph-properties fo:text-align="justify"/>
    </style:style>
    <style:style style:name="T107" style:parent-style-name="Основнойшрифтабзаца" style:family="text">
      <style:text-properties fo:font-weight="bold" style:font-weight-asian="bold" fo:font-size="14pt" style:font-size-asian="14pt"/>
    </style:style>
    <style:style style:name="T1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9" style:parent-style-name="Обычный" style:family="paragraph">
      <style:paragraph-properties style:text-autospace="none" fo:text-align="justify" fo:text-indent="0.2361in"/>
    </style:style>
    <style:style style:name="T110" style:parent-style-name="Основнойшрифтабзаца" style:family="text">
      <style:text-properties fo:color="#000000" fo:font-size="14pt" style:font-size-asian="14pt" style:font-size-complex="10pt"/>
    </style:style>
    <style:style style:name="T111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12" style:parent-style-name="Основнойшрифтабзаца" style:family="text">
      <style:text-properties fo:color="#000000" fo:font-size="14pt" style:font-size-asian="14pt" style:font-size-complex="10pt"/>
    </style:style>
    <style:style style:name="T113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14" style:parent-style-name="Основнойшрифтабзаца" style:family="text">
      <style:text-properties fo:color="#000000" fo:font-size="14pt" style:font-size-asian="14pt" style:font-size-complex="10pt" fo:language="ru" fo:country="RU"/>
    </style:style>
    <style:style style:name="T115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16" style:parent-style-name="Основнойшрифтабзаца" style:family="text">
      <style:text-properties fo:color="#000000" fo:font-size="14pt" style:font-size-asian="14pt" style:font-size-complex="10pt"/>
    </style:style>
    <style:style style:name="T117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18" style:parent-style-name="Основнойшрифтабзаца" style:family="text">
      <style:text-properties fo:color="#000000" fo:font-size="14pt" style:font-size-asian="14pt" style:font-size-complex="10pt"/>
    </style:style>
    <style:style style:name="P119" style:parent-style-name="Обычный" style:family="paragraph">
      <style:paragraph-properties style:text-autospace="none" fo:text-align="justify" fo:text-indent="0.2361in"/>
      <style:text-properties fo:color="#000000" fo:font-size="14pt" style:font-size-asian="14pt" style:font-size-complex="10pt"/>
    </style:style>
    <style:style style:name="P120" style:parent-style-name="Обычный" style:family="paragraph">
      <style:paragraph-properties style:text-autospace="none" fo:text-align="justify" fo:text-indent="0.2361in"/>
      <style:text-properties fo:color="#000000" fo:font-size="14pt" style:font-size-asian="14pt" style:font-size-complex="10pt"/>
    </style:style>
    <style:style style:name="P121" style:parent-style-name="Обычный" style:family="paragraph">
      <style:paragraph-properties style:text-autospace="none" fo:text-align="justify" fo:text-indent="0.2361in"/>
    </style:style>
    <style:style style:name="T122" style:parent-style-name="Основнойшрифтабзаца" style:family="text">
      <style:text-properties fo:color="#000000" fo:font-size="14pt" style:font-size-asian="14pt" style:font-size-complex="10pt"/>
    </style:style>
    <style:style style:name="T123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24" style:parent-style-name="Основнойшрифтабзаца" style:family="text">
      <style:text-properties fo:color="#000000" fo:font-size="14pt" style:font-size-asian="14pt" style:font-size-complex="10pt"/>
    </style:style>
    <style:style style:name="P125" style:parent-style-name="Обычный" style:family="paragraph">
      <style:paragraph-properties style:text-autospace="none" fo:text-align="justify" fo:text-indent="0.2361in"/>
      <style:text-properties fo:color="#000000" fo:font-size="14pt" style:font-size-asian="14pt" style:font-size-complex="10pt"/>
    </style:style>
    <style:style style:name="P126" style:parent-style-name="Обычный" style:family="paragraph">
      <style:paragraph-properties style:text-autospace="none" fo:text-align="justify" fo:text-indent="0.5513in"/>
      <style:text-properties fo:color="#000000" fo:font-size="14pt" style:font-size-asian="14pt" style:font-size-complex="10pt"/>
    </style:style>
    <style:style style:name="P127" style:parent-style-name="Обычный" style:family="paragraph">
      <style:paragraph-properties style:text-autospace="none" fo:text-align="justify" fo:text-indent="0.5513in"/>
      <style:text-properties fo:color="#000000" fo:font-size="14pt" style:font-size-asian="14pt" style:font-size-complex="10pt"/>
    </style:style>
    <style:style style:name="P128" style:parent-style-name="Обычный" style:family="paragraph">
      <style:paragraph-properties style:text-autospace="none" fo:text-align="justify" fo:text-indent="0.5513in"/>
      <style:text-properties fo:color="#000000" fo:font-size="14pt" style:font-size-asian="14pt" style:font-size-complex="10pt"/>
    </style:style>
    <style:style style:name="P129" style:parent-style-name="Обычный" style:family="paragraph">
      <style:paragraph-properties style:text-autospace="none" fo:text-align="justify" fo:text-indent="0.5513in"/>
    </style:style>
    <style:style style:name="T130" style:parent-style-name="Основнойшрифтабзаца" style:family="text">
      <style:text-properties fo:color="#000000" fo:font-size="14pt" style:font-size-asian="14pt" style:font-size-complex="10pt"/>
    </style:style>
    <style:style style:name="T131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32" style:parent-style-name="Основнойшрифтабзаца" style:family="text">
      <style:text-properties fo:color="#000000" fo:font-size="14pt" style:font-size-asian="14pt" style:font-size-complex="10pt"/>
    </style:style>
    <style:style style:name="T133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34" style:parent-style-name="Основнойшрифтабзаца" style:family="text">
      <style:text-properties fo:color="#000000" fo:font-size="14pt" style:font-size-asian="14pt" style:font-size-complex="10pt"/>
    </style:style>
    <style:style style:name="P135" style:parent-style-name="Обычный" style:family="paragraph">
      <style:paragraph-properties style:text-autospace="none" fo:text-align="justify" fo:text-indent="0.2361in"/>
      <style:text-properties fo:color="#000000" fo:font-size="14pt" style:font-size-asian="14pt" style:font-size-complex="10pt"/>
    </style:style>
    <style:style style:name="P136" style:parent-style-name="Обычный" style:family="paragraph">
      <style:paragraph-properties style:text-autospace="none" fo:text-align="justify" fo:text-indent="0.2361in"/>
    </style:style>
    <style:style style:name="T137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38" style:parent-style-name="Основнойшрифтабзаца" style:family="text">
      <style:text-properties fo:color="#000000" fo:font-size="14pt" style:font-size-asian="14pt" style:font-size-complex="10pt"/>
    </style:style>
    <style:style style:name="T139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40" style:parent-style-name="Основнойшрифтабзаца" style:family="text">
      <style:text-properties fo:color="#000000" fo:font-size="14pt" style:font-size-asian="14pt" style:font-size-complex="10pt"/>
    </style:style>
    <style:style style:name="T141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T142" style:parent-style-name="Основнойшрифтабзаца" style:family="text">
      <style:text-properties fo:color="#000000" fo:font-size="14pt" style:font-size-asian="14pt" style:font-size-complex="10pt"/>
    </style:style>
    <style:style style:name="T143" style:parent-style-name="Основнойшрифтабзаца" style:family="text">
      <style:text-properties fo:color="#000000" fo:font-size="14pt" style:font-size-asian="14pt" style:font-size-complex="10pt" fo:language="en" fo:country="US"/>
    </style:style>
    <style:style style:name="P144" style:parent-style-name="Обычный" style:family="paragraph">
      <style:paragraph-properties style:text-autospace="none" fo:text-align="justify" fo:text-indent="0.2361in"/>
    </style:style>
    <style:style style:name="T145" style:parent-style-name="Основнойшрифтабзаца" style:family="text">
      <style:text-properties fo:color="#000000" fo:font-size="14pt" style:font-size-asian="14pt" style:font-size-complex="10pt"/>
    </style:style>
    <style:style style:name="T146" style:parent-style-name="Основнойшрифтабзаца" style:family="text">
      <style:text-properties fo:color="#000000" fo:font-size="14pt" style:font-size-asian="14pt" style:font-size-complex="10pt"/>
    </style:style>
    <style:style style:name="P147" style:parent-style-name="Обычный" style:family="paragraph">
      <style:paragraph-properties fo:text-align="justify"/>
      <style:text-properties fo:font-weight="bold" style:font-weight-asian="bold" fo:font-size="14pt" style:font-size-asian="14pt"/>
    </style:style>
    <style:style style:name="P148" style:parent-style-name="Обычный" style:family="paragraph">
      <style:paragraph-properties fo:text-align="justify" fo:text-indent="0.1944in"/>
      <style:text-properties fo:font-size="14pt" style:font-size-asian="14pt"/>
    </style:style>
    <style:style style:name="P149" style:parent-style-name="Обычный" style:family="paragraph">
      <style:paragraph-properties fo:text-align="justify" fo:text-indent="0.1944in"/>
    </style:style>
    <style:style style:name="T150" style:parent-style-name="Основнойшрифтабзаца" style:family="text">
      <style:text-properties fo:font-size="14pt" style:font-size-asian="14pt"/>
    </style:style>
    <style:style style:name="P151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2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3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4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5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6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7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8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59" style:parent-style-name="Обычный" style:family="paragraph">
      <style:paragraph-properties fo:text-align="justify"/>
    </style:style>
    <style:style style:name="T160" style:parent-style-name="Основнойшрифтабзаца" style:family="text">
      <style:text-properties fo:font-weight="bold" style:font-weight-asian="bold" fo:font-size="14pt" style:font-size-asian="14pt"/>
    </style:style>
    <style:style style:name="T16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62" style:parent-style-name="Основнойшрифтабзаца" style:family="text">
      <style:text-properties fo:font-weight="bold" style:font-weight-asian="bold" fo:font-size="14pt" style:font-size-asian="14pt"/>
    </style:style>
    <style:style style:name="P163" style:parent-style-name="Обычный" style:family="paragraph">
      <style:paragraph-properties fo:text-align="justify" fo:text-indent="0.1972in"/>
      <style:text-properties fo:font-size="14pt" style:font-size-asian="14pt" style:font-size-complex="14pt"/>
    </style:style>
    <style:style style:name="P164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65" style:parent-style-name="Обычный" style:family="paragraph">
      <style:paragraph-properties fo:text-indent="0.1972in"/>
      <style:text-properties fo:font-size="14pt" style:font-size-asian="14pt" style:font-size-complex="14pt"/>
    </style:style>
    <style:style style:name="P166" style:parent-style-name="Обычный" style:master-page-name="MP2" style:family="paragraph">
      <style:paragraph-properties fo:break-before="page" fo:text-indent="0.1972in"/>
      <style:text-properties fo:font-size="14pt" style:font-size-asian="14pt" style:font-size-complex="14pt"/>
    </style:style>
    <style:style style:name="TableColumn168" style:family="table-column">
      <style:table-column-properties style:column-width="0.5909in"/>
    </style:style>
    <style:style style:name="TableColumn169" style:family="table-column">
      <style:table-column-properties style:column-width="4.6486in"/>
    </style:style>
    <style:style style:name="TableColumn170" style:family="table-column">
      <style:table-column-properties style:column-width="1.818in"/>
    </style:style>
    <style:style style:name="Table167" style:family="table">
      <style:table-properties style:width="7.0576in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 fo:line-height="115%"/>
      <style:text-properties fo:font-size="13pt" style:font-size-asian="13pt" style:font-size-complex="13pt" style:language-asian="en" style:country-asian="US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Обычный" style:family="paragraph">
      <style:paragraph-properties fo:text-align="center" fo:line-height="115%"/>
      <style:text-properties fo:font-size="13pt" style:font-size-asian="13pt" style:font-size-complex="13pt" style:language-asian="en" style:country-asian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line-height="115%"/>
      <style:text-properties fo:font-size="13pt" style:font-size-asian="13pt" style:font-size-complex="13pt" style:language-asian="en" style:country-asian="US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line-height="115%"/>
      <style:text-properties fo:font-size="13pt" style:font-size-asian="13pt" style:font-size-complex="13pt" style:language-asian="en" style:country-asian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line-height="115%"/>
    </style:style>
    <style:style style:name="T185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186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187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line-height="115%"/>
    </style:style>
    <style:style style:name="T191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text-align="center" fo:line-height="115%"/>
    </style:style>
    <style:style style:name="T196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197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text-align="center" fo:line-height="115%"/>
    </style:style>
    <style:style style:name="T201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text-align="center" fo:line-height="115%"/>
    </style:style>
    <style:style style:name="T206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0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08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09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10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fo:line-height="115%"/>
    </style:style>
    <style:style style:name="T214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line-height="115%"/>
    </style:style>
    <style:style style:name="T21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18" style:parent-style-name="Основнойшрифтабзаца" style:family="text">
      <style:text-properties fo:font-size="13pt" style:font-size-asian="13pt" style:font-size-complex="13pt" fo:language="en" fo:country="US" style:language-asian="en" style:country-asian="US"/>
    </style:style>
    <style:style style:name="T219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20" style:parent-style-name="Основнойшрифтабзаца" style:family="text">
      <style:text-properties fo:font-size="13pt" style:font-size-asian="13pt" style:font-size-complex="13pt" fo:language="en" fo:country="US" style:language-asian="en" style:country-asian="US"/>
    </style:style>
    <style:style style:name="T221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22" style:parent-style-name="Основнойшрифтабзаца" style:family="text">
      <style:text-properties fo:font-size="13pt" style:font-size-asian="13pt" style:font-size-complex="13pt" fo:language="en" fo:country="US" style:language-asian="en" style:country-asian="US"/>
    </style:style>
    <style:style style:name="T223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text-align="center" fo:line-height="115%"/>
    </style:style>
    <style:style style:name="T226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2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28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text-align="center" fo:line-height="115%"/>
    </style:style>
    <style:style style:name="T232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text-align="center" fo:line-height="115%"/>
    </style:style>
    <style:style style:name="T23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38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39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40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text-align="center" fo:line-height="115%"/>
    </style:style>
    <style:style style:name="T244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text-align="center" fo:line-height="115%"/>
    </style:style>
    <style:style style:name="T249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50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51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52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text-align="center" fo:line-height="115%"/>
    </style:style>
    <style:style style:name="T256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text-align="center" fo:line-height="115%"/>
    </style:style>
    <style:style style:name="T261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62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63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fo:line-height="115%"/>
    </style:style>
    <style:style style:name="T26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line-height="115%"/>
      <style:text-properties fo:font-size="13pt" style:font-size-asian="13pt" style:font-size-complex="13pt" style:language-asian="en" style:country-asian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text-align="center" fo:line-height="115%"/>
    </style:style>
    <style:style style:name="T272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73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74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center" fo:line-height="115%"/>
    </style:style>
    <style:style style:name="T278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line-height="115%"/>
    </style:style>
    <style:style style:name="T281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82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83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84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text-align="center" fo:line-height="115%"/>
    </style:style>
    <style:style style:name="T287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88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289" style:parent-style-name="Основнойшрифтабзаца" style:family="text">
      <style:text-properties fo:font-size="13pt" style:font-size-asian="13pt" style:font-size-complex="13pt" style:language-asian="en" style:country-asian="US"/>
    </style:style>
    <style:style style:name="T290" style:parent-style-name="Основнойшрифтабзаца" style:family="text">
      <style:text-properties fo:font-size="13pt" style:font-size-asian="13pt" style:font-size-complex="13pt" fo:language="uk" fo:country="UA" style:language-asian="en" style:country-asian="U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text-align="center" fo:line-height="115%"/>
      <style:text-properties fo:font-size="13pt" style:font-size-asian="13pt" style:font-size-complex="13pt" fo:language="uk" fo:country="UA" style:language-asian="en" style:country-asian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line-height="115%"/>
      <style:text-properties fo:font-size="13pt" style:font-size-asian="13pt" style:font-size-complex="13pt" fo:language="uk" fo:country="UA" style:language-asian="en" style:country-asian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center" fo:line-height="115%"/>
      <style:text-properties fo:font-size="13pt" style:font-size-asian="13pt" style:font-size-complex="13pt" fo:language="uk" fo:country="UA" style:language-asian="en" style:country-asian="US"/>
    </style:style>
    <style:style style:name="P298" style:parent-style-name="Обычный" style:family="paragraph">
      <style:paragraph-properties fo:keep-with-next="always" fo:keep-together="always" fo:text-align="center" fo:margin-top="0.1388in" fo:margin-bottom="0.0833in"/>
    </style:style>
    <style:style style:name="T299" style:parent-style-name="Основнойшрифтабзаца" style:family="text">
      <style:text-properties fo:font-weight="bold" style:font-weight-asian="bold" style:font-weight-complex="bold" style:font-style-complex="italic" fo:font-size="14pt" style:font-size-asian="14pt" style:font-size-complex="14pt"/>
    </style:style>
    <style:style style:name="P300" style:parent-style-name="Обычный" style:family="paragraph">
      <style:paragraph-properties fo:text-align="justify"/>
      <style:text-properties fo:font-size="14pt" style:font-size-asian="14pt" style:font-size-complex="14pt" fo:language="ru" fo:country="RU" style:language-asian="ru" style:country-asian="RU"/>
    </style:style>
    <style:style style:name="P301" style:parent-style-name="Обычный" style:family="paragraph">
      <style:paragraph-properties fo:text-align="justify"/>
    </style:style>
    <style:style style:name="T302" style:parent-style-name="Основнойшрифтабзаца" style:family="text">
      <style:text-properties fo:font-weight="bold" style:font-weight-asian="bold" fo:font-size="14pt" style:font-size-asian="14pt"/>
    </style:style>
    <style:style style:name="T303" style:parent-style-name="Основнойшрифтабзаца" style:family="text">
      <style:text-properties fo:font-size="14pt" style:font-size-asian="14pt"/>
    </style:style>
    <style:style style:name="T304" style:parent-style-name="Основнойшрифтабзаца" style:family="text">
      <style:text-properties fo:font-size="14pt" style:font-size-asian="14pt" fo:language="uk" fo:country="UA"/>
    </style:style>
    <style:style style:name="T305" style:parent-style-name="Основнойшрифтабзаца" style:family="text">
      <style:text-properties fo:font-size="14pt" style:font-size-asian="14pt"/>
    </style:style>
    <style:style style:name="T306" style:parent-style-name="Основнойшрифтабзаца" style:family="text">
      <style:text-properties fo:font-size="14pt" style:font-size-asian="14pt" fo:language="uk" fo:country="UA"/>
    </style:style>
    <style:style style:name="T307" style:parent-style-name="Основнойшрифтабзаца" style:family="text">
      <style:text-properties fo:font-size="14pt" style:font-size-asian="14pt"/>
    </style:style>
    <style:style style:name="P308" style:parent-style-name="Обычный" style:family="paragraph">
      <style:paragraph-properties fo:text-align="justify" fo:margin-top="0.1666in"/>
      <style:text-properties fo:font-size="14pt" style:font-size-asian="14pt"/>
    </style:style>
    <style:style style:name="P309" style:parent-style-name="Обычный" style:family="paragraph">
      <style:paragraph-properties fo:text-align="justify" fo:margin-left="1.4777in" fo:text-indent="1.0819in">
        <style:tab-stops/>
      </style:paragraph-properties>
      <style:text-properties style:text-position="super 64.2%" fo:font-size="14pt" style:font-size-asian="14pt"/>
    </style:style>
    <style:style style:name="P310" style:parent-style-name="Обычный" style:family="paragraph">
      <style:paragraph-properties fo:text-align="justify" fo:margin-top="0.0833in"/>
      <style:text-properties fo:font-size="14pt" style:font-size-asian="14pt"/>
    </style:style>
    <style:style style:name="P311" style:parent-style-name="Обычный" style:family="paragraph">
      <style:paragraph-properties fo:text-align="justify" fo:margin-left="2.6548in" fo:text-indent="0.2951in">
        <style:tab-stops/>
      </style:paragraph-properties>
    </style:style>
    <style:style style:name="T312" style:parent-style-name="Основнойшрифтабзаца" style:family="text">
      <style:text-properties style:text-position="super 64.2%" fo:font-size="14pt" style:font-size-asian="14pt"/>
    </style:style>
    <style:style style:name="P313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14" style:parent-style-name="Обычный" style:family="paragraph">
      <style:paragraph-properties fo:text-align="center"/>
    </style:style>
    <style:style style:name="T3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16" style:parent-style-name="Обычный" style:family="paragraph">
      <style:text-properties fo:font-size="14pt" style:font-size-asian="14pt" style:font-size-complex="14pt"/>
    </style:style>
    <style:style style:name="P317" style:parent-style-name="Обычный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3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2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T3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T3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0" style:parent-style-name="Обычный" style:family="paragraph">
      <style:paragraph-properties fo:margin-bottom="0.1666in">
        <style:tab-stops>
          <style:tab-stop style:type="right" style:leader-style="dotted" style:leader-text="." style:position="6.6937in"/>
        </style:tab-stops>
      </style:paragraph-properties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/>
    </style:style>
    <style:style style:name="T3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T367" style:parent-style-name="Основнойшрифтабзаца" style:family="text">
      <style:text-properties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9" style:parent-style-name="Основнойшрифтабзаца" style:family="text">
      <style:text-properties fo:font-size="14pt" style:font-size-asian="14pt" style:font-size-complex="14pt"/>
    </style:style>
    <style:style style:name="T3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T3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S3" style:family="section">
      <style:section-properties fo:margin-left="0in" fo:margin-right="0in" style:writing-mode="lr-tb"/>
    </style:style>
    <style:style style:name="P423" style:parent-style-name="Обычный" style:family="paragraph">
      <style:text-properties fo:font-weight="bold" style:font-weight-asian="bold" style:font-weight-complex="bold" fo:font-size="14pt" style:font-size-asian="14pt" style:font-size-complex="14pt" fo:language="ru" fo:country="RU" fo:hyphenate="true"/>
    </style:style>
    <style:style style:name="P424" style:parent-style-name="Заголовок1" style:master-page-name="MP4" style:family="paragraph">
      <style:paragraph-properties fo:break-before="page" fo:text-align="center" fo:margin-top="0.0173in"/>
    </style:style>
    <style:style style:name="P427" style:parent-style-name="Обычный" style:family="paragraph">
      <style:text-properties fo:font-size="14pt" style:font-size-asian="14pt" style:font-size-complex="14pt"/>
    </style:style>
    <style:style style:name="P428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29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30" style:parent-style-name="Обычный" style:family="paragraph">
      <style:text-properties fo:font-size="14pt" style:font-size-asian="14pt" style:font-size-complex="14pt"/>
    </style:style>
    <style:style style:name="P431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32" style:parent-style-name="Обычный" style:family="paragraph">
      <style:text-properties fo:font-size="14pt" style:font-size-asian="14pt" style:font-size-complex="14pt"/>
    </style:style>
    <style:style style:name="P433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34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35" style:parent-style-name="Обычный" style:family="paragraph">
      <style:text-properties fo:font-size="14pt" style:font-size-asian="14pt" style:font-size-complex="14pt"/>
    </style:style>
    <style:style style:name="P436" style:parent-style-name="Обычный" style:family="paragraph">
      <style:text-properties fo:font-size="14pt" style:font-size-asian="14pt" style:font-size-complex="14pt"/>
    </style:style>
    <style:style style:name="P437" style:parent-style-name="Обычный" style:family="paragraph">
      <style:text-properties fo:font-size="14pt" style:font-size-asian="14pt" style:font-size-complex="14pt"/>
    </style:style>
    <style:style style:name="P438" style:parent-style-name="Обычный" style:family="paragraph">
      <style:text-properties fo:font-size="14pt" style:font-size-asian="14pt" style:font-size-complex="14pt"/>
    </style:style>
    <style:style style:name="P439" style:parent-style-name="Обычный" style:family="paragraph">
      <style:text-properties fo:font-size="14pt" style:font-size-asian="14pt" style:font-size-complex="14pt"/>
    </style:style>
    <style:style style:name="P440" style:parent-style-name="Обычный" style:family="paragraph">
      <style:text-properties fo:font-size="14pt" style:font-size-asian="14pt" style:font-size-complex="14pt"/>
    </style:style>
    <style:style style:name="P441" style:parent-style-name="Обычный" style:family="paragraph">
      <style:text-properties fo:font-size="14pt" style:font-size-asian="14pt" style:font-size-complex="14pt"/>
    </style:style>
    <style:style style:name="P442" style:parent-style-name="Обычный" style:family="paragraph">
      <style:text-properties fo:font-size="14pt" style:font-size-asian="14pt" style:font-size-complex="14pt"/>
    </style:style>
    <style:style style:name="P443" style:parent-style-name="Обычный" style:family="paragraph">
      <style:text-properties fo:font-size="14pt" style:font-size-asian="14pt" style:font-size-complex="14pt"/>
    </style:style>
    <style:style style:name="P444" style:parent-style-name="Обычный" style:family="paragraph">
      <style:text-properties fo:font-size="14pt" style:font-size-asian="14pt" style:font-size-complex="14pt"/>
    </style:style>
    <style:style style:name="P445" style:parent-style-name="Обычный" style:family="paragraph">
      <style:paragraph-properties fo:break-before="page"/>
    </style:style>
    <style:style style:name="P446" style:parent-style-name="Обычный" style:family="paragraph">
      <style:text-properties fo:font-size="14pt" style:font-size-asian="14pt" style:font-size-complex="14pt"/>
    </style:style>
    <style:style style:name="P447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48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49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0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1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2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3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4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55" style:parent-style-name="Обычный" style:family="paragraph">
      <style:paragraph-properties fo:break-before="page"/>
    </style:style>
    <style:style style:name="P456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5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58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59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1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66" style:parent-style-name="Обычный" style:family="paragraph">
      <style:paragraph-properties fo:text-align="center" fo:margin-top="0.1944in" fo:margin-bottom="0.1944in" fo:text-indent="0.4923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P469" style:parent-style-name="Обычный" style:family="paragraph">
      <style:text-properties fo:language="ru" fo:country="RU" style:language-asian="ru" style:country-asian="RU" style:language-complex="ar" style:country-complex="SA"/>
    </style:style>
    <style:style style:name="P47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7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79" style:parent-style-name="Обычный" style:family="paragraph">
      <style:paragraph-properties fo:text-align="center" fo:margin-top="0.1944in" fo:margin-bottom="0.1944in" fo:text-indent="0.4923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480" style:parent-style-name="Обычный" style:family="paragraph">
      <style:text-properties fo:font-size="14pt" style:font-size-asian="14pt" style:font-size-complex="14pt"/>
    </style:style>
    <style:style style:name="P481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2" style:parent-style-name="Обычный" style:family="paragraph">
      <style:text-properties fo:font-size="14pt" style:font-size-asian="14pt" style:font-size-complex="14pt"/>
    </style:style>
    <style:style style:name="P483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4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5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6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7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8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89" style:parent-style-name="Обычный" style:family="paragraph">
      <style:text-properties fo:font-size="14pt" style:font-size-asian="14pt" style:font-size-complex="14pt"/>
    </style:style>
    <style:style style:name="P490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1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2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3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4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5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6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7" style:parent-style-name="Обычный" style:family="paragraph">
      <style:paragraph-properties fo:text-indent="0.4902in"/>
      <style:text-properties fo:font-size="14pt" style:font-size-asian="14pt" style:font-size-complex="14pt"/>
    </style:style>
    <style:style style:name="P498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499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0" style:parent-style-name="Обычный" style:family="paragraph">
      <style:paragraph-properties fo:text-indent="0.4923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1" style:parent-style-name="Обычный" style:family="paragraph">
      <style:paragraph-properties fo:text-indent="0.4923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2" style:parent-style-name="Обычный" style:family="paragraph">
      <style:paragraph-properties fo:text-indent="0.4923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3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4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T5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06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09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510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1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13" style:parent-style-name="Обычный" style:family="paragraph">
      <style:paragraph-properties fo:text-indent="0.4902in"/>
    </style:style>
    <style:style style:name="T51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0" style:parent-style-name="Обычный" style:family="paragraph">
      <style:paragraph-properties fo:text-align="center"/>
    </style:style>
    <style:style style:name="T5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22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3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5" style:parent-style-name="Обычный" style:family="paragraph">
      <style:paragraph-properties fo:text-align="center"/>
    </style:style>
    <style:style style:name="T5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27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2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0" style:parent-style-name="Обычный" style:family="paragraph">
      <style:paragraph-properties fo:text-align="center"/>
    </style:style>
    <style:style style:name="T531" style:parent-style-name="Основнойшрифтабзаца" style:family="text">
      <style:text-properties fo:font-size="14pt" style:font-size-asian="14pt" style:font-size-complex="14pt"/>
    </style:style>
    <style:style style:name="P532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3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37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3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1" style:parent-style-name="Обычный" style:family="paragraph">
      <style:paragraph-properties fo:text-align="center"/>
    </style:style>
    <style:style style:name="T5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43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7" style:parent-style-name="Заголовок2" style:family="paragraph">
      <style:paragraph-properties fo:text-indent="0.4902in"/>
    </style:style>
    <style:style style:name="P548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49" style:parent-style-name="Обычный" style:family="paragraph">
      <style:paragraph-properties fo:text-align="justify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50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551" style:parent-style-name="Заголовок1" style:family="paragraph">
      <style:text-properties fo:language="ru" fo:country="RU" style:language-asian="ru" style:country-asian="RU" style:language-complex="ar" style:country-complex="SA"/>
    </style:style>
    <style:style style:name="P55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5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5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55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557" style:family="table-column">
      <style:table-column-properties style:column-width="6.5041in"/>
    </style:style>
    <style:style style:name="Table556" style:family="table">
      <style:table-properties style:width="6.5041in" fo:margin-left="0.2173in" table:align="left"/>
    </style:style>
    <style:style style:name="TableRow558" style:family="table-row">
      <style:table-row-properties style:min-row-height="4.0402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66" style:parent-style-name="Обычный" style:family="paragraph">
      <style:paragraph-properties fo:text-indent="0.4902in"/>
    </style:style>
    <style:style style:name="T56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77" style:parent-style-name="Обычный" style:family="paragraph">
      <style:paragraph-properties fo:text-indent="0.4902in"/>
    </style:style>
    <style:style style:name="T57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8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8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9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9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593" style:family="table-column">
      <style:table-column-properties style:column-width="6.6562in"/>
    </style:style>
    <style:style style:name="Table592" style:family="table">
      <style:table-properties style:width="6.6562in" fo:margin-left="0.025in" table:align="left"/>
    </style:style>
    <style:style style:name="TableRow594" style:family="table-row">
      <style:table-row-properties style:min-row-height="4.2958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97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98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599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00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01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02" style:parent-style-name="Обычный" style:family="paragraph">
      <style:paragraph-properties fo:margin-left="-0.0284in" fo:text-indent="0.4902in">
        <style:tab-stops/>
      </style:paragraph-properties>
    </style:style>
    <style:style style:name="T60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08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09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10" style:parent-style-name="Обычный" style:family="paragraph">
      <style:paragraph-properties fo:margin-left="-0.0284in" fo:text-indent="0.4902in">
        <style:tab-stops/>
      </style:paragraph-properties>
    </style:style>
    <style:style style:name="T61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17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18" style:parent-style-name="Обычный" style:family="paragraph">
      <style:paragraph-properties fo:margin-left="-0.0284in" fo:text-indent="0.4902in">
        <style:tab-stops/>
      </style:paragraph-properties>
    </style:style>
    <style:style style:name="T61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22" style:parent-style-name="Обычный" style:family="paragraph">
      <style:paragraph-properties fo:margin-left="-0.0284in" fo:text-indent="0.4902in">
        <style:tab-stops/>
      </style:paragraph-properties>
    </style:style>
    <style:style style:name="T62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26" style:parent-style-name="Обычный" style:family="paragraph">
      <style:paragraph-properties fo:margin-left="-0.0284in" fo:text-indent="0.4902in">
        <style:tab-stops/>
      </style:paragraph-properties>
    </style:style>
    <style:style style:name="T62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30" style:parent-style-name="Обычный" style:family="paragraph">
      <style:paragraph-properties fo:margin-left="-0.0284in" fo:text-indent="0.4902in">
        <style:tab-stops/>
      </style:paragraph-properties>
    </style:style>
    <style:style style:name="T63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34" style:parent-style-name="Обычный" style:family="paragraph">
      <style:paragraph-properties fo:margin-left="-0.0284in" fo:text-indent="0.4902in">
        <style:tab-stops/>
      </style:paragraph-properties>
    </style:style>
    <style:style style:name="T63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37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38" style:parent-style-name="Обычный" style:family="paragraph">
      <style:paragraph-properties fo:margin-left="-0.028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39" style:parent-style-name="Обычный" style:family="paragraph">
      <style:paragraph-properties fo:margin-left="-0.0284in" fo:text-indent="0.4902in">
        <style:tab-stops/>
      </style:paragraph-properties>
    </style:style>
    <style:style style:name="T64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41" style:parent-style-name="Обычный" style:family="paragraph">
      <style:paragraph-properties fo:text-align="center"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4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4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4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646" style:family="table-column">
      <style:table-column-properties style:column-width="6.4479in"/>
    </style:style>
    <style:style style:name="Table645" style:family="table">
      <style:table-properties style:width="6.4479in" fo:margin-left="-0.2152in" table:align="left"/>
    </style:style>
    <style:style style:name="TableRow647" style:family="table-row">
      <style:table-row-properties style:min-row-height="2.4284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0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1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2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3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4" style:parent-style-name="Обычный" style:family="paragraph">
      <style:paragraph-properties fo:margin-left="0.2118in" fo:text-indent="0.4902in">
        <style:tab-stops/>
      </style:paragraph-properties>
    </style:style>
    <style:style style:name="T65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58" style:parent-style-name="Обычный" style:family="paragraph">
      <style:paragraph-properties fo:margin-left="0.2118in" fo:text-indent="0.4902in">
        <style:tab-stops/>
      </style:paragraph-properties>
    </style:style>
    <style:style style:name="T65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64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6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66" style:parent-style-name="Обычный" style:family="paragraph">
      <style:paragraph-properties fo:text-indent="0.4902in"/>
    </style:style>
    <style:style style:name="T66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71" style:parent-style-name="Обычный" style:family="paragraph">
      <style:paragraph-properties fo:text-indent="0.4902in"/>
    </style:style>
    <style:style style:name="T67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7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76" style:parent-style-name="Обычный" style:family="paragraph">
      <style:paragraph-properties fo:margin-left="0.2118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7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7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7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680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682" style:family="table-column">
      <style:table-column-properties style:column-width="6.6854in"/>
    </style:style>
    <style:style style:name="Table681" style:family="table">
      <style:table-properties style:width="6.6854in" fo:margin-left="0in" table:align="left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86" style:parent-style-name="Обычный" style:family="paragraph">
      <style:paragraph-properties fo:margin-left="0.435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87" style:parent-style-name="Обычный" style:family="paragraph">
      <style:paragraph-properties fo:margin-left="0.435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88" style:parent-style-name="Обычный" style:family="paragraph">
      <style:paragraph-properties fo:margin-left="0.4354in" fo:text-indent="0.4902in">
        <style:tab-stops/>
      </style:paragraph-properties>
    </style:style>
    <style:style style:name="T68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696" style:parent-style-name="Обычный" style:family="paragraph">
      <style:paragraph-properties fo:margin-left="0.4354in" fo:text-indent="0.4902in">
        <style:tab-stops/>
      </style:paragraph-properties>
    </style:style>
    <style:style style:name="T69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02" style:parent-style-name="Обычный" style:family="paragraph">
      <style:paragraph-properties fo:margin-left="0.435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03" style:parent-style-name="Обычный" style:family="paragraph">
      <style:paragraph-properties fo:margin-left="0.435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04" style:parent-style-name="Обычный" style:family="paragraph">
      <style:paragraph-properties fo:margin-left="0.4354in" fo:text-indent="0.4902in">
        <style:tab-stops/>
      </style:paragraph-properties>
    </style:style>
    <style:style style:name="T70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08" style:parent-style-name="Обычный" style:family="paragraph">
      <style:paragraph-properties fo:margin-left="0.4354in" fo:text-indent="0.4902in">
        <style:tab-stops/>
      </style:paragraph-properties>
    </style:style>
    <style:style style:name="T70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11" style:parent-style-name="Обычный" style:family="paragraph">
      <style:paragraph-properties fo:margin-left="0.4354in" fo:text-indent="0.4902in">
        <style:tab-stops/>
      </style:paragraph-properties>
    </style:style>
    <style:style style:name="T71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16" style:parent-style-name="Обычный" style:family="paragraph">
      <style:paragraph-properties fo:margin-left="0.4354in" fo:text-indent="0.4902in">
        <style:tab-stops/>
      </style:paragraph-properties>
    </style:style>
    <style:style style:name="T71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0" style:parent-style-name="Обычный" style:family="paragraph">
      <style:paragraph-properties fo:margin-left="0.4354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2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26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728" style:family="table-column">
      <style:table-column-properties style:column-width="6.6854in"/>
    </style:style>
    <style:style style:name="Table727" style:family="table">
      <style:table-properties style:width="6.6854in" fo:margin-left="0in" table:align="lef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3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33" style:parent-style-name="Обычный" style:family="paragraph">
      <style:paragraph-properties fo:text-indent="0.4902in"/>
    </style:style>
    <style:style style:name="T73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4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4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43" style:parent-style-name="Обычный" style:family="paragraph">
      <style:paragraph-properties fo:text-indent="0.4902in"/>
    </style:style>
    <style:style style:name="T74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4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5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51" style:parent-style-name="Обычный" style:family="paragraph">
      <style:paragraph-properties fo:text-indent="0.4902in"/>
    </style:style>
    <style:style style:name="T75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57" style:parent-style-name="Обычный" style:family="paragraph">
      <style:paragraph-properties fo:text-indent="0.4902in"/>
    </style:style>
    <style:style style:name="T75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63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6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6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6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767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769" style:family="table-column">
      <style:table-column-properties style:column-width="6.6854in"/>
    </style:style>
    <style:style style:name="Table768" style:family="table">
      <style:table-properties style:width="6.6854in" fo:margin-left="0in" table:align="lef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75" style:parent-style-name="Обычный" style:family="paragraph">
      <style:paragraph-properties fo:text-indent="0.4902in"/>
    </style:style>
    <style:style style:name="T77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8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85" style:parent-style-name="Обычный" style:family="paragraph">
      <style:paragraph-properties fo:text-indent="0.4902in"/>
    </style:style>
    <style:style style:name="T78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8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79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7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0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1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3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814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1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821" style:family="table-column">
      <style:table-column-properties style:column-width="7.0347in"/>
    </style:style>
    <style:style style:name="Table820" style:family="table">
      <style:table-properties style:width="7.0347in" fo:margin-left="-0.2326in" table:align="left"/>
    </style:style>
    <style:style style:name="TableRow822" style:family="table-row">
      <style:table-row-properties style:min-row-height="6.7243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T82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26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27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28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29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0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1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2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3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4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5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6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7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8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9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0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1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2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3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4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5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6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7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8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9" style:parent-style-name="Обычный" style:family="paragraph">
      <style:paragraph-properties fo:margin-left="0.2291in" fo:text-indent="0.4902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50" style:parent-style-name="Обычный" style:family="paragraph">
      <style:paragraph-properties fo:margin-left="0.2291in" fo:text-indent="0.4902in">
        <style:tab-stops/>
      </style:paragraph-properties>
    </style:style>
    <style:style style:name="T85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3" style:parent-style-name="Обычный" style:family="paragraph">
      <style:paragraph-properties fo:margin-left="0.2291in" fo:text-indent="0.4902in">
        <style:tab-stops/>
      </style:paragraph-properties>
    </style:style>
    <style:style style:name="T85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5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6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6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62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864" style:family="table-column">
      <style:table-column-properties style:column-width="6.6854in"/>
    </style:style>
    <style:style style:name="Table863" style:family="table">
      <style:table-properties style:width="6.6854in" fo:margin-left="0in" table:align="left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6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6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70" style:parent-style-name="Обычный" style:family="paragraph">
      <style:paragraph-properties fo:text-indent="0.4902in"/>
    </style:style>
    <style:style style:name="T87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7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7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6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7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8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89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892" style:family="table-column">
      <style:table-column-properties style:column-width="6.6854in"/>
    </style:style>
    <style:style style:name="Table891" style:family="table">
      <style:table-properties style:width="6.6854in" fo:margin-left="0in" table:align="left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9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9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9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9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0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0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1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917" style:family="table-column">
      <style:table-column-properties style:column-width="6.6854in"/>
    </style:style>
    <style:style style:name="Table916" style:family="table">
      <style:table-properties style:width="6.6854in" fo:margin-left="0in" table:align="left"/>
    </style:style>
    <style:style style:name="TableRow918" style:family="table-row">
      <style:table-row-properties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2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2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23" style:parent-style-name="Обычный" style:family="paragraph">
      <style:paragraph-properties fo:text-indent="0.4902in"/>
    </style:style>
    <style:style style:name="T92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31" style:parent-style-name="Обычный" style:family="paragraph">
      <style:paragraph-properties fo:text-indent="0.4902in"/>
    </style:style>
    <style:style style:name="T93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3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4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4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4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4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44" style:parent-style-name="Обычный" style:family="paragraph">
      <style:paragraph-properties fo:text-indent="0.4902in"/>
    </style:style>
    <style:style style:name="T94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5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5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54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5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56" style:parent-style-name="Обычный" style:family="paragraph">
      <style:paragraph-properties fo:text-indent="0.4902in"/>
    </style:style>
    <style:style style:name="T95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6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6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65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967" style:family="table-column">
      <style:table-column-properties style:column-width="6.6854in"/>
    </style:style>
    <style:style style:name="Table966" style:family="table">
      <style:table-properties style:width="6.6854in" fo:margin-left="0in" table:align="left"/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71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72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7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7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7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979" style:family="table-column">
      <style:table-column-properties style:column-width="6.6854in"/>
    </style:style>
    <style:style style:name="Table978" style:family="table">
      <style:table-properties style:width="6.6854in" fo:margin-left="0in" table:align="left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T982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84" style:parent-style-name="Обычный" style:family="paragraph">
      <style:paragraph-properties fo:text-indent="0.4902in"/>
    </style:style>
    <style:style style:name="T98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87" style:parent-style-name="Обычный" style:family="paragraph">
      <style:paragraph-properties fo:text-indent="0.4902in"/>
    </style:style>
    <style:style style:name="T988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9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9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992" style:parent-style-name="Обычный" style:family="paragraph">
      <style:paragraph-properties fo:text-indent="0.4902in"/>
    </style:style>
    <style:style style:name="T99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9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9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9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9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99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0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001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0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1008" style:family="table-column">
      <style:table-column-properties style:column-width="6.6854in"/>
    </style:style>
    <style:style style:name="Table1007" style:family="table">
      <style:table-properties style:width="6.6854in" fo:margin-left="0in" table:align="lef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18" style:parent-style-name="Обычный" style:family="paragraph">
      <style:paragraph-properties fo:text-indent="0.4902in"/>
    </style:style>
    <style:style style:name="T1019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2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27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1029" style:family="table-column">
      <style:table-column-properties style:column-width="6.6854in"/>
    </style:style>
    <style:style style:name="Table1028" style:family="table">
      <style:table-properties style:width="6.6854in" fo:margin-left="0in" table:align="left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3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4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4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4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4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4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5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5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1053" style:family="table-column">
      <style:table-column-properties style:column-width="6.6854in"/>
    </style:style>
    <style:style style:name="Table1052" style:family="table">
      <style:table-properties style:width="6.6854in" fo:margin-left="0in" table:align="left"/>
    </style:style>
    <style:style style:name="TableRow1054" style:family="table-row">
      <style:table-row-properties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5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5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5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6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7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6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7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7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7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7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7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olumn1076" style:family="table-column">
      <style:table-column-properties style:column-width="6.6854in"/>
    </style:style>
    <style:style style:name="Table1075" style:family="table">
      <style:table-properties style:width="6.6854in" fo:margin-left="0in" table:align="left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08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88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8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6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097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8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9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4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105" style:parent-style-name="Обычный" style:family="paragraph">
      <style:paragraph-properties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0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1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12" style:parent-style-name="Обычный" style:family="paragraph">
      <style:paragraph-properties fo:text-indent="0.4902in"/>
    </style:style>
    <style:style style:name="T1113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11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111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4" style:parent-style-name="Обычный" style:family="paragraph">
      <style:paragraph-properties fo:text-indent="0.4902in"/>
    </style:style>
    <style:style style:name="T1125" style:parent-style-name="Основнойшрифтабзаца" style:family="text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26" style:parent-style-name="Обычный" style:family="paragraph">
      <style:paragraph-properties fo:text-indent="0.4902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27" style:parent-style-name="Обычный" style:family="paragraph">
      <style:paragraph-properties fo:text-align="center"/>
    </style:style>
    <style:style style:name="T1128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29" style:parent-style-name="Обычный" style:family="paragraph">
      <style:paragraph-properties fo:text-indent="0.4902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30" style:parent-style-name="Обычный" style:family="paragraph">
      <style:paragraph-properties fo:text-indent="0.4902in"/>
    </style:style>
    <style:style style:name="T1131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32" style:parent-style-name="Обычный" style:family="paragraph">
      <style:paragraph-properties fo:text-indent="0.4902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33" style:parent-style-name="Обычный" style:family="paragraph">
      <style:paragraph-properties fo:text-indent="0.4902in"/>
    </style:style>
    <style:style style:name="T113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35" style:parent-style-name="Обычный" style:family="paragraph">
      <style:paragraph-properties fo:text-indent="0.4902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13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3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3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3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3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144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145" style:parent-style-name="Обычный" style:family="paragraph">
      <style:paragraph-properties fo:text-align="center" fo:text-indent="0.4902in"/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8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49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0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2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3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4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5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6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7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158" style:parent-style-name="Обычный" style:family="paragraph"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159" style:parent-style-name="Обычный" style:family="paragraph">
      <style:paragraph-properties fo:text-align="center" fo:margin-top="0.25in" fo:margin-bottom="0.25in"/>
      <style:text-properties fo:font-weight="bold" style:font-weight-asian="bold" style:font-weight-complex="bold" fo:font-size="14pt" style:font-size-asian="14pt" style:font-size-complex="14pt"/>
    </style:style>
    <style:style style:name="P1160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61" style:parent-style-name="Основнойшрифтабзаца" style:family="text">
      <style:text-properties fo:font-size="14pt" style:font-size-asian="14pt" style:font-size-complex="14pt"/>
    </style:style>
    <style:style style:name="T1162" style:parent-style-name="Основнойшрифтабзаца" style:family="text">
      <style:text-properties fo:font-size="14pt" style:font-size-asian="14pt" style:font-size-complex="14pt"/>
    </style:style>
    <style:style style:name="T1163" style:parent-style-name="Гиперссылка" style:family="text">
      <style:text-properties fo:font-size="14pt" style:font-size-asian="14pt" style:font-size-complex="14pt"/>
    </style:style>
    <style:style style:name="T1164" style:parent-style-name="Основнойшрифтабзаца" style:family="text">
      <style:text-properties fo:font-size="14pt" style:font-size-asian="14pt" style:font-size-complex="14pt"/>
    </style:style>
    <style:style style:name="P1165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66" style:parent-style-name="Основнойшрифтабзаца" style:family="text">
      <style:text-properties fo:font-size="14pt" style:font-size-asian="14pt" style:font-size-complex="14pt"/>
    </style:style>
    <style:style style:name="T1167" style:parent-style-name="Гиперссылка" style:family="text">
      <style:text-properties fo:font-size="14pt" style:font-size-asian="14pt" style:font-size-complex="14pt"/>
    </style:style>
    <style:style style:name="T1168" style:parent-style-name="Основнойшрифтабзаца" style:family="text">
      <style:text-properties fo:font-size="14pt" style:font-size-asian="14pt" style:font-size-complex="14pt"/>
    </style:style>
    <style:style style:name="P1169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1" style:parent-style-name="Основнойшрифтабзаца" style:family="text">
      <style:text-properties fo:font-size="14pt" style:font-size-asian="14pt" style:font-size-complex="14pt"/>
    </style:style>
    <style:style style:name="T1172" style:parent-style-name="Гиперссылка" style:family="text">
      <style:text-properties fo:font-size="14pt" style:font-size-asian="14pt" style:font-size-complex="14pt"/>
    </style:style>
    <style:style style:name="T1173" style:parent-style-name="Основнойшрифтабзаца" style:family="text">
      <style:text-properties fo:font-size="14pt" style:font-size-asian="14pt" style:font-size-complex="14pt"/>
    </style:style>
    <style:style style:name="T1174" style:parent-style-name="Основнойшрифтабзаца" style:family="text">
      <style:text-properties fo:font-size="14pt" style:font-size-asian="14pt" style:font-size-complex="14pt"/>
    </style:style>
    <style:style style:name="P1175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76" style:parent-style-name="Основнойшрифтабзаца" style:family="text">
      <style:text-properties fo:font-size="14pt" style:font-size-asian="14pt" style:font-size-complex="14pt"/>
    </style:style>
    <style:style style:name="T1177" style:parent-style-name="Гиперссылка" style:family="text">
      <style:text-properties fo:font-size="14pt" style:font-size-asian="14pt" style:font-size-complex="14pt"/>
    </style:style>
    <style:style style:name="T1178" style:parent-style-name="Основнойшрифтабзаца" style:family="text">
      <style:text-properties fo:font-size="14pt" style:font-size-asian="14pt" style:font-size-complex="14pt"/>
    </style:style>
    <style:style style:name="P1179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80" style:parent-style-name="Основнойшрифтабзаца" style:family="text">
      <style:text-properties fo:font-size="14pt" style:font-size-asian="14pt" style:font-size-complex="14pt"/>
    </style:style>
    <style:style style:name="T1181" style:parent-style-name="Основнойшрифтабзаца" style:family="text">
      <style:text-properties fo:font-size="14pt" style:font-size-asian="14pt" style:font-size-complex="14pt"/>
    </style:style>
    <style:style style:name="T1182" style:parent-style-name="Гиперссылка" style:family="text">
      <style:text-properties fo:font-size="14pt" style:font-size-asian="14pt" style:font-size-complex="14pt"/>
    </style:style>
    <style:style style:name="T1183" style:parent-style-name="Основнойшрифтабзаца" style:family="text">
      <style:text-properties fo:font-size="14pt" style:font-size-asian="14pt" style:font-size-complex="14pt"/>
    </style:style>
    <style:style style:name="P1184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85" style:parent-style-name="Основнойшрифтабзаца" style:family="text">
      <style:text-properties fo:font-size="14pt" style:font-size-asian="14pt" style:font-size-complex="14pt"/>
    </style:style>
    <style:style style:name="T1186" style:parent-style-name="Основнойшрифтабзаца" style:family="text">
      <style:text-properties fo:font-size="14pt" style:font-size-asian="14pt" style:font-size-complex="14pt"/>
    </style:style>
    <style:style style:name="T1187" style:parent-style-name="Гиперссылка" style:family="text">
      <style:text-properties fo:font-size="14pt" style:font-size-asian="14pt" style:font-size-complex="14pt"/>
    </style:style>
    <style:style style:name="T1188" style:parent-style-name="Основнойшрифтабзаца" style:family="text">
      <style:text-properties fo:font-size="14pt" style:font-size-asian="14pt" style:font-size-complex="14pt"/>
    </style:style>
    <style:style style:name="P1189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190" style:parent-style-name="Основнойшрифтабзаца" style:family="text">
      <style:text-properties fo:font-size="14pt" style:font-size-asian="14pt" style:font-size-complex="14pt"/>
    </style:style>
    <style:style style:name="T1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2" style:parent-style-name="Основнойшрифтабзаца" style:family="text">
      <style:text-properties fo:font-size="14pt" style:font-size-asian="14pt" style:font-size-complex="14pt"/>
    </style:style>
    <style:style style:name="T1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4" style:parent-style-name="Основнойшрифтабзаца" style:family="text">
      <style:text-properties fo:font-size="14pt" style:font-size-asian="14pt" style:font-size-complex="14pt"/>
    </style:style>
    <style:style style:name="T1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6" style:parent-style-name="Основнойшрифтабзаца" style:family="text">
      <style:text-properties fo:font-size="14pt" style:font-size-asian="14pt" style:font-size-complex="14pt"/>
    </style:style>
    <style:style style:name="T1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8" style:parent-style-name="Основнойшрифтабзаца" style:family="text">
      <style:text-properties fo:font-size="14pt" style:font-size-asian="14pt" style:font-size-complex="14pt"/>
    </style:style>
    <style:style style:name="T1199" style:parent-style-name="Гиперссылка" style:family="text">
      <style:text-properties fo:font-size="14pt" style:font-size-asian="14pt" style:font-size-complex="14pt"/>
    </style:style>
    <style:style style:name="T1200" style:parent-style-name="Гиперссылка" style:family="text">
      <style:text-properties fo:font-size="14pt" style:font-size-asian="14pt" style:font-size-complex="14pt"/>
    </style:style>
    <style:style style:name="T1201" style:parent-style-name="Основнойшрифтабзаца" style:family="text">
      <style:text-properties fo:font-size="14pt" style:font-size-asian="14pt" style:font-size-complex="14pt"/>
    </style:style>
    <style:style style:name="P1202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203" style:parent-style-name="Основнойшрифтабзаца" style:family="text">
      <style:text-properties fo:font-size="14pt" style:font-size-asian="14pt" style:font-size-complex="14pt"/>
    </style:style>
    <style:style style:name="T1204" style:parent-style-name="Гиперссылка" style:family="text">
      <style:text-properties fo:font-size="14pt" style:font-size-asian="14pt" style:font-size-complex="14pt"/>
    </style:style>
    <style:style style:name="T1205" style:parent-style-name="Основнойшрифтабзаца" style:family="text">
      <style:text-properties fo:font-size="14pt" style:font-size-asian="14pt" style:font-size-complex="14pt"/>
    </style:style>
    <style:style style:name="P1206" style:parent-style-name="Обычный" style:family="paragraph">
      <style:paragraph-properties fo:widows="2" fo:orphans="2" style:vertical-align="auto" fo:margin-bottom="0.1111in"/>
      <style:text-properties fo:hyphenate="true"/>
    </style:style>
    <style:style style:name="T1207" style:parent-style-name="Основнойшрифтабзаца" style:family="text">
      <style:text-properties fo:font-size="14pt" style:font-size-asian="14pt" style:font-size-complex="14pt"/>
    </style:style>
    <style:style style:name="T1208" style:parent-style-name="Основнойшрифтабзаца" style:family="text">
      <style:text-properties fo:font-size="14pt" style:font-size-asian="14pt" style:font-size-complex="14pt"/>
    </style:style>
    <style:style style:name="T1209" style:parent-style-name="Гиперссылка" style:family="text">
      <style:text-properties fo:font-size="14pt" style:font-size-asian="14pt" style:font-size-complex="14pt"/>
    </style:style>
    <style:style style:name="T1210" style:parent-style-name="Основнойшрифтабзаца" style:family="text">
      <style:text-properties fo:font-size="14pt" style:font-size-asian="14pt" style:font-size-complex="14pt"/>
    </style:style>
    <style:style style:name="P1211" style:parent-style-name="Обычный" style:family="paragraph">
      <style:paragraph-properties fo:text-indent="0.4902in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212" style:parent-style-name="Обычный" style:family="paragraph">
      <style:paragraph-properties fo:break-before="page"/>
      <style:text-properties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1213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121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1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16" style:parent-style-name="Обычный" style:family="paragraph">
      <style:paragraph-properties fo:text-align="center"/>
    </style:style>
    <style:style style:name="T12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19" style:parent-style-name="Основнойшрифтабзаца" style:family="text">
      <style:text-properties fo:font-size="14pt" style:font-size-asian="14pt" style:font-size-complex="14pt"/>
    </style:style>
    <style:style style:name="P122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21" style:parent-style-name="Обычный" style:family="paragraph">
      <style:paragraph-properties fo:text-align="center" fo:margin-bottom="0.1666in"/>
    </style:style>
    <style:style style:name="T12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24" style:parent-style-name="Обычный" style:family="paragraph">
      <style:paragraph-properties fo:text-align="center"/>
    </style:style>
    <style:style style:name="T1225" style:parent-style-name="Основнойшрифтабзаца" style:family="text">
      <style:text-properties fo:font-size="14pt" style:font-size-asian="14pt" style:font-size-complex="14pt"/>
    </style:style>
    <style:style style:name="T12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27" style:parent-style-name="Основнойшрифтабзаца" style:family="text">
      <style:text-properties fo:font-size="14pt" style:font-size-asian="14pt" style:font-size-complex="14pt"/>
    </style:style>
    <style:style style:name="T12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30" style:parent-style-name="Обычный" style:family="paragraph">
      <style:paragraph-properties fo:text-align="center" fo:margin-bottom="0.1666in"/>
    </style:style>
    <style:style style:name="T12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32" style:parent-style-name="Обычный" style:family="paragraph">
      <style:paragraph-properties fo:text-align="center"/>
    </style:style>
    <style:style style:name="T1233" style:parent-style-name="Основнойшрифтабзаца" style:family="text">
      <style:text-properties fo:font-size="14pt" style:font-size-asian="14pt" style:font-size-complex="14pt"/>
    </style:style>
    <style:style style:name="T12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35" style:parent-style-name="Основнойшрифтабзаца" style:family="text">
      <style:text-properties fo:font-size="14pt" style:font-size-asian="14pt" style:font-size-complex="14pt"/>
    </style:style>
    <style:style style:name="T1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238" style:parent-style-name="Обычный" style:family="paragraph">
      <style:paragraph-properties fo:text-align="center" fo:margin-bottom="0.1666in"/>
    </style:style>
    <style:style style:name="T12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40" style:parent-style-name="Обычный" style:family="paragraph">
      <style:paragraph-properties fo:text-align="center"/>
    </style:style>
    <style:style style:name="T1241" style:parent-style-name="Основнойшрифтабзаца" style:family="text">
      <style:text-properties fo:font-size="14pt" style:font-size-asian="14pt" style:font-size-complex="14pt"/>
    </style:style>
    <style:style style:name="T12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43" style:parent-style-name="Основнойшрифтабзаца" style:family="text">
      <style:text-properties fo:font-size="14pt" style:font-size-asian="14pt" style:font-size-complex="14pt"/>
    </style:style>
    <style:style style:name="T12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46" style:parent-style-name="Обычный" style:family="paragraph">
      <style:paragraph-properties fo:text-align="center"/>
    </style:style>
    <style:style style:name="T1247" style:parent-style-name="Основнойшрифтабзаца" style:family="text">
      <style:text-properties fo:font-size="14pt" style:font-size-asian="14pt" style:font-size-complex="14pt"/>
    </style:style>
    <style:style style:name="T1248" style:parent-style-name="Основнойшрифтабзаца" style:family="text">
      <style:text-properties fo:font-size="14pt" style:font-size-asian="14pt" style:font-size-complex="14pt"/>
    </style:style>
    <style:style style:name="P12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50" style:parent-style-name="Обычный" style:family="paragraph">
      <style:paragraph-properties fo:text-align="center"/>
    </style:style>
    <style:style style:name="T1251" style:parent-style-name="Основнойшрифтабзаца" style:family="text">
      <style:text-properties fo:font-size="14pt" style:font-size-asian="14pt" style:font-size-complex="14pt"/>
    </style:style>
    <style:style style:name="T12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53" style:parent-style-name="Основнойшрифтабзаца" style:family="text">
      <style:text-properties fo:font-size="14pt" style:font-size-asian="14pt" style:font-size-complex="14pt"/>
    </style:style>
    <style:style style:name="T12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56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257" style:parent-style-name="Обычный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1258" style:parent-style-name="Обычный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1259" style:parent-style-name="Обычный" style:family="paragraph">
      <style:paragraph-properties fo:text-align="center"/>
      <style:text-properties fo:font-size="14pt" style:font-size-asian="14pt" style:font-size-complex="14pt" fo:hyphenate="true"/>
    </style:style>
    <style:style style:name="P12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61" style:parent-style-name="Обычный" style:family="paragraph">
      <style:paragraph-properties fo:text-align="center" fo:margin-bottom="0.1666in"/>
    </style:style>
    <style:style style:name="T12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63" style:parent-style-name="Обычный" style:family="paragraph">
      <style:paragraph-properties fo:text-align="center" fo:margin-bottom="0.0833in"/>
      <style:text-properties fo:font-size="14pt" style:font-size-asian="14pt" style:font-size-complex="14pt"/>
    </style:style>
    <style:style style:name="P12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65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2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olumn1268" style:family="table-column">
      <style:table-column-properties style:column-width="6.6854in"/>
    </style:style>
    <style:style style:name="Table1267" style:family="table">
      <style:table-properties style:width="6.6854in" fo:margin-left="0in" table:align="left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2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0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1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3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0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0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0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04" style:parent-style-name="Обычный" style:family="paragraph">
      <style:paragraph-properties fo:text-align="center"/>
    </style:style>
    <style:style style:name="T14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06" style:parent-style-name="Основнойшрифтабзаца" style:family="text">
      <style:text-properties fo:font-size="14pt" style:font-size-asian="14pt" style:font-size-complex="14pt"/>
    </style:style>
    <style:style style:name="T14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8" style:parent-style-name="Основнойшрифтабзаца" style:family="text">
      <style:text-properties fo:font-size="14pt" style:font-size-asian="14pt" style:font-size-complex="14pt"/>
    </style:style>
    <style:style style:name="T14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0" style:parent-style-name="Основнойшрифтабзаца" style:family="text">
      <style:text-properties fo:font-size="14pt" style:font-size-asian="14pt" style:font-size-complex="14pt"/>
    </style:style>
    <style:style style:name="T1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2" style:parent-style-name="Основнойшрифтабзаца" style:family="text">
      <style:text-properties fo:font-size="14pt" style:font-size-asian="14pt" style:font-size-complex="14pt"/>
    </style:style>
    <style:style style:name="P141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1415" style:family="table-column">
      <style:table-column-properties style:column-width="6.6854in"/>
    </style:style>
    <style:style style:name="Table1414" style:family="table">
      <style:table-properties style:width="6.6854in" fo:margin-left="0in" table:align="left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1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88" style:parent-style-name="Обычный" style:family="paragraph">
      <style:paragraph-properties fo:text-align="center"/>
    </style:style>
    <style:style style:name="T1489" style:parent-style-name="Основнойшрифтабзаца" style:family="text">
      <style:text-properties fo:font-size="14pt" style:font-size-asian="14pt" style:font-size-complex="14pt"/>
    </style:style>
    <style:style style:name="T14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91" style:parent-style-name="Основнойшрифтабзаца" style:family="text">
      <style:text-properties fo:font-size="14pt" style:font-size-asian="14pt" style:font-size-complex="14pt"/>
    </style:style>
    <style:style style:name="T14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4" style:parent-style-name="Основнойшрифтабзаца" style:family="text">
      <style:text-properties fo:font-size="14pt" style:font-size-asian="14pt" style:font-size-complex="14pt"/>
    </style:style>
    <style:style style:name="T14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6" style:parent-style-name="Основнойшрифтабзаца" style:family="text">
      <style:text-properties fo:font-size="14pt" style:font-size-asian="14pt" style:font-size-complex="14pt"/>
    </style:style>
    <style:style style:name="T14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8" style:parent-style-name="Основнойшрифтабзаца" style:family="text">
      <style:text-properties fo:font-size="14pt" style:font-size-asian="14pt" style:font-size-complex="14pt"/>
    </style:style>
    <style:style style:name="P14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1501" style:family="table-column">
      <style:table-column-properties style:column-width="6.6854in"/>
    </style:style>
    <style:style style:name="Table1500" style:family="table">
      <style:table-properties style:width="6.6854in" fo:margin-left="0in" table:align="left"/>
    </style:style>
    <style:style style:name="TableRow1502" style:family="table-row">
      <style:table-row-properties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0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0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0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0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0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1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590" style:parent-style-name="Обычный" style:family="paragraph">
      <style:paragraph-properties fo:text-align="center"/>
    </style:style>
    <style:style style:name="T1591" style:parent-style-name="Основнойшрифтабзаца" style:family="text">
      <style:text-properties fo:font-size="14pt" style:font-size-asian="14pt" style:font-size-complex="14pt"/>
    </style:style>
    <style:style style:name="T15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93" style:parent-style-name="Основнойшрифтабзаца" style:family="text">
      <style:text-properties fo:font-size="14pt" style:font-size-asian="14pt" style:font-size-complex="14pt"/>
    </style:style>
    <style:style style:name="T159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6" style:parent-style-name="Основнойшрифтабзаца" style:family="text">
      <style:text-properties fo:font-size="14pt" style:font-size-asian="14pt" style:font-size-complex="14pt"/>
    </style:style>
    <style:style style:name="T15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8" style:parent-style-name="Основнойшрифтабзаца" style:family="text">
      <style:text-properties fo:font-size="14pt" style:font-size-asian="14pt" style:font-size-complex="14pt"/>
    </style:style>
    <style:style style:name="T15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0" style:parent-style-name="Основнойшрифтабзаца" style:family="text">
      <style:text-properties fo:font-size="14pt" style:font-size-asian="14pt" style:font-size-complex="14pt"/>
    </style:style>
    <style:style style:name="P16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1603" style:family="table-column">
      <style:table-column-properties style:column-width="6.6854in"/>
    </style:style>
    <style:style style:name="Table1602" style:family="table">
      <style:table-properties style:width="6.6854in" fo:margin-left="0in" table:align="left"/>
    </style:style>
    <style:style style:name="TableRow1604" style:family="table-row">
      <style:table-row-properties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0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0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0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1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6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0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16" style:parent-style-name="Обычный" style:family="paragraph">
      <style:paragraph-properties fo:text-align="center"/>
    </style:style>
    <style:style style:name="T1717" style:parent-style-name="Основнойшрифтабзаца" style:family="text">
      <style:text-properties fo:font-size="14pt" style:font-size-asian="14pt" style:font-size-complex="14pt"/>
    </style:style>
    <style:style style:name="T17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19" style:parent-style-name="Основнойшрифтабзаца" style:family="text">
      <style:text-properties fo:font-size="14pt" style:font-size-asian="14pt" style:font-size-complex="14pt"/>
    </style:style>
    <style:style style:name="T17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2" style:parent-style-name="Основнойшрифтабзаца" style:family="text">
      <style:text-properties fo:font-size="14pt" style:font-size-asian="14pt" style:font-size-complex="14pt"/>
    </style:style>
    <style:style style:name="T17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4" style:parent-style-name="Основнойшрифтабзаца" style:family="text">
      <style:text-properties fo:font-size="14pt" style:font-size-asian="14pt" style:font-size-complex="14pt"/>
    </style:style>
    <style:style style:name="T17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6" style:parent-style-name="Основнойшрифтабзаца" style:family="text">
      <style:text-properties fo:font-size="14pt" style:font-size-asian="14pt" style:font-size-complex="14pt"/>
    </style:style>
    <style:style style:name="P17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1729" style:family="table-column">
      <style:table-column-properties style:column-width="6.6854in"/>
    </style:style>
    <style:style style:name="Table1728" style:family="table">
      <style:table-properties style:width="6.6854in" fo:margin-left="0in" table:align="left"/>
    </style:style>
    <style:style style:name="TableRow1730" style:family="table-row">
      <style:table-row-properties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7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0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10" style:parent-style-name="Обычный" style:family="paragraph">
      <style:paragraph-properties fo:text-align="center"/>
    </style:style>
    <style:style style:name="T1811" style:parent-style-name="Основнойшрифтабзаца" style:family="text">
      <style:text-properties fo:font-size="14pt" style:font-size-asian="14pt" style:font-size-complex="14pt"/>
    </style:style>
    <style:style style:name="T18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13" style:parent-style-name="Основнойшрифтабзаца" style:family="text">
      <style:text-properties fo:font-size="14pt" style:font-size-asian="14pt" style:font-size-complex="14pt"/>
    </style:style>
    <style:style style:name="T18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6" style:parent-style-name="Основнойшрифтабзаца" style:family="text">
      <style:text-properties fo:font-size="14pt" style:font-size-asian="14pt" style:font-size-complex="14pt"/>
    </style:style>
    <style:style style:name="T18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8" style:parent-style-name="Основнойшрифтабзаца" style:family="text">
      <style:text-properties fo:font-size="14pt" style:font-size-asian="14pt" style:font-size-complex="14pt"/>
    </style:style>
    <style:style style:name="T18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0" style:parent-style-name="Основнойшрифтабзаца" style:family="text">
      <style:text-properties fo:font-size="14pt" style:font-size-asian="14pt" style:font-size-complex="14pt"/>
    </style:style>
    <style:style style:name="P18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olumn1823" style:family="table-column">
      <style:table-column-properties style:column-width="6.6854in"/>
    </style:style>
    <style:style style:name="Table1822" style:family="table">
      <style:table-properties style:width="6.6854in" fo:margin-left="0in" table:align="left"/>
    </style:style>
    <style:style style:name="TableRow1824" style:family="table-row">
      <style:table-row-properties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2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2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2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3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4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5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7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8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8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89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90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90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90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90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1904" style:parent-style-name="Обычный" style:family="paragraph">
      <style:paragraph-properties fo:text-align="center"/>
    </style:style>
    <style:style style:name="T1905" style:parent-style-name="Основнойшрифтабзаца" style:family="text">
      <style:text-properties fo:font-size="14pt" style:font-size-asian="14pt" style:font-size-complex="14pt"/>
    </style:style>
    <style:style style:name="T19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07" style:parent-style-name="Основнойшрифтабзаца" style:family="text">
      <style:text-properties fo:font-size="14pt" style:font-size-asian="14pt" style:font-size-complex="14pt"/>
    </style:style>
    <style:style style:name="T19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1" style:parent-style-name="Основнойшрифтабзаца" style:family="text">
      <style:text-properties fo:font-size="14pt" style:font-size-asian="14pt" style:font-size-complex="14pt"/>
    </style:style>
    <style:style style:name="T19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3" style:parent-style-name="Основнойшрифтабзаца" style:family="text">
      <style:text-properties fo:font-size="14pt" style:font-size-asian="14pt" style:font-size-complex="14pt"/>
    </style:style>
    <style:style style:name="T19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5" style:parent-style-name="Основнойшрифтабзаца" style:family="text">
      <style:text-properties fo:font-size="14pt" style:font-size-asian="14pt" style:font-size-complex="14pt"/>
    </style:style>
    <style:style style:name="P1916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1917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1918" style:parent-style-name="Обычный" style:family="paragraph">
      <style:paragraph-properties fo:text-align="center" fo:margin-bottom="0.1666in"/>
    </style:style>
    <style:style style:name="T19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ableColumn1921" style:family="table-column">
      <style:table-column-properties style:column-width="6.6854in"/>
    </style:style>
    <style:style style:name="Table1920" style:family="table">
      <style:table-properties style:width="6.6854in" fo:margin-left="0in" table:align="left"/>
    </style:style>
    <style:style style:name="TableRow1922" style:family="table-row">
      <style:table-row-properties/>
    </style:style>
    <style:style style:name="TableCell1923" style:family="table-cell">
      <style:table-cell-properties fo:border="0.0069in solid #000000" style:writing-mode="lr-tb" fo:padding-top="0in" fo:padding-left="0.075in" fo:padding-bottom="0in" fo:padding-right="0.075in"/>
    </style:style>
    <style:style style:name="P19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0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1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2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3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6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7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8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22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2923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2924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292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2927" style:family="table-column">
      <style:table-column-properties style:column-width="6.6854in"/>
    </style:style>
    <style:style style:name="Table2926" style:family="table">
      <style:table-properties style:width="6.6854in" fo:margin-left="0in" table:align="left"/>
    </style:style>
    <style:style style:name="TableRow2928" style:family="table-row">
      <style:table-row-properties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P2930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1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38" style:parent-style-name="Обычный" style:family="paragraph">
      <style:paragraph-properties fo:text-align="center"/>
    </style:style>
    <style:style style:name="T2939" style:parent-style-name="Основнойшрифтабзаца" style:family="text">
      <style:text-properties fo:font-size="14pt" style:font-size-asian="14pt" style:font-size-complex="14pt"/>
    </style:style>
    <style:style style:name="T29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41" style:parent-style-name="Основнойшрифтабзаца" style:family="text">
      <style:text-properties fo:font-size="14pt" style:font-size-asian="14pt" style:font-size-complex="14pt"/>
    </style:style>
    <style:style style:name="P29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94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44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945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2946" style:parent-style-name="Обычный" style:family="paragraph">
      <style:paragraph-properties fo:text-align="center" fo:margin-bottom="0.1666in"/>
    </style:style>
    <style:style style:name="T29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949" style:family="table-column">
      <style:table-column-properties style:column-width="6.6854in"/>
    </style:style>
    <style:style style:name="Table2948" style:family="table">
      <style:table-properties style:width="6.6854in" fo:margin-left="0in" table:align="left"/>
    </style:style>
    <style:style style:name="TableRow2950" style:family="table-row">
      <style:table-row-properties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3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5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6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7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958" style:parent-style-name="Обычный" style:family="paragraph">
      <style:paragraph-properties fo:text-align="center"/>
    </style:style>
    <style:style style:name="T2959" style:parent-style-name="Основнойшрифтабзаца" style:family="text">
      <style:text-properties fo:font-size="14pt" style:font-size-asian="14pt" style:font-size-complex="14pt"/>
    </style:style>
    <style:style style:name="T29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1" style:parent-style-name="Основнойшрифтабзаца" style:family="text">
      <style:text-properties fo:font-size="14pt" style:font-size-asian="14pt" style:font-size-complex="14pt"/>
    </style:style>
    <style:style style:name="T29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67" style:parent-style-name="Обычный" style:family="paragraph">
      <style:paragraph-properties fo:break-before="page"/>
      <style:text-properties fo:font-size="14pt" style:font-size-asian="14pt" style:font-size-complex="14pt" fo:language="ru" fo:country="RU" fo:hyphenate="true"/>
    </style:style>
    <style:style style:name="P2968" style:parent-style-name="Обычный" style:family="paragraph">
      <style:paragraph-properties fo:text-align="center" fo:margin-bottom="0.1666in"/>
      <style:text-properties fo:font-size="14pt" style:font-size-asian="14pt" style:font-size-complex="14pt"/>
    </style:style>
    <style:style style:name="P2969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TableColumn2971" style:family="table-column">
      <style:table-column-properties style:column-width="6.6854in"/>
    </style:style>
    <style:style style:name="Table2970" style:family="table">
      <style:table-properties style:width="6.6854in" fo:margin-left="0in" table:align="left"/>
    </style:style>
    <style:style style:name="TableRow2972" style:family="table-row">
      <style:table-row-properties/>
    </style:style>
    <style:style style:name="TableCell2973" style:family="table-cell">
      <style:table-cell-properties fo:border="0.0069in solid #000000" style:writing-mode="lr-tb" fo:padding-top="0in" fo:padding-left="0.075in" fo:padding-bottom="0in" fo:padding-right="0.075in"/>
    </style:style>
    <style:style style:name="P297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7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7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7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7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7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8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9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0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1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2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3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4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5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6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77" style:parent-style-name="Обычный" style:family="paragraph">
      <style:paragraph-properties fo:text-align="center"/>
    </style:style>
    <style:style style:name="T30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080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81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82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83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84" style:parent-style-name="Обычный" style:family="paragraph">
      <style:paragraph-properties fo:text-align="center"/>
    </style:style>
    <style:style style:name="T30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087" style:parent-style-name="Обычный" style:family="paragraph">
      <style:paragraph-properties fo:text-align="center"/>
    </style:style>
    <style:style style:name="T30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090" style:parent-style-name="Обычный" style:family="paragraph">
      <style:paragraph-properties fo:text-align="center"/>
    </style:style>
    <style:style style:name="T30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09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0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0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1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2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3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46" style:parent-style-name="Обычный" style:family="paragraph">
      <style:paragraph-properties fo:text-align="center"/>
    </style:style>
    <style:style style:name="T3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15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5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60" style:parent-style-name="Обычный" style:family="paragraph">
      <style:paragraph-properties fo:text-align="center"/>
    </style:style>
    <style:style style:name="T3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16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6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6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6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7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8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1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0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1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2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4" style:parent-style-name="Обычный" style:family="paragraph">
      <style:paragraph-properties fo:text-align="center"/>
    </style:style>
    <style:style style:name="T3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3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3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40" style:parent-style-name="Обычный" style:family="paragraph">
      <style:paragraph-properties fo:text-align="center"/>
    </style:style>
    <style:style style:name="T3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4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4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4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47" style:parent-style-name="Обычный" style:family="paragraph">
      <style:paragraph-properties fo:text-align="center"/>
    </style:style>
    <style:style style:name="T32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6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6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77" style:parent-style-name="Обычный" style:family="paragraph">
      <style:paragraph-properties fo:text-align="center"/>
    </style:style>
    <style:style style:name="T32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8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8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85" style:parent-style-name="Обычный" style:family="paragraph">
      <style:paragraph-properties fo:text-align="center"/>
    </style:style>
    <style:style style:name="T32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8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2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0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18" style:parent-style-name="Обычный" style:family="paragraph">
      <style:paragraph-properties fo:text-align="center"/>
    </style:style>
    <style:style style:name="T33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2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2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26" style:parent-style-name="Обычный" style:family="paragraph">
      <style:paragraph-properties fo:text-align="center"/>
    </style:style>
    <style:style style:name="T33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330" style:parent-style-name="Обычный" style:family="paragraph">
      <style:paragraph-properties fo:text-align="center"/>
    </style:style>
    <style:style style:name="T33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3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3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35" style:parent-style-name="Обычный" style:family="paragraph">
      <style:paragraph-properties fo:text-align="center"/>
    </style:style>
    <style:style style:name="T33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3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4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59" style:parent-style-name="Обычный" style:family="paragraph">
      <style:paragraph-properties fo:text-align="center"/>
    </style:style>
    <style:style style:name="T33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65" style:parent-style-name="Обычный" style:family="paragraph">
      <style:paragraph-properties fo:text-align="center"/>
    </style:style>
    <style:style style:name="T33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77" style:parent-style-name="Обычный" style:family="paragraph">
      <style:paragraph-properties fo:text-align="center"/>
    </style:style>
    <style:style style:name="T33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381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382" style:parent-style-name="Обычный" style:family="paragraph">
      <style:paragraph-properties fo:text-align="center"/>
    </style:style>
    <style:style style:name="T33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8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8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8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8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8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3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0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8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1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0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1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3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4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26" style:parent-style-name="Обычный" style:family="paragraph">
      <style:paragraph-properties fo:text-align="center"/>
    </style:style>
    <style:style style:name="T34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429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0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1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2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3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4" style:parent-style-name="Обычный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435" style:parent-style-name="Обычный" style:family="paragraph">
      <style:paragraph-properties fo:text-align="center"/>
    </style:style>
    <style:style style:name="T3436" style:parent-style-name="Основнойшрифтабзаца" style:family="text">
      <style:text-properties fo:font-size="14pt" style:font-size-asian="14pt" style:font-size-complex="14pt"/>
    </style:style>
    <style:style style:name="T34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39" style:parent-style-name="Основнойшрифтабзаца" style:family="text">
      <style:text-properties fo:font-size="14pt" style:font-size-asian="14pt" style:font-size-complex="14pt"/>
    </style:style>
    <style:style style:name="T34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1" style:parent-style-name="Основнойшрифтабзаца" style:family="text">
      <style:text-properties fo:font-size="14pt" style:font-size-asian="14pt" style:font-size-complex="14pt"/>
    </style:style>
    <style:style style:name="T34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444" style:parent-style-name="Обычный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229609838"/><text:bookmark-end text:name="_Hlk229609838"/>~МИНИСТЕРСТВО ОБРАЗОВАНИЯ РЕСПУБЛИКИ БЕЛАРУСЬ<text:line-break/>Учреждение образования «БЕЛОРУССКИЙ ГОСУДАРСТВЕННЫЙ<text:s/><text:line-break/>ТЕХНОЛОГИЧЕСКИЙ УНИВЕРСИТЕТ»</text:p>
      <text:p text:style-name="P2"/>
      <text:p text:style-name="Безинтервала"><text:span text:style-name="T3">Факультет</text:span><text:span text:style-name="T4"><text:tab/></text:span><text:span text:style-name="T5"><text:tab/>Информационных технологий</text:span></text:p>
      <text:p text:style-name="Безинтервала"><text:span text:style-name="T6">Кафедра</text:span><text:span text:style-name="T7"><text:tab/></text:span><text:span text:style-name="T8"><text:tab/>Информационных систем и технологий</text:span></text:p>
      <text:p text:style-name="Безинтервала"><text:span text:style-name="T9">Специальность<text:s/></text:span><text:span text:style-name="T10"><text:tab/></text:span><text:span text:style-name="T11">6-05-0611-01<text:s/></text:span><text:span text:style-name="T12">Информационные системы и технологии</text:span></text:p>
      <text:p text:style-name="P13"/>
      <text:p text:style-name="P14"/>
      <text:p text:style-name="P15"/>
      <text:p text:style-name="P16">ПОЯСНИТЕЛЬНАЯ ЗАПИСКА КУРСОВОГО ПРОЕКТА</text:p>
      <text:p text:style-name="P17"/>
      <text:p text:style-name="Безинтервала"><text:span text:style-name="T18">по дисциплине «Компьютерные языки разметки»</text:span></text:p>
      <text:p text:style-name="P19">Тема «Веб-сайт «Персональный веб-сайт фотографа»»</text:p>
      <text:p text:style-name="P20"/>
      <text:p text:style-name="P21"/>
      <text:p text:style-name="P22"/>
      <text:p text:style-name="P23">Исполнитель</text:p>
      <text:p text:style-name="P24"><text:span text:style-name="T25">студент 1 курса 2 группы</text:span><text:span text:style-name="T26"><text:tab/></text:span><text:span text:style-name="T27"><text:s text:c="16"/>______________<text:s/></text:span><text:span text:style-name="T28"><text:tab/></text:span><text:span text:style-name="T29"><text:tab/></text:span><text:span text:style-name="T30">Р</text:span><text:span text:style-name="T31">.<text:s/></text:span><text:span text:style-name="T32">Н</text:span><text:span text:style-name="T33">.<text:s/></text:span><text:span text:style-name="T34">Круговец</text:span></text:p>
      <text:p text:style-name="P35"><text:span text:style-name="T36"><text:s text:c="69"/></text:span><text:span text:style-name="T37">подпись, дата</text:span></text:p>
      <text:p text:style-name="P38"/>
      <text:p text:style-name="P39"/>
      <text:p text:style-name="P40">Руководитель</text:p>
      <text:p text:style-name="Безинтервала"><text:span text:style-name="T41"><text:tab/><text:s text:c="34"/></text:span><text:span text:style-name="T42"><text:tab/></text:span><text:span text:style-name="T43"><text:tab/><text:s text:c="14"/>______________ <text:s text:c="16"/></text:span><text:span text:style-name="T44">А. В. Харланович</text:span></text:p>
      <text:p text:style-name="Безинтервала"><text:span text:style-name="T45">должность, учен. степень, ученое звание</text:span><text:span text:style-name="T46"><text:tab/><text:s text:c="19"/></text:span><text:span text:style-name="T47">подпись, дата</text:span></text:p>
      <text:p text:style-name="P48"/>
      <text:p text:style-name="P49"/>
      <text:p text:style-name="P50">Допущен(а) к защите <text:s/>__________________________________ <text:s/>_______________</text:p>
      <text:p text:style-name="P51"><text:s/>__________________________________ <text:s/>_______________</text:p>
      <text:p text:style-name="P52"><text:s/>__________________________________ <text:s/>_______________</text:p>
      <text:p text:style-name="P53">дата, подпись</text:p>
      <text:p text:style-name="P54"><text:span text:style-name="T55">Курсовой проект защищен с оценкой<text:s/></text:span><text:span text:style-name="T56"><text:tab/></text:span><text:span text:style-name="T57"><text:tab/></text:span><text:span text:style-name="T58"><text:tab/></text:span><text:span text:style-name="T59"><text:tab/><text:s text:c="5"/></text:span><text:span text:style-name="T60"><text:s text:c="14"/></text:span></text:p>
      <text:p text:style-name="P61"><text:span text:style-name="T62">Руководитель _______________<text:s/></text:span><text:span text:style-name="T63"><text:tab/><text:s text:c="2"/>___________</text:span><text:span text:style-name="T64"><text:tab/><text:s text:c="20"/></text:span><text:span text:style-name="T65"><text:tab/>А. В. Харланович</text:span><text:span text:style-name="T66"><text:tab/><text:s/></text:span></text:p>
      <text:p text:style-name="P67"><text:s text:c="37"/>подпись<text:span text:style-name="T68"><text:tab/></text:span>дата<text:span text:style-name="T69"><text:tab/></text:span><text:span text:style-name="T70"><text:tab/></text:span><text:span text:style-name="T71"><text:tab/></text:span>инициалы и фамилия</text:p>
      <text:p text:style-name="P72"/>
      <text:p text:style-name="P73"/>
      <text:p text:style-name="P74"/>
      <text:p text:style-name="P75"/>
      <text:p text:style-name="P76">Минск 2026</text:p>
      <text:p text:style-name="P77"/>
      <text:p text:style-name="P78"><text:span text:style-name="T79">ЗАДАНИЕ</text:span></text:p>
      <text:p text:style-name="P80">на<text:s/>курсовое проектирование</text:p>
      <text:p text:style-name="P81"><text:span text:style-name="T82">по дисциплине</text:span><text:span text:style-name="T83"><text:s/></text:span><text:span text:style-name="T84">«Компьютерные языки разметки»</text:span></text:p>
      <text:p text:style-name="P85"><text:span text:style-name="T86">Курс 1 Группа: 2 Специальность:<text:s/></text:span><text:span text:style-name="T87">6-05-0611-01<text:s/></text:span><text:span text:style-name="T88">Информационные системы и технологии</text:span></text:p>
      <text:p text:style-name="P89"><text:span text:style-name="T90">Студент:<text:s/></text:span><text:span text:style-name="T91">Круговец Руслан Николаевич</text:span></text:p>
      <text:p text:style-name="P92"><text:span text:style-name="T93">1. Тема:<text:s/></text:span><text:span text:style-name="T94">Веб-сайт</text:span><text:span text:style-name="T95"><text:s/></text:span><text:span text:style-name="T96">«Персональный веб-сайт фотографа»</text:span><text:span text:style-name="T97"><text:s/></text:span></text:p>
      <text:p text:style-name="P98"><text:span text:style-name="T99">2. Срок выполнения</text:span><text:span text:style-name="T100"><text:s/>курсового проекта</text:span><text:span text:style-name="T101">: с<text:s/></text:span><text:span text:style-name="T102">10</text:span><text:span text:style-name="T103"><text:s/>февраля 2026 г. по 0</text:span><text:span text:style-name="T104">6</text:span><text:span text:style-name="T105"><text:s/>мая 2026 г.</text:span></text:p>
      <text:p text:style-name="P106"><text:span text:style-name="T107">3. Технические требования<text:s/></text:span><text:span text:style-name="T108">:</text:span></text:p>
      <text:p text:style-name="P109"><text:span text:style-name="T110">3.1 Прототип веб-сайта должен быть разработан с использованием графических редакторов<text:s/></text:span><text:span text:style-name="T111">Figma</text:span><text:span text:style-name="T112">/</text:span><text:span text:style-name="T113">Adobe</text:span><text:span text:style-name="T114"><text:s/></text:span><text:span text:style-name="T115">XD</text:span><text:span text:style-name="T116">/</text:span><text:span text:style-name="T117">Sketch</text:span><text:span text:style-name="T118">.</text:span></text:p>
      <text:p text:style-name="P119">3.2 Для хранения данных должен быть использован<text:s/>XML-формат.</text:p>
      <text:p text:style-name="P120">3.3 Разметка содержания сайта должна быть выполнена с применением HTML5 и XML.</text:p>
      <text:p text:style-name="P121"><text:span text:style-name="T122">3.4 Для описания внешнего вида веб-страниц использовать S</text:span><text:span text:style-name="T123">CSS</text:span><text:span text:style-name="T124"><text:s/>и CSS3.</text:span></text:p>
      <text:p text:style-name="P125">3.5 Веб-сайт должен содержать:</text:p>
      <text:p text:style-name="P126">– семантические теги HTML5;</text:p>
      <text:p text:style-name="P127">– графические элементы в форме SVG;</text:p>
      <text:p text:style-name="P128">–<text:s/>несколько веб-страниц;</text:p>
      <text:p text:style-name="P129"><text:span text:style-name="T130">–<text:s/></text:span><text:span text:style-name="T131">JavaScript</text:span><text:span text:style-name="T132"><text:s/>для управления элементами<text:s/></text:span><text:span text:style-name="T133">DOM</text:span><text:span text:style-name="T134">.</text:span></text:p>
      <text:p text:style-name="P135">3.6 Верстка сайта должна быть адаптивной и кроссбраузерной;</text:p>
      <text:p text:style-name="P136"><text:span text:style-name="T137">3.7<text:s/></text:span><text:span text:style-name="T138">Для</text:span><text:span text:style-name="T139"><text:s/></text:span><text:span text:style-name="T140">тестирования</text:span><text:span text:style-name="T141"><text:s/></text:span><text:span text:style-name="T142">использовать</text:span><text:span text:style-name="T143"><text:s/>The W3C Markup Validation Service/Git Super Linter</text:span></text:p>
      <text:p text:style-name="P144"><text:span text:style-name="T145">3.8 Проект и пояснения к проекту<text:s/></text:span><text:span text:style-name="T146">должны быть размещены на GitHub.</text:span></text:p>
      <text:p text:style-name="P147">4. Содержание пояснительной записки</text:p>
      <text:p text:style-name="P148">1. Титульный лист;</text:p>
      <text:p text:style-name="P149"><text:span text:style-name="T150">2. Задание на курсовое проектирование;</text:span></text:p>
      <text:p text:style-name="P151">3. Введение;</text:p>
      <text:p text:style-name="P152">4. Постановка задачи;</text:p>
      <text:p text:style-name="P153">5. Проектирование веб-сайта</text:p>
      <text:p text:style-name="P154">6. Реализация структуры веб-сайта</text:p>
      <text:p text:style-name="P155">7. Тестирование веб-сайта</text:p>
      <text:p text:style-name="P156">8. Заключение</text:p>
      <text:p text:style-name="P157">9. Список использованных источников</text:p>
      <text:p text:style-name="P158">10. Приложения (полный исходный текст программы разработанного приложения с подробными комментариями)</text:p>
      <text:h text:style-name="P159" text:outline-level="1"><text:span text:style-name="T160">5. Форма представления на<text:s/></text:span><text:span text:style-name="T161">GitHub</text:span><text:span text:style-name="T162"><text:s/>выполненного курсового проекта:</text:span></text:h>
      <text:p text:style-name="P163">– Теоретическая часть<text:s/>пояснительной записки курсового проекта должна быть представлена в формате MS Word.<text:s/></text:p>
      <text:p text:style-name="P164">– Оформление записки должно быть согласно правилам.</text:p>
      <text:p text:style-name="P165">– Листинги представляются в приложении.</text:p>
      <text:p text:style-name="P166"/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№ п/п</text:p>
          </table:table-cell>
          <table:table-cell table:style-name="TableCell174">
            <text:p text:style-name="P175">Наименование этапов курсового проекта</text:p>
          </table:table-cell>
          <table:table-cell table:style-name="TableCell176">
            <text:p text:style-name="P177">Срок выполнения этапов проекта</text:p>
          </table:table-cell>
        </table:table-row>
        <table:table-row table:style-name="TableRow178">
          <table:table-cell table:style-name="TableCell179">
            <text:p text:style-name="P180">1</text:p>
          </table:table-cell>
          <table:table-cell table:style-name="TableCell181">
            <text:p text:style-name="P182">Задание на курсовое проектирование. Титульный лист</text:p>
          </table:table-cell>
          <table:table-cell table:style-name="TableCell183">
            <text:p text:style-name="P184"><text:span text:style-name="T185">05</text:span><text:span text:style-name="T186">.02.202</text:span><text:span text:style-name="T187">6</text:span></text:p>
          </table:table-cell>
        </table:table-row>
        <table:table-row table:style-name="TableRow188">
          <table:table-cell table:style-name="TableCell189">
            <text:p text:style-name="P190"><text:span text:style-name="T191">2</text:span></text:p>
          </table:table-cell>
          <table:table-cell table:style-name="TableCell192">
            <text:p text:style-name="P193">Введение. Постановка задачи</text:p>
          </table:table-cell>
          <table:table-cell table:style-name="TableCell194">
            <text:p text:style-name="P195"><text:span text:style-name="T196">20.02.202</text:span><text:span text:style-name="T197">6</text:span></text:p>
          </table:table-cell>
        </table:table-row>
        <table:table-row table:style-name="TableRow198">
          <table:table-cell table:style-name="TableCell199">
            <text:p text:style-name="P200"><text:span text:style-name="T201">3</text:span></text:p>
          </table:table-cell>
          <table:table-cell table:style-name="TableCell202">
            <text:p text:style-name="P203">Проектирование веб-сайта</text:p>
          </table:table-cell>
          <table:table-cell table:style-name="TableCell204">
            <text:p text:style-name="P205"><text:span text:style-name="T206">04</text:span><text:span text:style-name="T207">.0</text:span><text:span text:style-name="T208">3</text:span><text:span text:style-name="T209">.202</text:span><text:span text:style-name="T210">6</text:span></text:p>
          </table:table-cell>
        </table:table-row>
        <table:table-row table:style-name="TableRow211">
          <table:table-cell table:style-name="TableCell212">
            <text:p text:style-name="P213"><text:span text:style-name="T214">4</text:span></text:p>
          </table:table-cell>
          <table:table-cell table:style-name="TableCell215">
            <text:p text:style-name="P216"><text:span text:style-name="T217">Реализация структуры веб-сайта на<text:s/></text:span><text:span text:style-name="T218">HTML</text:span><text:span text:style-name="T219">5 и внешнего оформления на<text:s/></text:span><text:span text:style-name="T220">SCSS</text:span><text:span text:style-name="T221"><text:s/>и С</text:span><text:span text:style-name="T222">SS</text:span><text:span text:style-name="T223">3</text:span></text:p>
          </table:table-cell>
          <table:table-cell table:style-name="TableCell224">
            <text:p text:style-name="P225"><text:span text:style-name="T226">18</text:span><text:span text:style-name="T227">.03.202</text:span><text:span text:style-name="T228">6</text:span></text:p>
          </table:table-cell>
        </table:table-row>
        <table:table-row table:style-name="TableRow229">
          <table:table-cell table:style-name="TableCell230">
            <text:p text:style-name="P231"><text:span text:style-name="T232">5</text:span></text:p>
          </table:table-cell>
          <table:table-cell table:style-name="TableCell233">
            <text:p text:style-name="P234">Тестирование веб-сайта</text:p>
          </table:table-cell>
          <table:table-cell table:style-name="TableCell235">
            <text:p text:style-name="P236"><text:span text:style-name="T237">1</text:span><text:span text:style-name="T238">5</text:span><text:span text:style-name="T239">.04.202</text:span><text:span text:style-name="T240">6</text:span></text:p>
          </table:table-cell>
        </table:table-row>
        <table:table-row table:style-name="TableRow241">
          <table:table-cell table:style-name="TableCell242">
            <text:p text:style-name="P243"><text:span text:style-name="T244">6</text:span></text:p>
          </table:table-cell>
          <table:table-cell table:style-name="TableCell245">
            <text:p text:style-name="P246">Заключение</text:p>
          </table:table-cell>
          <table:table-cell table:style-name="TableCell247">
            <text:p text:style-name="P248"><text:span text:style-name="T249">2</text:span><text:span text:style-name="T250">3</text:span><text:span text:style-name="T251">.04.202</text:span><text:span text:style-name="T252">6</text:span></text:p>
          </table:table-cell>
        </table:table-row>
        <table:table-row table:style-name="TableRow253">
          <table:table-cell table:style-name="TableCell254">
            <text:p text:style-name="P255"><text:span text:style-name="T256">7</text:span></text:p>
          </table:table-cell>
          <table:table-cell table:style-name="TableCell257">
            <text:p text:style-name="P258">Список использованных литературных источников. Приложения</text:p>
          </table:table-cell>
          <table:table-cell table:style-name="TableCell259">
            <text:p text:style-name="P260"><text:span text:style-name="T261">25</text:span><text:span text:style-name="T262">.04.202</text:span><text:span text:style-name="T263">6</text:span></text:p>
          </table:table-cell>
        </table:table-row>
        <table:table-row table:style-name="TableRow264">
          <table:table-cell table:style-name="TableCell265">
            <text:p text:style-name="P266"><text:span text:style-name="T267">6</text:span></text:p>
          </table:table-cell>
          <table:table-cell table:style-name="TableCell268">
            <text:p text:style-name="P269">Подготовка и оформление пояснительной записки курсового проекта</text:p>
          </table:table-cell>
          <table:table-cell table:style-name="TableCell270">
            <text:p text:style-name="P271"><text:span text:style-name="T272">30</text:span><text:span text:style-name="T273">.04.202</text:span><text:span text:style-name="T274">6</text:span></text:p>
          </table:table-cell>
        </table:table-row>
        <table:table-row table:style-name="TableRow275">
          <table:table-cell table:style-name="TableCell276">
            <text:p text:style-name="P277"><text:span text:style-name="T278">7</text:span></text:p>
          </table:table-cell>
          <table:table-cell table:style-name="TableCell279">
            <text:p text:style-name="P280"><text:span text:style-name="T281">Сдача<text:s/></text:span><text:span text:style-name="T282">на допуск к защите</text:span><text:span text:style-name="T283"><text:s/>курсового<text:s/></text:span><text:span text:style-name="T284">проекта</text:span></text:p>
          </table:table-cell>
          <table:table-cell table:style-name="TableCell285">
            <text:p text:style-name="P286"><text:span text:style-name="T287">0</text:span><text:span text:style-name="T288">6</text:span><text:span text:style-name="T289">.05.202</text:span><text:span text:style-name="T290">6</text:span></text:p>
          </table:table-cell>
        </table:table-row>
        <table:table-row table:style-name="TableRow291">
          <table:table-cell table:style-name="TableCell292">
            <text:p text:style-name="P293">8</text:p>
          </table:table-cell>
          <table:table-cell table:style-name="TableCell294">
            <text:p text:style-name="P295">Защита курсового проекта</text:p>
          </table:table-cell>
          <table:table-cell table:style-name="TableCell296">
            <text:p text:style-name="P297">13.05-25.05.2026</text:p>
          </table:table-cell>
        </table:table-row>
      </table:table>
      <text:h text:style-name="P298" text:outline-level="4"><text:span text:style-name="T299">Календарный план</text:span></text:h>
      <text:p text:style-name="P300"/>
      <text:h text:style-name="P301" text:outline-level="1"><text:span text:style-name="T302">5. Дата выдачи задания<text:s/></text:span><text:span text:style-name="T303">«</text:span><text:span text:style-name="T304">10</text:span><text:span text:style-name="T305">» февраля 202</text:span><text:span text:style-name="T306">6</text:span><text:span text:style-name="T307"><text:s/>г.</text:span></text:h>
      <text:p text:style-name="P308">Руководитель<text:tab/><text:tab/>__________________<text:tab/><text:s text:c="5"/>Харланович А.В.</text:p>
      <text:p text:style-name="P309">(подпись)<text:s/><text:tab/><text:tab/><text:tab/><text:tab/></text:p>
      <text:h text:style-name="P310" text:outline-level="1">Задание принял к исполнению<text:s/>_______________________</text:h>
      <text:p text:style-name="P311"><text:span text:style-name="T312">(дата и подпись студента)</text:span></text:p>
      <text:p text:style-name="P313"/>
      <text:p text:style-name="P314"><text:span text:style-name="T315">СОДЕРЖАНИЕ</text:span></text:p>
      <text:p text:style-name="P316"/>
      <text:p text:style-name="P317"><text:span text:style-name="T318">Введение <text:s/></text:span><text:span text:style-name="T319"><text:tab/>5</text:span><text:span text:style-name="T320"><text:line-break/></text:span><text:span text:style-name="T321">1 Постановка задачи</text:span><text:span text:style-name="T322"><text:tab/></text:span><text:span text:style-name="T323">7</text:span><text:span text:style-name="T324"><text:line-break/></text:span><text:span text:style-name="T325">1.1 Техническое задание</text:span><text:span text:style-name="T326"><text:tab/><text:s/></text:span><text:span text:style-name="T327">8</text:span><text:span text:style-name="T328"><text:line-break/></text:span><text:span text:style-name="T329">1.2 Выбор средств реализации программного продукта<text:s/></text:span><text:span text:style-name="T330"><text:tab/><text:s/></text:span><text:span text:style-name="T331">9</text:span><text:span text:style-name="T332"><text:line-break/></text:span><text:span text:style-name="T333">1.3 Выводы<text:s/></text:span><text:span text:style-name="T334"><text:tab/></text:span><text:span text:style-name="T335">11</text:span><text:span text:style-name="T336"><text:line-break/></text:span><text:span text:style-name="T337">2 Проектирование страниц веб-сайта </text:span><text:span text:style-name="T338"><text:tab/>1</text:span><text:span text:style-name="T339">2</text:span></text:p>
      <text:p text:style-name="P340"><text:span text:style-name="T341">2.1 Обзор аналогичных<text:s/></text:span><text:span text:style-name="T342">решений</text:span><text:span text:style-name="T343"><text:tab/>1</text:span><text:span text:style-name="T344">3</text:span><text:span text:style-name="T345"><text:line-break/></text:span><text:span text:style-name="T346">2.2 Разработка и создание прототипа<text:s/></text:span><text:span text:style-name="T347"><text:tab/>1</text:span><text:span text:style-name="T348">6</text:span><text:span text:style-name="T349"><text:line-break/></text:span><text:span text:style-name="T350">3 Реализация структуры веб-сайта </text:span><text:span text:style-name="T351"><text:tab/></text:span><text:span text:style-name="T352">17</text:span><text:span text:style-name="T353"><text:line-break/></text:span><text:span text:style-name="T354">3.1 Структура HTML-документа<text:s/></text:span><text:span text:style-name="T355"><text:tab/></text:span><text:span text:style-name="T356">17</text:span><text:span text:style-name="T357"><text:line-break/></text:span><text:span text:style-name="T358">3.2 Добавление таблиц стилей SCSS и CSS</text:span><text:span text:style-name="T359"><text:s/></text:span><text:span text:style-name="T360"><text:tab/>22</text:span><text:span text:style-name="T361"><text:line-break/></text:span><text:span text:style-name="T362">3.3 Использование стандартов XML (SVG)<text:s/></text:span><text:span text:style-name="T363"><text:tab/></text:span><text:span text:style-name="T364">26</text:span><text:span text:style-name="T365"><text:line-break/></text:span><text:span text:style-name="T366">3.4 Управление элементами DOM<text:s/></text:span><text:span text:style-name="T367"><text:tab/></text:span><text:span text:style-name="T368">29</text:span><text:span text:style-name="T369"><text:line-break/></text:span><text:span text:style-name="T370">4 Тестирование</text:span><text:span text:style-name="T371"><text:s/>веб-сайта </text:span><text:span text:style-name="T372"><text:tab/></text:span><text:span text:style-name="T373">32</text:span><text:span text:style-name="T374"><text:line-break/></text:span><text:span text:style-name="T375">4.1 Адаптивный дизайн веб-сайта<text:s/></text:span><text:span text:style-name="T376"><text:tab/></text:span><text:span text:style-name="T377">32</text:span><text:span text:style-name="T378"><text:line-break/></text:span><text:span text:style-name="T379">4.2 Кроссбраузерность веб-сайта<text:s/></text:span><text:span text:style-name="T380"><text:tab/></text:span><text:span text:style-name="T381">33</text:span><text:span text:style-name="T382"><text:line-break/></text:span><text:span text:style-name="T383">4.3 Руководство пользователя<text:s/></text:span><text:span text:style-name="T384"><text:tab/></text:span><text:span text:style-name="T385">34</text:span><text:span text:style-name="T386"><text:line-break/></text:span><text:span text:style-name="T387">Заключение </text:span><text:span text:style-name="T388"><text:tab/></text:span><text:span text:style-name="T389">36</text:span><text:span text:style-name="T390"><text:line-break/></text:span><text:span text:style-name="T391">Список использованных литературных источников </text:span><text:span text:style-name="T392"><text:tab/>3</text:span><text:span text:style-name="T393">7</text:span><text:span text:style-name="T394"><text:line-break/></text:span><text:span text:style-name="T395">Приложение А Прототипы веб-страниц </text:span><text:span text:style-name="T396"><text:tab/>3</text:span><text:span text:style-name="T397">8</text:span><text:span text:style-name="T398"><text:line-break/></text:span><text:span text:style-name="T399">Приложение Б Макет структуры веб</text:span><text:span text:style-name="T400">-сайта </text:span><text:span text:style-name="T401"><text:tab/></text:span><text:span text:style-name="T402">42</text:span><text:span text:style-name="T403"><text:line-break/></text:span><text:span text:style-name="T404">Приложение В Листинг HTML-документа </text:span><text:span text:style-name="T405"><text:tab/></text:span><text:span text:style-name="T406">43</text:span><text:span text:style-name="T407"><text:line-break/></text:span><text:span text:style-name="T408">Приложение Г Листинг SCSS и CSS </text:span><text:span text:style-name="T409"><text:tab/></text:span><text:span text:style-name="T410">68</text:span><text:span text:style-name="T411"><text:line-break/></text:span><text:span text:style-name="T412">Приложение Д Листинг XML-файлов<text:s/></text:span><text:span text:style-name="T413"><text:tab/></text:span><text:span text:style-name="T414">91</text:span><text:span text:style-name="T415"><text:line-break/></text:span><text:span text:style-name="T416">Приложение Е Листинг SVG </text:span><text:span text:style-name="T417"><text:tab/></text:span><text:span text:style-name="T418">92</text:span><text:span text:style-name="T419"><text:line-break/></text:span><text:span text:style-name="T420">Приложение Ж Листинг JavaScript </text:span><text:span text:style-name="T421"><text:tab/></text:span><text:span text:style-name="T422">93</text:span></text:p>
      <text:section text:name="Sect3" text:style-name="S3">
        <text:p text:style-name="P423"/>
      </text:section>
      <text:h text:style-name="P424" text:outline-level="1">Введение</text:h>
      <text:p text:style-name="P427"/>
      <text:p text:style-name="P428">Персональный веб-сайт фотографа сегодня — это не<text:s/>просто виртуальная галерея работ, а основной инструмент взаимодействия с потенциальными клиентами, формирования профессионального имиджа и демонстрации уникального авторского стиля. От того, насколько удобно и эстетично представлены снимки, насколько просто связаться с автором и получить ответы на вопросы, напрямую зависит уровень доверия к специалисту и количество заказов. Именно поэтому создание качественного персонального ресурса, отражающего философию фотографа и обеспечивающего лёгкий доступ ко всей необходимой информации, имеет высокую практическую значимость.</text:p>
      <text:p text:style-name="P429">Актуальность данной работы обусловлена тем, что в настоящее время многие фотографы используют лишь социальные сети для публикации своих работ. Это создаёт определённые ограничения: единая лента не позволяет структурировать портфолио по направлениям, потенциальный клиент вынужден искать нужные снимки среди множества других публикаций, а форма обратной связи часто отсутствует или сводится к личным сообщениям.<text:s/></text:p>
      <text:p text:style-name="P430">Разработка самостоятельного веб-сайта,<text:s/>где все данные о фотографе, примеры работ по категориям, условия сотрудничества и контакты будут собраны в одном месте и представлены в продуманном, визуально привлекательном виде, позволяет клиенту быстро оценить профессионализм автора и принять решение о<text:s/>съёмке без лишних затруднений.</text:p>
      <text:p text:style-name="P431">Целью курсового проекта является разработка персонального веб-сайта фотографа с использованием современных технологий HTML5, SCSS, XML и JavaScript.</text:p>
      <text:p text:style-name="P432">Объектом разработки является персональный веб-сайт фотографа Angelina Telpuk.</text:p>
      <text:p text:style-name="P433">Предметом разработки — технологии создания многостраничных адаптивных веб-сайтов с применением семантической разметки, каскадных таблиц стилей, векторной графики, XML-данных и клиентского программирования.</text:p>
      <text:p text:style-name="P434">Для достижения поставленной цели необходимо решить следующие задачи:</text:p>
      <text:p text:style-name="P435">– проанализировать назначение и целевую аудиторию персонального сайта фотографа;</text:p>
      <text:p text:style-name="P436">– провести обзор аналогичных веб-ресурсов фотографов, выявить их достоинства и недостатки;</text:p>
      <text:p text:style-name="P437">– разработать структуру и единый дизайн веб-сайта, включая прототипы страниц и графический макет;</text:p>
      <text:p text:style-name="P438">– создать главную страницу с приветствием, категориями съёмок и блоком для связи;</text:p>
      <text:p text:style-name="P439">– реализовать страницу портфолио с динамическим формированием обложек фотосессий на основе XML-данных;</text:p>
      <text:p text:style-name="P440">– разработать галерею для<text:s/>каждой сессии с masonry-раскладкой и лайтбоксом;</text:p>
      <text:p text:style-name="P441">– создать страницу контактов с формой обратной связи и функцией копирования номера телефона;</text:p>
      <text:p text:style-name="P442">– реализовать страницу часто задаваемых вопросов с аккордеоном;</text:p>
      <text:p text:style-name="P443">– обеспечить адаптивное отображение сайта на различных устройствах;</text:p>
      <text:p text:style-name="P444">– выполнить тестирование кроссбраузерности и валидности кода.</text:p>
      <text:p text:style-name="P445"/>
      <text:h text:style-name="Заголовок1" text:outline-level="1">1 Постановка задачи</text:h>
      <text:p text:style-name="P446"/>
      <text:p text:style-name="P447">В соответствии с заданием на курсовое проектирование, утверждённым кафедрой информационных систем и технологий, требовалось разработать персональный веб-сайт фотографа, отвечающий определённому перечню технических требований.</text:p>
      <text:p text:style-name="P448">Перед началом разработки необходимо было создать прототип будущего веб-сайта в графическом редакторе Figma. Прототип позволил визуализировать расположение элементов на страницах, продумать пользовательские сценарии и согласовать стилистику до этапа программирования.</text:p>
      <text:p text:style-name="P449">Разметка содержания всех веб-страниц должна быть выполнена с применением языка HTML5. Семантическая вёрстка подразумевает использование таких тегов, как &lt;header&gt;, &lt;nav&gt;, &lt;main&gt;, &lt;section&gt;, &lt;article&gt;, &lt;footer&gt;, которые не только структурируют документ, но и помогают поисковым системам лучше интерпретировать содержимое страницы.</text:p>
      <text:p text:style-name="P450">Также в рамках проекта необходимо было продемонстрировать умение работать с форматом XML применительно к хранению данных. Вся текстовая и конфигурационная информация (приветствие, контакты, описание категорий, вопросы и ответы, перечень фотосессий с путями к изображениям) вынесена в отдельные XML-файлы, что упрощает обновление контента без вмешательства<text:s/>в код страниц.</text:p>
      <text:p text:style-name="P451">Для описания внешнего вида всех веб-страниц следовало использовать препроцессор SCSS в сочетании с традиционным CSS3, что позволяет сделать код стилей более организованным, модульным и удобным для последующего сопровождения. SCSS-переменные,<text:s/>вложенность и компактный синтаксис ускоряют разработку и повышают читаемость.</text:p>
      <text:p text:style-name="P452">Сам веб-сайт должен включать в себя несколько страниц, связанных единой системой навигации, а также содержать интерактивные элементы, реализованные с помощью JavaScript. К таким<text:s/>элементам относятся мобильное меню с гамбургером, аккордеон часто задаваемых вопросов, лайтбокс для просмотра фотографий, masonry-галерея, динамическая подгрузка карточек портфолио из XML, функция копирования номера телефона в буфер обмена и форма обратной связи с мгновенной отправкой сообщения.</text:p>
      <text:p text:style-name="P453">Вёрстка всех страниц должна быть выполнена в адаптивном и кроссбраузерном стиле. Это гарантирует корректное отображение портала как на различных устройствах (персональных компьютерах, планшетах и мобильных телефонах), так и в наиболее популярных браузерах: Google Chrome, Mozilla Firefox, Safari, Microsoft Edge.</text:p>
      <text:p text:style-name="P454">Для тестирования разработанного веб-сайта требуется использование официального сервиса валидации Консорциума W3C, позволяющего подтвердить соответствие кода<text:s/>современным стандартам. Все материалы проекта, включая исходный код и пояснительную записку, должны быть размещены в репозитории на платформе GitHub.</text:p>
      <text:p text:style-name="P455"/>
      <text:h text:style-name="Заголовок2" text:outline-level="2">1.1 Веб-сайт аналог «Фотограф Бишкек»</text:h>
      <text:p text:style-name="P456"/>
      <text:p text:style-name="P457">Перед началом проектирования был проведён анализ существующих веб-сайтов фотографов, представленных в открытом доступе. Основное внимание уделялось структуре портфолио, способам навигации, оформлению контактной информации и подаче визуального контента.</text:p>
      <text:p text:style-name="P458">Сайт фотографа Изата Мадылбекова<text:s/>(izatmad.wfolio.pro)</text:p>
      <text:p text:style-name="P459">В качестве основного референса для анализа был выбран персональный сайт фотографа Изата Мадылбекова (Рисунок 1.1). Данный ресурс представляет собой лаконичное портфолио, построенное на платформе wfolio, и послужил отправной точкой при<text:s/>формировании структуры и визуальной концепции разрабатываемого веб-сайта.</text:p>
      <text:p text:style-name="P460">В ходе анализа были выделены следующие решения:</text:p>
      <text:p text:style-name="P461">Информационная архитектура и навигация. Сайт демонстрирует предельно простую иерархическую структуру. На главной странице размещены имя фотографа, краткий слоган и три карточки-категории: «Свадьбы», «Семейная», «Портреты». Каждая карточка содержит фотографию-обложку, название направления и краткое описание с призывом перейти по ссылке. Подобная логика построения навигации была принята за<text:s/>основу при разработке проектируемого сайта, так как она интуитивно понятна целевой аудитории и позволяет за один клик попасть в нужный раздел портфолио.</text:p>
      <text:p text:style-name="P462">Компоновка контента и подача портфолио. Категории на сайте-аналоге представлены в виде плиточного интерфейса с крупными изображениями. В рамках курсового проекта данная структура была модернизирована: вместо трёх статичных карточек реализована динамическая сетка фотосессий, загружаемая из XML-файла, что позволяет легко добавлять новые работы без редактирования HTML-кода.</text:p>
      <text:p text:style-name="P463">Блок часто задаваемых вопросов. Сайт содержит развёрнутый раздел FAQ, где фотограф отвечает на типичные вопросы: опыт работы, способы бронирования, количество обработанных фотографий, дополнительные услуги, процесс обработки. Данный подход<text:s/>был полностью перенят и реализован в проекте в виде аккордеона, наполняемого из XML, что обеспечивает удобство восприятия и экономию пространства на странице.</text:p>
      <text:p text:style-name="P464">Таким образом, подробный разбор структуры и функциональных возможностей сайта Изата<text:s/>Мадылбекова позволил выделить наиболее востребованные пользователями элементы и адаптировать их под современные технические стандарты HTML5 и CSS3.</text:p>
      <text:p text:style-name="Обычный"><text:span text:style-name="T465"><draw:frame draw:style-name="a0" draw:name="Рисунок 1" text:anchor-type="as-char" svg:x="0in" svg:y="0in" svg:width="6.69236in" svg:height="3.3125in" style:rel-width="scale" style:rel-height="scale"><draw:image xlink:href="media/image1.png" xlink:type="simple" xlink:show="embed" xlink:actuate="onLoad"/><svg:title/><svg:desc/></draw:frame></text:span></text:p>
      <text:p text:style-name="P466">Рисунок 1.1 – Фотограф Изат Мадылбеков — Веб-сайт https://izatmad.wfolio.pro/</text:p>
      <text:h text:style-name="Заголовок2" text:outline-level="2">1.2 Веб-сайт аналог «Ева Русина – свадебный<text:s/><text:span text:style-name="T467">love</text:span><text:s/><text:span text:style-name="T468">story</text:span><text:s/>фотограф»</text:h>
      <text:p text:style-name="P469"/>
      <text:p text:style-name="P470">Сайт фотографа Евы Русиной (rusinaeva.ru)</text:p>
      <text:p text:style-name="P471">Вторым объектом анализа стал персональный сайт фотографа Евы Русиной (Рисунок 1.2). Если первый ресурс рассматривался с точки зрения общей структуры и функциональных блоков, то<text:s/>данный сайт послужил прототипом для детальной проработки визуального оформления и навигационных элементов.</text:p>
      <text:p text:style-name="P472">В ходе исследования были выделены и адаптированы для проекта следующие решения:</text:p>
      <text:p text:style-name="P473">Визуальная концепция и типографика. Сайт выполнен в мягкой нейтральной гамме с акцентом на крупные фотографии. Используется сочетание элегантного шрифта с засечками для заголовков и простого гротеска для навигации. Этот принцип был реализован в разрабатываемом проекте через подключение шрифтов Cormorant Garamond и Montserrat, что создаёт схожую атмосферу утончённости и профессионализма.</text:p>
      <text:p text:style-name="P474">Способ связи с фотографом. На сайте-аналоге контактная информация представлена в виде удобных кнопок-ссылок на мессенджеры и социальные сети, а также формы обратной связи. Данное решение было адаптировано в проекте: реализованы кнопки-пилюли для Telegram, Instagram и почты, а на странице контактов добавлена форма с отправкой сообщения напрямую на электронную почту фотографа.</text:p>
      <text:p text:style-name="P475">Адаптивность и мобильное меню. Сайт rusinaeva.ru корректно отображается на мобильных устройствах, используя компактное меню и вертикальное расположение элементов. Этот подход был учтён при разработке адаптивной вёрстки проектируемого сайта: на разрешениях менее 720 пикселей навигация трансформируется в гамбургер-меню, а сетки перестраиваются в одну колонку.</text:p>
      <text:p text:style-name="P476">Таким образом, анализ двух референсных сайтов позволил объединить лучшие решения: простую и понятную архитектуру, визуально привлекательную подачу портфолио, удобные каналы связи и адаптивное поведение интерфейса. Эти принципы легли в основу проектирования персонального веб-сайта фотографа Angelina Telpuk.</text:p>
      <text:p text:style-name="P477"/>
      <text:p text:style-name="Обычный"><text:span text:style-name="T478"><draw:frame draw:style-name="a1" draw:name="Рисунок 11" text:anchor-type="as-char" svg:x="0in" svg:y="0in" svg:width="6.69236in" svg:height="3.36528in" style:rel-width="scale" style:rel-height="scale"><draw:image xlink:href="media/image2.png" xlink:type="simple" xlink:show="embed" xlink:actuate="onLoad"/><svg:title/><svg:desc/></draw:frame></text:span></text:p>
      <text:p text:style-name="P479">Рисунок 1.2 – Фотограф Анастасия Русинаева — Веб-сайт https://rusinaeva.ru/</text:p>
      <text:h text:style-name="Заголовок2" text:outline-level="2">1.3 Техническое задание</text:h>
      <text:p text:style-name="P480"/>
      <text:p text:style-name="P481">Основной целью проекта является создание персонального веб-ресурса фотографа, обеспечивающего эффектную демонстрацию портфолио, информирование о направлениях съёмок и простой способ связи с автором.</text:p>
      <text:p text:style-name="P482">Веб-сайт должен иметь многостраничную структуру, включающую главную страницу с приветственным текстом и<text:s/>категориями съёмок, интерактивное портфолио с обложками фотосессий, динамическую галерею с возможностью увеличения снимков в лайтбоксе, страницу контактов с формой обратной связи и копированием номера телефона, а также раздел часто задаваемых вопросов, оформленный в виде аккордеона.</text:p>
      <text:p text:style-name="P483">Технические требования к разработке включают обязательное использование семантической вёрстки на базе стандарта HTML5 для обеспечения логической структуры и поисковой оптимизации. Интерфейс сайта должен обладать свойствами адаптивности и кроссбраузерности, гарантируя корректное отображение в современных браузерах (Google Chrome, Mozilla Firefox, Safari, Microsoft Edge) и на различных устройствах (персональные компьютеры, планшеты, мобильные телефоны).</text:p>
      <text:p text:style-name="P484">Для хранения данных предписывается использование формата XML. В отдельных файлах (site.xml, portfolio.xml) размещаются текстовое наполнение страниц, контактная информация, перечень вопросов и ответов, а также структура фотосессий со ссылками на изображения. Это позволяет изменять контент сайта без редактирования HTML-кода.</text:p>
      <text:p text:style-name="P485">Интерактивность элементов интерфейса должна обеспечиваться на языке JavaScript через управление объектной моделью документа. К интерактивным компонентам относятся: открытие/закрытие мобильного меню, динамическое формирование карточек портфолио и masonry-галереи на основе XML, работа лайтбокса с навигацией, функционирование аккордеона, копирование номера телефона в буфер обмена и отправка контактной формы.</text:p>
      <text:p text:style-name="P486">Визуальное оформление необходимо реализовать с помощью препроцессора SCSS, что позволит создать модульную архитектуру стилей и обеспечит удобство последующего сопровождения проекта. SCSS используется для определения переменных цвета, шрифтов, отступов и для вложенной записи правил, что делает код стилей более организованным и читаемым.</text:p>
      <text:p text:style-name="P487">Готовый проект, включая исходный код и пояснительную записку, должен быть размещён в репозитории на платформе GitHub.</text:p>
      <text:p text:style-name="P488"/>
      <text:h text:style-name="Заголовок2" text:outline-level="2">1.4 Выбор средств реализации программного продукта</text:h>
      <text:p text:style-name="P489"/>
      <text:p text:style-name="P490">Для реализации задач, определённых техническим заданием, был<text:s/>выбран современный набор технологий, обеспечивающий высокую производительность, масштабируемость и кроссплатформенность веб-приложения. На этапе проектирования интерфейса выбор был сделан в пользу графического редактора Figma, который позволяет создавать высокоточные интерактивные прототипы и детально прорабатывать пользовательский опыт до начала этапа программирования.</text:p>
      <text:p text:style-name="P491">В качестве базового языка разметки выбран стандарт HTML5, предоставляющий инструменты для создания семантически корректной структуры документа, что критически важно для обеспечения доступности информации и корректной индексации сайта поисковыми системами. Семантические теги, такие как &lt;header&gt;, &lt;nav&gt;, &lt;main&gt;, &lt;section&gt;, &lt;article&gt;, &lt;footer&gt;, формируют чёткую логическую структуру каждой страницы.</text:p>
      <text:p text:style-name="P492">Для управления визуальным представлением и разработки адаптивной сетки сайта применён препроцессор SCSS в связке с CSS3. Данный выбор обоснован возможностью использования переменных, вложенных правил и компактного синтаксиса, что значительно упрощает поддержку кода стилей и позволяет централизованно управлять визуальной концепцией всего ресурса. SCSS-переменные хранят цветовую палитру, типографику и размеры, обеспечивая единообразие оформления.</text:p>
      <text:p text:style-name="P493">Логика интерактивного взаимодействия и динамическое манипулирование элементами страницы реализованы на языке программирования JavaScript. Использование JavaScript позволяет обрабатывать пользовательские события и изменять объектную модель документа без перезагрузки страниц, повышая общую отзывчивость интерфейса. С<text:s/>помощью JavaScript реализованы мобильное меню-гамбургер, аккордеон часто задаваемых вопросов, лайтбокс для просмотра фотографий, masonry-галерея, динамическая подгрузка карточек портфолио, функция копирования номера телефона и отправка контактной формы.</text:p>
      <text:p text:style-name="P494">Для хранения и структурирования информационного контента применён формат XML, который выступает в роли облегчённой и независимой базы данных, обеспечивая удобство обмена сведениями между различными программными модулями. Вся текстовая информация (приветствие, контакты, описание категорий, перечень вопросов и ответов) вынесена в файл site.xml, а данные о фотосессиях и путях к изображениям — в portfolio.xml. Это позволяет обновлять содержимое сайта без редактирования HTML-кода.</text:p>
      <text:p text:style-name="P495">Графические элементы в виде иконок выполнены в формате SVG, который обеспечивает масштабируемость без потери качества и малый размер файлов. Иконки камеры, почты, мессенджеров и социальных сетей встроены непосредственно в разметку или подключены как внешние ресурсы, что полностью соответствует требованиям задания.</text:p>
      <text:p text:style-name="P496">В качестве среды разработки использован текстовый редактор Visual Studio Code, обладающий широким набором инструментов для отладки и проверки качества кода. Весь цикл разработки сопровождается применением системы контроля версий<text:s/>Git с публикацией исходного кода в репозитории на платформе GitHub, что гарантирует сохранность данных и прозрачность процесса внесения изменений.</text:p>
      <text:p text:style-name="P497">Выбранный технологический стек полностью соответствует актуальным отраслевым стандартам и позволяет реализовать функциональный, эстетически выверенный и технически надёжный персональный веб-сайт фотографа.</text:p>
      <text:p text:style-name="P498"/>
      <text:h text:style-name="Заголовок2" text:outline-level="2">1.5 Выводы</text:h>
      <text:p text:style-name="P499"/>
      <text:p text:style-name="P500">На основании проведённого предпроектного исследования и анализа предметной области можно сделать вывод о высокой актуальности разработки персонального веб-сайта фотографа. Изучение двух референсных ресурсов — сайта Изата Мадылбекова (izatmad.wfolio.pro) и сайта Евы Русиной (rusinaeva.ru) — позволило выявить наиболее эффективные навигационные и визуальные решения: минималистичную архитектуру с карточками-категориями, плиточную подачу портфолио, раздел часто задаваемых вопросов в формате аккордеона, мягкую нейтральную цветовую гамму, контрастное сочетание шрифтов с засечками и без, а также удобные способы связи через кнопки-пилюли и форму обратной связи. Перечисленные элементы были адаптированы и заложены в основу проектирования интерфейса разрабатываемого сайта.</text:p>
      <text:p text:style-name="P501">Сформулированное техническое задание определило комплекс требований к функциональности, адаптивности и семантической корректности будущего ресурса, что продиктовало выбор современного стека технологий, включающего HTML5, SCSS, XML, SVG и JavaScript. Обоснованное использование данных инструментов в сочетании с предварительным прототипированием в среде Figma позволяет гарантировать создание качественного программного продукта, отвечающего актуальным стандартам веб-разработки и запросам целевой аудитории.</text:p>
      <text:p text:style-name="P502">Таким образом, теоретический этап работы завершён полной консолидацией требований и инструментов, необходимых для перехода к практической реализации структуры и функционала веб-сайта в рамках последующих этапов курсового проекта.</text:p>
      <text:p text:style-name="P503"/>
      <text:p text:style-name="P504"/>
      <text:h text:style-name="Заголовок1" text:outline-level="1"><text:span text:style-name="T505"><text:tab/>2 Проектирование страниц веб-сайта</text:span></text:h>
      <text:p text:style-name="P506"/>
      <text:p text:style-name="P507">Этап проектирования является фундаментом разработки персонального веб-сайта фотографа и направлен на создание визуальной и логической<text:s/>модели будущего ресурса. На данном этапе осуществляется переход от технических требований к конкретным графическим решениям, которые определяют удобство взаимодействия пользователя с контентом. Проектирование включает в себя построение информационной архитектуры, определение навигационных путей и разработку визуального интерфейса, который должен отражать творческий стиль и профессиональный имидж фотографа Angelina Telpuk. Основной задачей проектирования является создание интуитивно понятной среды, где потенциальные клиенты смогут быстро ознакомиться с портфолио, направлениями съёмок и способами связи.</text:p>
      <text:p text:style-name="P508">Информационная архитектура веб-сайта строится на принципе иерархической организации контента. В основании архитектуры находится главная страница, которая выполняет роль презентационного хаба. От главной страницы отходят четыре ключевых раздела: «Портфолио», «Галерея», «Контакты» и «Вопросы». Раздел «Портфолио» содержит обложки фотосессий, каждая из которых ведёт на страницу с детальной галереей снимков. Такая структура обеспечивает глубину навигации не более двух кликов от главной страницы до целевого изображения, что признаётся эргономическим оптимумом для визуальных портфолио. Прототип веб-сайта представлен в приложении А.</text:p>
      <text:p text:style-name="P509"/>
      <text:h text:style-name="Заголовок2" text:outline-level="2">2.1 Разработка и создание прототипа</text:h>
      <text:p text:style-name="P510"/>
      <text:p text:style-name="P511">Процесс разработки прототипа персонального веб-сайта фотографа выполнялся в графическом редакторе Figma и был разделён на несколько последовательных стадий. На первом этапе была спроектирована информационная карта сайта, определяющая взаимосвязь между главной страницей и разделами портфолио, галереи, контактов и вопросов. Далее осуществлялось создание низкодетализированных каркасов (wireframes), целью которых являлось определение оптимального расположения ключевых модулей: навигационного меню, бегущей строки с фотографиями, категорий съёмок, блока для связи и футера.</text:p>
      <text:p text:style-name="P512">При переходе к созданию высокоточного интерактивного прототипа особое внимание было уделено пользовательскому интерфейсу (UI). В соответствии с требованиями технического задания была реализована сетка (Grid System), обеспечивающая упорядоченность элементов и упрощающая последующую адаптивную вёрстку. В прототипе были детально проработаны состояния активных элементов: эффекты при наведении на карточки категорий и фотосессий, раскрытие аккордеона<text:s/>в разделе вопросов, анимация кнопок-пилюль и мобильного меню.</text:p>
      <text:p text:style-name="P513"><text:span text:style-name="T514">На рисунке 2.1 представлен прототип главной страницы. В верхней части расположено минималистичное навигационное меню с логотипом-названием «ANGELINA TELPUK» и ссылками на основные разделы. Под н</text:span><text:span text:style-name="T515">им — бегущая строка из крупных фотографий, формирующая динамичный визуальный ряд и сразу погружающая посетителя в творческий стиль фотографа. Далее размещены три карточки-категории: «Детские», «Семейная» и «Портреты». Использование нейтрального светло-серо</text:span><text:span text:style-name="T516">го фона и тонких рамок вокруг карточек концентрирует внимание на изображениях, не перегружая интерфейс. Крупные заголовки, набранные элегантным шрифтом с засечками, и лаконичные подписи создают ощущение воздушности и помогают пользователю мгновенно сориент</text:span><text:span text:style-name="T517">ироваться в направлениях съёмок. На показана нижняя часть главной страницы. Здесь блок с призывом к связи выполнен в тёплом бежевом цвете, который мягко контрастирует с основным фоном и акцентирует внимание на контактной информации. Фотография автора, расп</text:span><text:span text:style-name="T518">оложенная слева, и текст с описанием подхода к съёмке, размещённый справа, формируют доверительный диалог. Кнопки-пилюли Telegram, Instagram и «Почта» с плавной анимацией при наведении предлагают удобные каналы связи. Ниже — компактный футер с копирайтом и</text:span><text:span text:style-name="T519"><text:s/>иконками соцсетей в виде лаконичных тёмных кружков.</text:span></text:p>
      <text:p text:style-name="P520"><text:span text:style-name="T521"><draw:frame draw:style-name="a2" draw:name="Рисунок 18" text:anchor-type="as-char" svg:x="0in" svg:y="0in" svg:width="5.2299in" svg:height="7.73024in" style:rel-width="scale" style:rel-height="scale"><draw:image xlink:href="media/image3.png" xlink:type="simple" xlink:show="embed" xlink:actuate="onLoad"/><svg:title/><svg:desc/></draw:frame></text:span></text:p>
      <text:p text:style-name="P522">Рисунок 2.1 — Прототип главной страницы</text:p>
      <text:p text:style-name="P523"/>
      <text:p text:style-name="P524">Прототип страницы портфолио представлен на рисунке 2.3. Четырёхколоночная сетка обложек фотосессий равномерно заполняет экран. Каждая обложка — это<text:s/>вертикальный снимок, при наведении на который появляется полупрозрачный градиентный оверлей с названием сессии. Такое решение позволяет сохранить чистоту визуального восприятия до момента взаимодействия и даёт пользователю возможность быстро оценить разнообразие работ. Единый стиль карточек поддерживает целостность портфолио.</text:p>
      <text:p text:style-name="P525"><text:span text:style-name="T526"><draw:frame draw:style-name="a3" draw:name="Рисунок 14" text:anchor-type="as-char" svg:x="0in" svg:y="0in" svg:width="6.69236in" svg:height="3.29514in" style:rel-width="scale" style:rel-height="scale"><draw:image xlink:href="media/image4.png" xlink:type="simple" xlink:show="embed" xlink:actuate="onLoad"/><svg:title/><svg:desc/></draw:frame></text:span></text:p>
      <text:p text:style-name="P527">Рисунок 2.3 — Прототип страницы портфолио</text:p>
      <text:p text:style-name="P528"/>
      <text:p text:style-name="P529">На рисунке 2.4 изображён прототип страницы галереи. Masonry-раскладка фотографий переменной высоты плотно заполняет пространство, имитируя<text:s/>развеску снимков на стене. Отсутствие отвлекающих элементов, за исключением кнопки возврата в портфолио и заголовка с названием сессии, максимально фокусирует внимание на изображениях.</text:p>
      <text:p text:style-name="P530"><text:span text:style-name="T531"><draw:frame draw:style-name="a4" draw:name="Рисунок 17" text:anchor-type="as-char" svg:x="0in" svg:y="0in" svg:width="2.56286in" svg:height="8.59495in" style:rel-width="scale" style:rel-height="scale"><draw:image xlink:href="media/image5.png" xlink:type="simple" xlink:show="embed" xlink:actuate="onLoad"/><svg:title/><svg:desc/></draw:frame></text:span></text:p>
      <text:p text:style-name="P532">Рисунок 2.4 — Прототип страницы галереи</text:p>
      <text:p text:style-name="P533"/>
      <text:p text:style-name="P534">На рисунке 2.6 показан прототип страницы контактов. Двухколоночная компоновка объединяет фотографию автора и форму обратной связи. Поля ввода выполнены в стиле «только подчёркивание», что визуально облегчает интерфейс и фокусирует внимание на содержимом. Номер телефона, кликабельный<text:s/>и готовый к копированию, сопровождается подсказкой. Кнопки быстрых переходов в мессенджеры продублированы в виде пилюль под формой.</text:p>
      <text:p text:style-name="P535"/>
      <text:p text:style-name="Обычный"><text:span text:style-name="T536"><draw:frame draw:style-name="a5" draw:name="Рисунок 13" text:anchor-type="as-char" svg:x="0in" svg:y="0in" svg:width="6.69236in" svg:height="3.33194in" style:rel-width="scale" style:rel-height="scale"><draw:image xlink:href="media/image6.png" xlink:type="simple" xlink:show="embed" xlink:actuate="onLoad"/><svg:title/><svg:desc/></draw:frame></text:span></text:p>
      <text:p text:style-name="P537">Рисунок 2.6 — Прототип страницы контактов</text:p>
      <text:p text:style-name="P538"/>
      <text:p text:style-name="P539">Прототип страницы вопросов и ответов — на рисунке 2.7. Аккордеон с часто задаваемыми вопросами построен так, что в любой момент времени раскрыт только один пункт. Это экономит пространство и не перегружает пользователя. Вопросы, набранные шрифтом с засечками, выглядят дружелюбно, а плавная анимация раскрытия панели с ответом создаёт<text:s/>ощущение лёгкости.</text:p>
      <text:p text:style-name="P540"/>
      <text:p text:style-name="P541"><text:span text:style-name="T542"><draw:frame draw:style-name="a6" draw:name="Рисунок 12" text:anchor-type="as-char" svg:x="0in" svg:y="0in" svg:width="6.69236in" svg:height="3.3125in" style:rel-width="scale" style:rel-height="scale"><draw:image xlink:href="media/image7.png" xlink:type="simple" xlink:show="embed" xlink:actuate="onLoad"/><svg:title/><svg:desc/></draw:frame></text:span></text:p>
      <text:p text:style-name="P543">Рисунок 2.7 — Прототип страницы вопросов и ответов</text:p>
      <text:p text:style-name="P544"/>
      <text:p text:style-name="P545">Визуальное оформление базировалось на принципах минимализма, где нейтральная палитра с тёплым акцентом подчёркивает творческий характер ресурса, а свободное пространство между блоками снижает когнитивную нагрузку. Итоговый прототип представляет собой полноценную визуальную модель сайта с настроенными переходами между экранами, что позволило полностью верифицировать логику навигации до начала написания программного кода.</text:p>
      <text:p text:style-name="P546"/>
      <text:h text:style-name="P547" text:outline-level="2">2.2 Выводы</text:h>
      <text:p text:style-name="P548"/>
      <text:p text:style-name="P549">Разработка прототипов всех страниц веб-сайта в Figma позволила наглядно сформировать визуальную концепцию и проверить логику взаимодействия пользователя с интерфейсом до этапа программирования. Прототипы главной страницы с бегущей строкой и карточками категорий, страницы портфолио с сеткой обложек, галереи с masonry-раскладкой, контактов с формой и кнопками связи, а также вопросов с аккордеоном полностью отражают структуру будущего ресурса. Минималистичное оформление с нейтральной палитрой и тёплым акцентом, свободное пространство между блоками и продуманные состояния интерактивных элементов создают интуитивно понятную и эстетичную среду, ориентированную на демонстрацию фотографического контента. Верификация переходов между экранами на стадии прототипа подтвердила корректность навигационной логики и заложила надёжную основу для последующей адаптивной вёрстки.</text:p>
      <text:p text:style-name="P550"/>
      <text:h text:style-name="P551" text:outline-level="1">3 Реализация структуры веб-сайта</text:h>
      <text:p text:style-name="P552"/>
      <text:h text:style-name="Заголовок2" text:outline-level="2">3.1 Структура HTML-документа</text:h>
      <text:p text:style-name="P553"/>
      <text:p text:style-name="P554">Реализация структуры веб-сайта началась с создания HTML-документов для каждой из<text:s/>запланированных страниц. Всего было разработано 5 HTML-файлов: index.html (главная страница), portfolio.html (портфолио с обложками фотосессий), gallery.html (галерея с masonry-сеткой и лайтбоксом), contacts.html (контакты и форма обратной связи), questions.html (часто задаваемые вопросы). Главная страница, получившая имя index.html, была реализована как полноценный HTML-документ с правильным объявлением типа документа и метатегом viewport, обеспечивающим корректное масштабирование на мобильных устройствах.<text:s/>Ниже приведён фрагмент кода, демонстрирующий начало HTML-документа:</text:p>
      <text:p text:style-name="P555"/>
      <table:table table:style-name="Table556">
        <table:table-columns>
          <table:table-column table:style-name="TableColumn557"/>
        </table:table-columns>
        <table:table-row table:style-name="TableRow558">
          <table:table-cell table:style-name="TableCell559">
            <text:p text:style-name="P560"/>
            <text:p text:style-name="P561">&lt;!DOCTYPE html&gt;</text:p>
            <text:p text:style-name="P562">&lt;html lang="ru"&gt;</text:p>
            <text:p text:style-name="P563">&lt;head&gt;</text:p>
            <text:p text:style-name="P564"><text:s text:c="4"/>&lt;meta charset="UTF-8"&gt;</text:p>
            <text:p text:style-name="P565"><text:s text:c="4"/>&lt;meta name="viewport" content="width=device-width, initial-scale=1.0"&gt;</text:p>
            <text:p text:style-name="P566"><text:span text:style-name="T567"><text:s text:c="4"/>&lt;title&gt;Angelina Telpuk —<text:s/></text:span><text:span text:style-name="T568">фотограф</text:span><text:span text:style-name="T569">&lt;/title&gt;</text:span></text:p>
            <text:p text:style-name="P570"><text:s text:c="4"/>&lt;link rel="icon" href="Reolization/camera.svg" type="image/svg+xml"&gt;</text:p>
            <text:p text:style-name="P571"><text:s text:c="4"/>&lt;link rel="preconnect" href="https://fonts.googleapis.com"&gt;</text:p>
            <text:p text:style-name="P572"><text:s text:c="4"/>&lt;link rel="preconnect" href="https://fonts.gstatic.com" crossorigin&gt;</text:p>
            <text:p text:style-name="P573"><text:s text:c="4"/>&lt;link href="https://fonts.googleapis.com/css2?family=…" rel="stylesheet"&gt;</text:p>
            <text:p text:style-name="P574"><text:s text:c="4"/>&lt;link rel="stylesheet" href="css/main.css"&gt;</text:p>
            <text:p text:style-name="P575">&lt;/head&gt;</text:p>
            <text:p text:style-name="P576">&lt;body class="page page--home" data-page="home"&gt;</text:p>
            <text:p text:style-name="P577"><text:span text:style-name="T578"><text:s text:c="4"/>&lt;!--<text:s/></text:span><text:span text:style-name="T579">содержимое</text:span><text:span text:style-name="T580"><text:s/></text:span><text:span text:style-name="T581">страницы</text:span><text:span text:style-name="T582"><text:s/>--&gt;</text:span></text:p>
            <text:p text:style-name="P583"><text:s text:c="4"/>&lt;script src="js/main.js" defer&gt;&lt;/script&gt;</text:p>
            <text:p text:style-name="P584">&lt;/body&gt;</text:p>
            <text:p text:style-name="P585">&lt;/html&gt;</text:p>
          </table:table-cell>
        </table:table-row>
      </table:table>
      <text:p text:style-name="P586">Листинг 3.1 – Структура HTML-документа главной страницы</text:p>
      <text:p text:style-name="P587"/>
      <text:p text:style-name="P588">Атрибут data-page задаёт идентификатор страницы, используемый в JavaScript для инициализации только необходимых функций. Подключение стилей и скриптов выполнено единообразно для всех страниц, причём<text:s/>скрипт загружается с атрибутом defer, чтобы не блокировать построение DOM.</text:p>
      <text:p text:style-name="P589"/>
      <text:p text:style-name="P590">Верхняя часть каждой страницы содержит семантический элемент &lt;header&gt; с ролью banner, внутри которого размещены бренд-имя фотографа и основная навигация. Логотип представляет собой<text:s/>текстовую строку «ANGELINA TELPUK», стилизованную под крупный заголовок с увеличенным межбуквенным расстоянием. Навигация обёрнута в тег &lt;nav&gt; с атрибутом aria-label="Основная навигация", что повышает доступность. На мобильных устройствах меню скрывается<text:s/>за кнопкой-гамбургером, которая управляется JavaScript.</text:p>
      <text:p text:style-name="P591"/>
      <table:table table:style-name="Table592">
        <table:table-columns>
          <table:table-column table:style-name="TableColumn593"/>
        </table:table-columns>
        <table:table-row table:style-name="TableRow594">
          <table:table-cell table:style-name="TableCell595">
            <text:p text:style-name="P596"/>
            <text:p text:style-name="P597">&lt;header class="site-header" role="banner"&gt;</text:p>
            <text:p text:style-name="P598"><text:s text:c="4"/>&lt;div class="site-header__inner"&gt;</text:p>
            <text:p text:style-name="P599"><text:s text:c="8"/>&lt;p class="site-brand"&gt;ANGELINA TELPUK&lt;/p&gt;</text:p>
            <text:p text:style-name="P600"><text:s text:c="8"/>&lt;button type="button" class="nav-toggle"<text:s/>id="nav-toggle"</text:p>
            <text:p text:style-name="P601"><text:s text:c="16"/>aria-expanded="false" aria-controls="site-nav"</text:p>
            <text:p text:style-name="P602"><text:span text:style-name="T603"><text:s text:c="16"/>aria-label="</text:span><text:span text:style-name="T604">Открыть</text:span><text:span text:style-name="T605"><text:s/></text:span><text:span text:style-name="T606">меню</text:span><text:span text:style-name="T607">"&gt;</text:span></text:p>
            <text:p text:style-name="P608"><text:s text:c="12"/>&lt;span&gt;&lt;/span&gt;&lt;span&gt;&lt;/span&gt;&lt;span&gt;&lt;/span&gt;</text:p>
            <text:p text:style-name="P609"><text:s text:c="8"/>&lt;/button&gt;</text:p>
            <text:p text:style-name="P610"><text:span text:style-name="T611"><text:s text:c="8"/>&lt;nav class="site-nav" id="site-nav"<text:s/></text:span><text:span text:style-name="T612">aria-label="</text:span><text:span text:style-name="T613">Основная</text:span><text:span text:style-name="T614"><text:s/></text:span><text:span text:style-name="T615">навигация</text:span><text:span text:style-name="T616">"&gt;</text:span></text:p>
            <text:p text:style-name="P617"><text:s text:c="12"/>&lt;ul class="site-nav__list"&gt;</text:p>
            <text:p text:style-name="P618"><text:span text:style-name="T619"><text:s text:c="16"/>&lt;li&gt;&lt;a href="index.html"&gt;</text:span><text:span text:style-name="T620">Главная</text:span><text:span text:style-name="T621">&lt;/a&gt;&lt;/li&gt;</text:span></text:p>
            <text:p text:style-name="P622"><text:span text:style-name="T623"><text:s text:c="16"/>&lt;li&gt;&lt;a href="portfolio.html"&gt;</text:span><text:span text:style-name="T624">Портфолио</text:span><text:span text:style-name="T625">&lt;/a&gt;&lt;/li&gt;</text:span></text:p>
            <text:p text:style-name="P626"><text:span text:style-name="T627"><text:s text:c="16"/>&lt;li&gt;&lt;a href="contacts.html"&gt;</text:span><text:span text:style-name="T628">Контакты</text:span><text:span text:style-name="T629">&lt;/a&gt;&lt;/li&gt;</text:span></text:p>
            <text:p text:style-name="P630"><text:span text:style-name="T631"><text:s text:c="16"/>&lt;li&gt;&lt;a href="questions.html"&gt;</text:span><text:span text:style-name="T632">Вопросы</text:span><text:span text:style-name="T633">&lt;/a&gt;&lt;/li&gt;</text:span></text:p>
            <text:p text:style-name="P634"><text:span text:style-name="T635"><text:s text:c="12"/></text:span><text:span text:style-name="T636">&lt;/ul&gt;</text:span></text:p>
            <text:p text:style-name="P637"><text:s text:c="8"/>&lt;/nav&gt;</text:p>
            <text:p text:style-name="P638"><text:s text:c="4"/>&lt;/div&gt;</text:p>
            <text:p text:style-name="P639"><text:span text:style-name="T640">&lt;/header&gt;</text:span></text:p>
          </table:table-cell>
        </table:table-row>
      </table:table>
      <text:p text:style-name="P641">Листинг 3.2 – Структура тега &lt;header&gt; с навигацией</text:p>
      <text:p text:style-name="P642"/>
      <text:p text:style-name="P643">Основное содержимое каждой страницы заключается в тег &lt;main&gt;. На главной<text:s/>странице внутри &lt;main&gt; расположены секции: .hero с приветственным текстом, .categories с карточками направлений съёмок, .connect-block с призывом к связи. Каждая секция имеет заголовок, доступный для скринридеров через класс visually-hidden или атрибут aria-label.</text:p>
      <text:p text:style-name="P644"/>
      <table:table table:style-name="Table645">
        <table:table-columns>
          <table:table-column table:style-name="TableColumn646"/>
        </table:table-columns>
        <table:table-row table:style-name="TableRow647">
          <table:table-cell table:style-name="TableCell648">
            <text:p text:style-name="P649">&lt;main class="site-main" id="main"&gt;</text:p>
            <text:p text:style-name="P650"><text:s text:c="4"/>&lt;section class="hero" aria-labelledby="hero-title"&gt;</text:p>
            <text:p text:style-name="P651"><text:s text:c="8"/>&lt;h1 class="hero__title visually-hidden" id="hero-title"&gt;Angelina Telpuk&lt;/h1&gt;</text:p>
            <text:p text:style-name="P652"><text:s text:c="8"/>&lt;div class="hero__text intro-text"<text:s/>id="intro-text"&gt;&lt;/div&gt;</text:p>
            <text:p text:style-name="P653"><text:s text:c="4"/>&lt;/section&gt;</text:p>
            <text:p text:style-name="P654"><text:span text:style-name="T655"><text:s text:c="4"/>&lt;section class="categories" aria-label="</text:span><text:span text:style-name="T656">Направления</text:span><text:span text:style-name="T657">"&gt;</text:span></text:p>
            <text:p text:style-name="P658"><text:span text:style-name="T659"><text:s text:c="8"/>&lt;!--<text:s/></text:span><text:span text:style-name="T660">карточки</text:span><text:span text:style-name="T661"><text:s/></text:span><text:span text:style-name="T662">категорий</text:span><text:span text:style-name="T663"><text:s/>--&gt;</text:span></text:p>
            <text:p text:style-name="P664"><text:s text:c="4"/>&lt;/section&gt;</text:p>
            <text:p text:style-name="P665"><text:s text:c="8"/>&lt;section class="connect-block connect-block--dark" aria-labelledby="connect-heading"&gt;</text:p>
            <text:p text:style-name="P666"><text:span text:style-name="T667"><text:s text:c="12"/>&lt;h2</text:span><text:span text:style-name="T668"><text:s/>class="visually-hidden" id="connect-heading"&gt;</text:span><text:span text:style-name="T669">Связаться</text:span><text:span text:style-name="T670">&lt;/h2&gt;</text:span></text:p>
            <text:p text:style-name="P671"><text:span text:style-name="T672"><text:s text:c="12"/></text:span><text:span text:style-name="T673">&lt;!-- фото и контактные кнопки --&gt;</text:span></text:p>
            <text:p text:style-name="P674"><text:s text:c="8"/>&lt;/section&gt;</text:p>
            <text:p text:style-name="P675"><text:s text:c="4"/>&lt;/main&gt;</text:p>
            <text:p text:style-name="P676"/>
          </table:table-cell>
        </table:table-row>
      </table:table>
      <text:p text:style-name="P677">Листинг 3.3 – Структура тега &lt;main&gt; главной страницы</text:p>
      <text:p text:style-name="P678"/>
      <text:p text:style-name="P679">Карточки категорий на главной странице реализованы с<text:s/>использованием тега &lt;article&gt;, что подчёркивает их самостоятельное смысловое значение. Каждая карточка содержит изображение, заголовок второго уровня, краткое описание и ссылку-призыв к действию, оформленную как кнопка.</text:p>
      <text:p text:style-name="P680"/>
      <table:table table:style-name="Table681">
        <table:table-columns>
          <table:table-column table:style-name="TableColumn682"/>
        </table:table-columns>
        <table:table-row table:style-name="TableRow683">
          <table:table-cell table:style-name="TableCell684">
            <text:p text:style-name="P685">&lt;article class="cat-card"&gt; <text:s text:c="3"/></text:p>
            <text:p text:style-name="P686">&lt;a class="cat-card__link" href="portfolio.html"&gt;</text:p>
            <text:p text:style-name="P687"><text:s text:c="8"/>&lt;figure class="cat-card__figure"&gt;</text:p>
            <text:p text:style-name="P688"><text:span text:style-name="T689"><text:s text:c="12"/>&lt;img src="</text:span><text:span text:style-name="T690">Фотки</text:span><text:span text:style-name="T691"><text:s/></text:span><text:span text:style-name="T692">для</text:span><text:span text:style-name="T693"><text:s/></text:span><text:span text:style-name="T694">курсового</text:span><text:span text:style-name="T695">/Ester/IMG_1337_jpg.jpeg"</text:span></text:p>
            <text:p text:style-name="P696"><text:span text:style-name="T697"><text:s text:c="17"/>alt="</text:span><text:span text:style-name="T698">Детские</text:span><text:span text:style-name="T699"><text:s/></text:span><text:span text:style-name="T700">съемки</text:span><text:span text:style-name="T701">" width="800" height="1000" loading="lazy"&gt;</text:span></text:p>
            <text:p text:style-name="P702"><text:s text:c="8"/>&lt;/figure&gt;</text:p>
            <text:p text:style-name="P703"><text:s text:c="8"/>&lt;div class="cat-card__body"&gt;</text:p>
            <text:p text:style-name="P704"><text:span text:style-name="T705"><text:s text:c="12"/>&lt;h2 class="cat-card__title"&gt;</text:span><text:span text:style-name="T706">Детские</text:span><text:span text:style-name="T707">&lt;/h2&gt;</text:span></text:p>
            <text:p text:style-name="P708"><text:span text:style-name="T709"><text:s text:c="12"/></text:span><text:span text:style-name="T710">&lt;p class="cat-card__desc"&gt;Чтобы увидеть портфолио, перейдите по ссылке&lt;/p&gt;</text:span></text:p>
            <text:p text:style-name="P711"><text:span text:style-name="T712"><text:s text:c="12"/></text:span><text:span text:style-name="T713">&lt;span class="cat-card__cta"&gt;</text:span><text:span text:style-name="T714">Смотреть</text:span><text:span text:style-name="T715"><text:s/>→&lt;/span&gt;</text:span></text:p>
            <text:p text:style-name="P716"><text:span text:style-name="T717"><text:s text:c="8"/></text:span><text:span text:style-name="T718">&lt;/d</text:span><text:span text:style-name="T719">iv&gt;</text:span></text:p>
            <text:p text:style-name="P720"><text:s text:c="4"/>&lt;/a&gt;</text:p>
            <text:p text:style-name="Обычный"><text:span text:style-name="T721">&lt;/article&gt;</text:span></text:p>
          </table:table-cell>
        </table:table-row>
      </table:table>
      <text:p text:style-name="P722">Листинг 3.4 – Структура тега &lt;article&gt; для карточки категории</text:p>
      <text:p text:style-name="P723"/>
      <text:p text:style-name="P724">Для всех изображений на сайте прописаны атрибуты src с указанием пути к файлу, атрибуты alt, содержащие альтернативный текст, а также width и height для<text:s/>предотвращения смещения макета при загрузке. Атрибут loading="lazy" откладывает загрузку изображений до момента их приближения к области видимости, что ускоряет первоначальную отрисовку страницы.</text:p>
      <text:p text:style-name="P725">Страницы портфолио, галереи, контактов и вопросов построены<text:s/>по единому каркасу: одинаковые &lt;header&gt;, &lt;footer&gt; и кнопка «Наверх», меняется лишь содержимое &lt;main&gt;. На странице портфолио сетка обложек генерируется динамически из XML, поэтому изначально контейнер #portfolio-grid пуст. Страница галереи содержит masonry-сетку и скрытый лайтбокс, который активируется кликом по фотографии. На странице контактов реализована форма обратной связи, использующая сервис Formsubmit для отправки писем без написания серверного кода.</text:p>
      <text:p text:style-name="P726"/>
      <table:table table:style-name="Table727">
        <table:table-columns>
          <table:table-column table:style-name="TableColumn728"/>
        </table:table-columns>
        <table:table-row table:style-name="TableRow729">
          <table:table-cell table:style-name="TableCell730">
            <text:p text:style-name="P731">&lt;form class="contact-form contact-form--lines" id="contact-form"</text:p>
            <text:p text:style-name="P732"><text:s text:c="6"/>action="https://formsubmit.co/akrugovets@icloud.com" method="POST" novalidate&gt;</text:p>
            <text:p text:style-name="P733"><text:span text:style-name="T734"><text:s text:c="4"/>&lt;input type="hidden" name="_subject" value="</text:span><text:span text:style-name="T735">Сообщение</text:span><text:span text:style-name="T736"><text:s/></text:span><text:span text:style-name="T737">с</text:span><text:span text:style-name="T738"><text:s/></text:span><text:span text:style-name="T739">сайта</text:span><text:span text:style-name="T740"><text:s/>Angelina Telpuk"&gt;</text:span></text:p>
            <text:p text:style-name="P741"><text:s text:c="4"/>&lt;input type="hidden" name="_captcha" value="false"&gt;</text:p>
            <text:p text:style-name="P742"><text:s text:c="4"/>&lt;div<text:s/>class="field-line"&gt;</text:p>
            <text:p text:style-name="P743"><text:span text:style-name="T744"><text:s text:c="8"/>&lt;span class="field-line__label"&gt;</text:span><text:span text:style-name="T745">Ваше</text:span><text:span text:style-name="T746"><text:s/></text:span><text:span text:style-name="T747">имя</text:span><text:span text:style-name="T748">&lt;/span&gt;</text:span></text:p>
            <text:p text:style-name="P749"><text:s text:c="8"/>&lt;input class="field-line__input" type="text" name="name" required autocomplete="name"&gt;</text:p>
            <text:p text:style-name="P750"><text:s text:c="4"/>&lt;/div&gt;</text:p>
            <text:p text:style-name="P751"><text:span text:style-name="T752"><text:s text:c="4"/>&lt;!--<text:s/></text:span><text:span text:style-name="T753">другие</text:span><text:span text:style-name="T754"><text:s/></text:span><text:span text:style-name="T755">поля</text:span><text:span text:style-name="T756"><text:s/>--&gt;</text:span></text:p>
            <text:p text:style-name="P757"><text:span text:style-name="T758"><text:s text:c="4"/>&lt;button type="submit" class="btn btn--pill bt</text:span><text:span text:style-name="T759">n--primary"&gt;</text:span><text:span text:style-name="T760">Отправить</text:span><text:span text:style-name="T761">&lt;/button&gt;</text:span></text:p>
            <text:p text:style-name="Обычный"><text:span text:style-name="T762">&lt;/form&gt;</text:span></text:p>
          </table:table-cell>
        </table:table-row>
      </table:table>
      <text:p text:style-name="P763"/>
      <text:p text:style-name="P764">Листинг 3.5 – Структура формы обратной связи</text:p>
      <text:p text:style-name="P765"/>
      <text:p text:style-name="P766">В нижней части каждой страницы размещён &lt;footer&gt; с ролью contentinfo, содержащий копирайт и иконки социальных сетей и почты. Иконки выполнены в формате SVG и<text:s/>стилизованы как круглые кнопки с тёмным фоном.</text:p>
      <text:p text:style-name="P767"/>
      <table:table table:style-name="Table768">
        <table:table-columns>
          <table:table-column table:style-name="TableColumn769"/>
        </table:table-columns>
        <table:table-row table:style-name="TableRow770">
          <table:table-cell table:style-name="TableCell771">
            <text:p text:style-name="P772">&lt;footer class="site-footer" role="contentinfo"&gt;</text:p>
            <text:p text:style-name="P773"><text:s text:c="4"/>&lt;div class="site-footer__inner"&gt;</text:p>
            <text:p text:style-name="P774"><text:s text:c="8"/>&lt;p class="site-footer__copy" id="footer-copy"&gt;&lt;/p&gt;</text:p>
            <text:p text:style-name="P775"><text:span text:style-name="T776"><text:s text:c="8"/>&lt;ul class="site-footer__social" aria-label="</text:span><text:span text:style-name="T777">Соцсети</text:span><text:span text:style-name="T778"><text:s/></text:span><text:span text:style-name="T779">и</text:span><text:span text:style-name="T780"><text:s/></text:span><text:span text:style-name="T781">по</text:span><text:span text:style-name="T782">чта</text:span><text:span text:style-name="T783">"&gt;</text:span></text:p>
            <text:p text:style-name="P784"><text:s text:c="12"/>&lt;li&gt;</text:p>
            <text:p text:style-name="P785"><text:span text:style-name="T786"><text:s text:c="16"/>&lt;a class="icon-link" href="mailto:akrugovets@icloud.com" title="</text:span><text:span text:style-name="T787">Почта</text:span><text:span text:style-name="T788">"&gt;</text:span></text:p>
            <text:p text:style-name="P789"><text:s text:c="20"/>&lt;img src="Reolization/mail.svg" alt="" width="18" height="18"&gt;</text:p>
            <text:p text:style-name="P790"><text:s text:c="16"/>&lt;/a&gt;</text:p>
            <text:p text:style-name="P791"><text:s text:c="12"/>&lt;/li&gt;</text:p>
            <text:p text:style-name="P792"><text:s text:c="12"/>&lt;li&gt;</text:p>
            <text:p text:style-name="P793"><text:s text:c="16"/>&lt;a class="icon-link" href="https://t.me/Angelina_Telpuk" target="_blank"</text:p>
            <text:p text:style-name="P794"><text:s text:c="19"/>rel="noopener noreferrer" title="Telegram"&gt;</text:p>
            <text:p text:style-name="P795"><text:s text:c="20"/>&lt;img src="Reolization/telegram.svg" alt="" width="18" height="18"&gt;</text:p>
            <text:p text:style-name="P796"><text:s text:c="16"/>&lt;/a&gt;</text:p>
            <text:p text:style-name="P797"><text:s text:c="12"/>&lt;/li&gt;</text:p>
            <text:p text:style-name="P798"><text:s text:c="12"/>&lt;li&gt;</text:p>
            <text:p text:style-name="P799"><text:s text:c="16"/>&lt;a class="icon-link" href="https://instagram.com/telpuk_photo" target="_blank"</text:p>
            <text:p text:style-name="P800"><text:s text:c="19"/>rel="noopener noreferrer" title="Instagram"&gt;</text:p>
            <text:p text:style-name="P801"><text:s text:c="20"/>&lt;img src="Reolization/instagram.svg" alt="" width="18" height="18"&gt;</text:p>
            <text:p text:style-name="P802"><text:s text:c="16"/>&lt;/a&gt;</text:p>
            <text:p text:style-name="P803"><text:s text:c="12"/>&lt;/li&gt;</text:p>
            <text:p text:style-name="P804"><text:s text:c="8"/>&lt;/ul&gt;</text:p>
            <text:p text:style-name="P805"><text:s text:c="4"/>&lt;/div&gt;</text:p>
            <text:p text:style-name="P806">&lt;/footer&gt;</text:p>
            <text:p text:style-name="P807"/>
          </table:table-cell>
        </table:table-row>
      </table:table>
      <text:p text:style-name="P808"/>
      <text:p text:style-name="P809"/>
      <text:p text:style-name="P810">Листинг 3.6 – Структура тега &lt;footer&gt;</text:p>
      <text:p text:style-name="P811"/>
      <text:p text:style-name="P812">Таким образом, HTML-структура всех страниц разработана с применением<text:s/>семантических тегов, что обеспечивает логическую иерархию контента и упрощает поддержку кода.</text:p>
      <text:p text:style-name="P813"/>
      <text:p text:style-name="P814">3.2 Добавление таблиц стилей SCSS и CSS</text:p>
      <text:p text:style-name="P815"/>
      <text:p text:style-name="P816">Реализация визуального оформления веб-сайта была выполнена с использованием препроцессора SCSS и каскадных таблиц<text:s/>стилей CSS3. SCSS-код, написанный в ходе разработки, был скомпилирован в единый CSS-файл main.css, что позволило централизованно управлять стилями всего сайта и обеспечить их консистентность. Использование SCSS дало возможность задействовать переменные, вложенность правил и математические операции, что сделало код более организованным и лёгким для сопровождения.</text:p>
      <text:p text:style-name="P817"/>
      <text:p text:style-name="P818">В начале SCSS-файла были объявлены переменные, определяющие цветовую гамму, типографику и ключевые размеры. Применение переменных позволило быстро<text:s/>адаптировать визуальную концепцию без необходимости правки каждого селектора вручную. Ниже приведён фрагмент SCSS-файла с объявлением основных переменных и базовых стилей:</text:p>
      <text:p text:style-name="P819"/>
      <table:table table:style-name="Table820">
        <table:table-columns>
          <table:table-column table:style-name="TableColumn821"/>
        </table:table-columns>
        <table:table-row table:style-name="TableRow822">
          <table:table-cell table:style-name="TableCell823">
            <text:p text:style-name="Обычный"><text:span text:style-name="T824"><text:s text:c="14"/></text:span><text:span text:style-name="T825">$color-bg: #fafafa;</text:span></text:p>
            <text:p text:style-name="P826">$color-text: #1a1a1a;</text:p>
            <text:p text:style-name="P827">$color-muted: #5c5c5c;</text:p>
            <text:p text:style-name="P828">$color-line: #e6e6e6;</text:p>
            <text:p text:style-name="P829">$color-accent: #111;</text:p>
            <text:p text:style-name="P830">$font-sans: "Montserrat", system-ui, -apple-system, "Segoe UI", Roboto, sans-serif;</text:p>
            <text:p text:style-name="P831">$font-serif: "Cormorant Garamond", Georgia, "Times New Roman", serif;</text:p>
            <text:p text:style-name="P832">$max-width: 1120px;</text:p>
            <text:p text:style-name="P833"/>
            <text:p text:style-name="P834">*,</text:p>
            <text:p text:style-name="P835">*::before,</text:p>
            <text:p text:style-name="P836">*::after {</text:p>
            <text:p text:style-name="P837"><text:s text:c="2"/>box-sizing:<text:s/>border-box;</text:p>
            <text:p text:style-name="P838">}</text:p>
            <text:p text:style-name="P839"/>
            <text:p text:style-name="P840">html {</text:p>
            <text:p text:style-name="P841"><text:s text:c="2"/>-webkit-text-size-adjust: 100%;</text:p>
            <text:p text:style-name="P842"><text:s text:c="2"/>scroll-behavior: smooth;</text:p>
            <text:p text:style-name="P843">}</text:p>
            <text:p text:style-name="P844"/>
            <text:p text:style-name="P845">body {</text:p>
            <text:p text:style-name="P846"><text:s text:c="2"/>margin: 0;</text:p>
            <text:p text:style-name="P847"><text:s text:c="2"/>font-family: $font-sans;</text:p>
            <text:p text:style-name="P848"><text:s text:c="2"/>color: $color-text;</text:p>
            <text:p text:style-name="P849"><text:s text:c="2"/>background: $color-bg;</text:p>
            <text:p text:style-name="P850"><text:span text:style-name="T851"><text:s text:c="2"/></text:span><text:span text:style-name="T852">line-height: 1.55;</text:span></text:p>
            <text:p text:style-name="P853"><text:span text:style-name="T854">}</text:span></text:p>
          </table:table-cell>
        </table:table-row>
      </table:table>
      <text:p text:style-name="P855">Листинг 3.7 – Объявление переменных и<text:s/>базовых стилей в SCSS</text:p>
      <text:p text:style-name="P856"/>
      <text:p text:style-name="P857">Все CSS-правила были организованы по компонентному принципу, что обеспечивает единообразие интерфейса. Стили для каждого блока (шапка, бегущая строка, карточки, контактная форма, аккордеон, лайтбокс) сгруппированы и используют вложенность SCSS. Например, стили карточки категории собраны внутри родительского селектора .cat-card, включая состояния наведения и дочерние элементы. Это позволило избежать дублирования кода и упростило навигацию по файлу.</text:p>
      <text:p text:style-name="P858"/>
      <text:p text:style-name="P859">Цветовая идентификация разделов сайта реализована за счёт единой палитры. Основной фон выполнен в светло-сером цвете #fafafa, текст — в глубоком чёрном #1a1a1a, второстепенные подписи — в приглушённом сером #5c5c5c. Блок призыва к связи на главной странице выделен тёплым бежевым фоном #e4e1dc, что создаёт мягкий визуальный акцент и не отвлекает от фотографий. Кнопки-пилюли в Telegram и Instagram стилизованы с прозрачным фоном и тёмной рамкой, а при наведении инвертируют цвета, что даёт чёткую тактильную обратную связь.</text:p>
      <text:p text:style-name="P860"/>
      <text:p text:style-name="P861">Для упрощения адаптивной вёрстки в SCSS-файле использованы медиазапросы. Ключевые точки перестроения заданы на ширинах 960px, 900px, 820px, 720px и 560px. На каждой из них сетки меняют количество колонок, а отступы и размеры шрифтов корректируются для комфортного просмотра на мобильных устройствах. Пример медиазапроса, отвечающего за перестроение сетки портфолио с четырёх колонок на две:</text:p>
      <text:p text:style-name="P862"/>
      <table:table table:style-name="Table863">
        <table:table-columns>
          <table:table-column table:style-name="TableColumn864"/>
        </table:table-columns>
        <table:table-row table:style-name="TableRow865">
          <table:table-cell table:style-name="TableCell866">
            <text:p text:style-name="P867">@media (max-width: 960px) {</text:p>
            <text:p text:style-name="P868"><text:s text:c="2"/>.portfolio-grid {</text:p>
            <text:p text:style-name="P869"><text:s text:c="4"/>grid-template-columns: repeat(2, minmax(0, 1fr));</text:p>
            <text:p text:style-name="P870"><text:span text:style-name="T871"><text:s text:c="2"/></text:span><text:span text:style-name="T872">}</text:span></text:p>
            <text:p text:style-name="P873">}</text:p>
          </table:table-cell>
        </table:table-row>
      </table:table>
      <text:p text:style-name="P874"/>
      <text:p text:style-name="P875">Листинг 3.8 – Пример<text:s/>медиазапроса для адаптивности</text:p>
      <text:p text:style-name="P876"/>
      <text:p text:style-name="P877">Навигационное меню на мобильных устройствах трансформируется в гамбургер. При ширине экрана менее 720 пикселей ссылки выстраиваются вертикально, а их контейнер получает анимированное изменение максимальной высоты, создавая плавное раскрытие. Кнопка-гамбургер, скрытая на десктопе, становится видимой благодаря переопределению свойства display внутри медиазапроса.</text:p>
      <text:p text:style-name="P878"/>
      <text:p text:style-name="P879">Для бегущей строки с лучшими фотографиями реализована бесконечная анимация @keyframes marquee-scroll, которая за 56<text:s/>секунд линейно сдвигает контейнер с двойным набором изображений влево на 50% ширины. Анимация отключается, если в системе активирован режим prefers-reduced-motion, что учитывает потребности пользователей с чувствительностью к движению. Изображениям в строке задана высота через clamp(12rem, 25vw, 20rem), обеспечивающая пропорциональное масштабирование на любых экранах.</text:p>
      <text:p text:style-name="P880"/>
      <text:p text:style-name="P881">Аккордеон часто задаваемых вопросов использует современный подход с grid-template-rows. В закрытом состоянии панель имеет значение 0fr, а<text:s/>при добавлении класса is-open переключается на 1fr, при этом анимация задана через transition: grid-template-rows 0.55s cubic-bezier(0.4, 0, 0.2, 1). Это обеспечивает плавное раскрытие без необходимости задавать фиксированную высоту. Текст вопросов и ответов набран шрифтом Cormorant Garamond, что визуально объединяет аккордеон с остальным контентом.</text:p>
      <text:p text:style-name="P882"/>
      <text:p text:style-name="P883">Лайтбокс для просмотра фотографий стилизован как фиксированное наложение с тёмным полупрозрачным фоном. Изображение ограничено по высоте (max-height: 78vh) и ширине (max-width: 100%), а кнопки навигации и закрытия выполнены в виде полупрозрачных кругов, меняющих цвет при наведении. Состояние скрытия регулируется атрибутом hidden с принудительным display: none !important, что исключает конфликты специфичности.</text:p>
      <text:p text:style-name="P884"/>
      <text:p text:style-name="P885">Футер сайта выполнен компактным: уменьшены отступы и размеры иконок социальных сетей по сравнению с первоначальным дизайном. Иконки, встроенные через &lt;img&gt; и стилизованные как круглые кнопки с чёрным фоном, при наведении слегка приподнимаются и изменяют прозрачность. Это создаёт лёгкую интерактивность, не перегружая заключительный блок страницы. Все стили скомпилированы в итоговый main.css, который подключён на каждой странице, обеспечивая единство визуального оформления всего ресурса.</text:p>
      <text:p text:style-name="P886"/>
      <text:p text:style-name="P887">\3.3 Использование стандартов XML (SVG)</text:p>
      <text:p text:style-name="P888"/>
      <text:p text:style-name="P889">В рамках проекта для хранения структурированных данных был применён формат XML, а для создания масштабируемой графики — векторный формат SVG. Вся текстовая и конфигурационная информация вынесена в два XML-файла: site.xml и portfolio.xml.<text:s/>Файл site.xml содержит брендовое имя, контактные данные, приветственный текст, призыв к связи, а также перечень вопросов и ответов для страницы FAQ. Каждый FAQ-элемент представлен узлами &lt;question&gt; и &lt;answer&gt;, что позволяет легко редактировать содержимое<text:s/>без вмешательства в HTML-разметку. Ниже приведён фрагмент структуры site.xml:</text:p>
      <text:p text:style-name="P890"/>
      <table:table table:style-name="Table891">
        <table:table-columns>
          <table:table-column table:style-name="TableColumn892"/>
        </table:table-columns>
        <table:table-row table:style-name="TableRow893">
          <table:table-cell table:style-name="TableCell894">
            <text:p text:style-name="P895"><text:s text:c="10"/>&lt;?xml version="1.0" encoding="UTF-8"?&gt;</text:p>
            <text:p text:style-name="P896">&lt;site&gt;</text:p>
            <text:p text:style-name="P897"><text:s text:c="2"/>&lt;brand&gt;ANGELINA TELPUK&lt;/brand&gt;</text:p>
            <text:p text:style-name="P898"><text:s text:c="2"/>&lt;intro&gt;&lt;![CDATA[</text:p>
            <text:p text:style-name="P899">Привет. Добро пожаловать на мой сайт!</text:p>
            <text:p text:style-name="P900">…</text:p>
            <text:p text:style-name="P901"><text:s text:c="2"/>]]&gt;&lt;/intro&gt;</text:p>
            <text:p text:style-name="P902"><text:s text:c="2"/>&lt;faq&gt;</text:p>
            <text:p text:style-name="P903"><text:s text:c="4"/>&lt;item&gt;</text:p>
            <text:p text:style-name="P904"><text:s text:c="6"/>&lt;question&gt;Сколько обработанных фотографий мы получим?&lt;/question&gt;</text:p>
            <text:p text:style-name="P905"><text:s text:c="6"/>&lt;answer&gt;Стандартный набор фотографий включает не менее 45 снимков.&lt;/answer&gt;</text:p>
            <text:p text:style-name="P906"><text:s text:c="4"/>&lt;/item&gt;</text:p>
            <text:p text:style-name="P907"><text:s text:c="4"/>…</text:p>
            <text:p text:style-name="P908"><text:s text:c="2"/>&lt;/faq&gt;</text:p>
            <text:p text:style-name="P909">&lt;/site&gt;</text:p>
            <text:p text:style-name="P910"/>
          </table:table-cell>
        </table:table-row>
      </table:table>
      <text:p text:style-name="P911"/>
      <text:p text:style-name="P912">Листинг 3.9 – Фрагмент структуры site.xml</text:p>
      <text:p text:style-name="P913"/>
      <text:p text:style-name="P914">Файл<text:s/>portfolio.xml хранит информацию о фотосессиях: название, обложку и список всех изображений. Дополнительно он содержит элементы &lt;marqueeImage&gt; для бегущей строки на главной странице. Корневой элемент &lt;portfolio&gt; объединяет несколько &lt;session&gt;, каждая из которых имеет атрибут title, а внутри — теги &lt;cover&gt; и &lt;image&gt; с относительными путями к файлам. Такая организация данных позволяет полностью отделить контент от представления: добавление новой фотосессии сводится к расширению XML-файла без редактирования HTML или CSS.</text:p>
      <text:p text:style-name="P915"/>
      <table:table table:style-name="Table916">
        <table:table-columns>
          <table:table-column table:style-name="TableColumn917"/>
        </table:table-columns>
        <table:table-row table:style-name="TableRow918">
          <table:table-cell table:style-name="TableCell919">
            <text:p text:style-name="P920">&lt;?xml version="1.0" encoding="UTF-8"?&gt;</text:p>
            <text:p text:style-name="P921">&lt;portfolio&gt;</text:p>
            <text:p text:style-name="P922"><text:s text:c="2"/>&lt;session title="Ester"&gt;</text:p>
            <text:p text:style-name="P923"><text:span text:style-name="T924"><text:s text:c="4"/>&lt;cover&gt;</text:span><text:span text:style-name="T925">Фотки</text:span><text:span text:style-name="T926"><text:s/></text:span><text:span text:style-name="T927">для</text:span><text:span text:style-name="T928"><text:s/></text:span><text:span text:style-name="T929">курсового</text:span><text:span text:style-name="T930">/Ester/IMG_1281_jpg.jpeg&lt;/cover&gt;</text:span></text:p>
            <text:p text:style-name="P931"><text:span text:style-name="T932"><text:s text:c="4"/>&lt;image&gt;</text:span><text:span text:style-name="T933">Фотки</text:span><text:span text:style-name="T934"><text:s/></text:span><text:span text:style-name="T935">для</text:span><text:span text:style-name="T936"><text:s/></text:span><text:span text:style-name="T937">курсового</text:span><text:span text:style-name="T938">/Ester/IMG_1222_jpg.jpeg&lt;/image&gt;</text:span></text:p>
            <text:p text:style-name="P939"><text:s text:c="4"/>…</text:p>
            <text:p text:style-name="P940"><text:s text:c="2"/>&lt;/session&gt;</text:p>
            <text:p text:style-name="P941"><text:s text:c="2"/>&lt;session<text:s/>title="Olivia"&gt;</text:p>
            <text:p text:style-name="P942"><text:s text:c="4"/>…</text:p>
            <text:p text:style-name="P943"><text:s text:c="2"/>&lt;/session&gt;</text:p>
            <text:p text:style-name="P944"><text:span text:style-name="T945"><text:s text:c="2"/>&lt;marqueeImage&gt;</text:span><text:span text:style-name="T946">Фотки</text:span><text:span text:style-name="T947"><text:s/></text:span><text:span text:style-name="T948">для</text:span><text:span text:style-name="T949"><text:s/></text:span><text:span text:style-name="T950">ленты</text:span><text:span text:style-name="T951">/IMG_0216_jpg.jpeg&lt;/marqueeImage&gt;</text:span></text:p>
            <text:p text:style-name="P952"><text:s text:c="2"/>…</text:p>
            <text:p text:style-name="P953">&lt;/portfolio&gt;</text:p>
            <text:p text:style-name="P954"/>
          </table:table-cell>
        </table:table-row>
      </table:table>
      <text:p text:style-name="P955"/>
      <text:p text:style-name="P956"><text:span text:style-name="T957">Листинг</text:span><text:span text:style-name="T958"><text:s/>3.10 –<text:s/></text:span><text:span text:style-name="T959">Фрагмент</text:span><text:span text:style-name="T960"><text:s/></text:span><text:span text:style-name="T961">структуры</text:span><text:span text:style-name="T962"><text:s/>portfolio.xml</text:span></text:p>
      <text:p text:style-name="P963"/>
      <text:p text:style-name="P964">Вся SVG-графика сайта представлена набором иконок, выполненных в виде<text:s/>самостоятельных файлов: camera.svg, mail.svg, telegram.svg и instagram.svg. Фавикон, отображаемый на вкладке браузера, подключается как внешний SVG-ресурс:</text:p>
      <text:p text:style-name="P965"/>
      <table:table table:style-name="Table966">
        <table:table-columns>
          <table:table-column table:style-name="TableColumn967"/>
        </table:table-columns>
        <table:table-row table:style-name="TableRow968">
          <table:table-cell table:style-name="TableCell969">
            <text:p text:style-name="P970">&lt;link rel="icon" href="Reolization/camera.svg" type="image/svg+xml"&gt;</text:p>
            <text:p text:style-name="P971"/>
          </table:table-cell>
        </table:table-row>
      </table:table>
      <text:p text:style-name="P972"/>
      <text:p text:style-name="P973">Иконки социальных сетей и почты в футере реализованы как элементы &lt;img&gt; с указанием соответствующего SVG-файла. Такой подход позволяет сохранить прозрачность и чёткость на экранах любой плотности, а размер файлов остаётся минимальным.</text:p>
      <text:p text:style-name="P974"/>
      <text:p text:style-name="P975">Интерактивная кнопка «Наверх» содержит встроенный SVG-элемент, отрисованный непосредственно в HTML. Это избавляет от дополнительного запроса и гарантирует мгновенную загрузку графики. Стрелка нарисована с помощью тега &lt;path&gt;, а цвет задан атрибутом fill="currentColor", благодаря чему иконка наследует цвет текста родительского элемента и легко стилизуется через CSS.</text:p>
      <text:p text:style-name="P976"/>
      <text:p text:style-name="P977"/>
      <table:table table:style-name="Table978">
        <table:table-columns>
          <table:table-column table:style-name="TableColumn979"/>
        </table:table-columns>
        <table:table-row table:style-name="TableRow980">
          <table:table-cell table:style-name="TableCell981">
            <text:p text:style-name="Обычный"><text:span text:style-name="T982"><text:s text:c="11"/></text:span><text:span text:style-name="T983">&lt;button type="button" class="fab__btn" id="fab-scroll"</text:span></text:p>
            <text:p text:style-name="P984"><text:span text:style-name="T985"><text:s text:c="8"/></text:span><text:span text:style-name="T986">title="Наверх" aria-label="Прокрутка наверх"&gt;</text:span></text:p>
            <text:p text:style-name="P987"><text:span text:style-name="T988"><text:s text:c="2"/></text:span><text:span text:style-name="T989">&lt;svg viewBox="0 0 24 24" width="22" height="22"</text:span></text:p>
            <text:p text:style-name="P990"><text:s text:c="7"/>xmlns="http://www.w3.org/2000/svg" aria-hidden="true"&gt;</text:p>
            <text:p text:style-name="P991"><text:s text:c="4"/>&lt;path d="M12 5l7 7h-4v7H9v-7H5l7-7z" fill="currentColor"/&gt;</text:p>
            <text:p text:style-name="P992"><text:span text:style-name="T993"><text:s text:c="2"/></text:span><text:span text:style-name="T994">&lt;/svg&gt;</text:span></text:p>
            <text:p text:style-name="P995">&lt;/button&gt;</text:p>
          </table:table-cell>
        </table:table-row>
      </table:table>
      <text:p text:style-name="P996"/>
      <text:p text:style-name="P997">Листинг 3.11 – Встроенный SVG в кнопке «Наверх»</text:p>
      <text:p text:style-name="P998"/>
      <text:p text:style-name="P999">Таким образом, совместное использование XML и SVG позволило<text:s/>централизованно управлять содержимым сайта и обеспечить качественное отображение графики. XML-файлы служат облегчённой базой данных, а SVG-иконки гарантируют масштабируемость и визуальную целостность интерфейса на всех устройствах.</text:p>
      <text:p text:style-name="P1000"/>
      <text:p text:style-name="P1001">3.4<text:s/>Управление элементами DOM</text:p>
      <text:p text:style-name="P1002"/>
      <text:p text:style-name="P1003">JavaScript использовался в проекте для реализации всей клиентской интерактивности: динамической загрузки и парсинга XML-файлов, построения DOM-элементов на основе полученных данных, управления мобильным меню, лайтбоксом, аккордеоном, копированием текста и подсветкой активной навигации. Язык был выбран как стандартный инструмент фронтенд-разработки, поддерживаемый всеми браузерами без дополнительных зависимостей. Весь код размещён в файле main.js и обёрнут в самовызывающуюся функцию (function(){...})(), что предотвращает попадание переменных в глобальную область видимости.</text:p>
      <text:p text:style-name="P1004"/>
      <text:p text:style-name="P1005">Центральное место занимает универсальная функция fetchXml(), выполняющая HTTP-запрос к XML-файлу с помощью fetch(), преобразующая ответ в строку и затем в DOM-документ через DOMParser. Это позволило всем компонентам работать с данными единообразно.</text:p>
      <text:p text:style-name="P1006"/>
      <table:table table:style-name="Table1007">
        <table:table-columns>
          <table:table-column table:style-name="TableColumn1008"/>
        </table:table-columns>
        <table:table-row table:style-name="TableRow1009">
          <table:table-cell table:style-name="TableCell1010">
            <text:p text:style-name="P1011">function fetchXml(url) {</text:p>
            <text:p text:style-name="P1012"><text:s text:c="2"/>return fetch(url, { credentials: "same-origin" }).then(function (res) {</text:p>
            <text:p text:style-name="P1013"><text:s text:c="4"/>if (!res.ok) throw new Error("XML load failed: " + url);</text:p>
            <text:p text:style-name="P1014"><text:s text:c="4"/>return res.text();</text:p>
            <text:p text:style-name="P1015"><text:s text:c="2"/>}).then(function (txt) {</text:p>
            <text:p text:style-name="P1016"><text:s text:c="4"/>var p = new DOMParser();</text:p>
            <text:p text:style-name="P1017"><text:s text:c="4"/>return p.parseFromString(txt, "application/xml");</text:p>
            <text:p text:style-name="P1018"><text:span text:style-name="T1019"><text:s text:c="2"/></text:span><text:span text:style-name="T1020">});</text:span></text:p>
            <text:p text:style-name="P1021">}</text:p>
            <text:p text:style-name="P1022"/>
          </table:table-cell>
        </table:table-row>
      </table:table>
      <text:p text:style-name="P1023"/>
      <text:p text:style-name="P1024">Листинг 3.12 – Функция загрузки и парсинга XML</text:p>
      <text:p text:style-name="P1025"/>
      <text:p text:style-name="P1026">На главной странице функция<text:s/>initMarqueeFromPortfolioXml() асинхронно получает содержимое portfolio.xml, извлекает из него все элементы &lt;marqueeImage&gt;, формирует плоский массив URL, а затем создаёт двойной набор &lt;img&gt; для бесшовной CSS-анимации бегущей строки. Фрагмент кода, создающий<text:s/>и вставляющий изображения:</text:p>
      <text:p text:style-name="P1027"/>
      <table:table table:style-name="Table1028">
        <table:table-columns>
          <table:table-column table:style-name="TableColumn1029"/>
        </table:table-columns>
        <table:table-row table:style-name="TableRow1030">
          <table:table-cell table:style-name="TableCell1031">
            <text:p text:style-name="P1032">function appendRow() {</text:p>
            <text:p text:style-name="P1033"><text:s text:c="2"/>imgs.forEach(function (src) {</text:p>
            <text:p text:style-name="P1034"><text:s text:c="4"/>var im = document.createElement("img");</text:p>
            <text:p text:style-name="P1035"><text:s text:c="4"/>im.src = src;</text:p>
            <text:p text:style-name="P1036"><text:s text:c="4"/>im.alt = "";</text:p>
            <text:p text:style-name="P1037"><text:s text:c="4"/>im.loading = "lazy";</text:p>
            <text:p text:style-name="P1038"><text:s text:c="4"/>frag.appendChild(im);</text:p>
            <text:p text:style-name="P1039"><text:s text:c="2"/>});</text:p>
            <text:p text:style-name="P1040">}</text:p>
            <text:p text:style-name="P1041">appendRow();</text:p>
            <text:p text:style-name="P1042">appendRow();</text:p>
            <text:p text:style-name="P1043">track.appendChild(frag);</text:p>
            <text:p text:style-name="P1044"/>
          </table:table-cell>
        </table:table-row>
      </table:table>
      <text:p text:style-name="P1045"/>
      <text:p text:style-name="P1046">Листинг 3.13 – Генерация элементов бегущей строки</text:p>
      <text:p text:style-name="P1047"/>
      <text:p text:style-name="P1048">Функция initHomeFromSiteXml() считывает из site.xml приветствие, призыв к связи и копирайт, после чего обновляет текстовые узлы соответствующих элементов. Это демонстрирует отделение контента от вёрстки: редактирование текста в XML автоматически отражается на странице без правки HTML.</text:p>
      <text:p text:style-name="P1049"/>
      <text:p text:style-name="P1050">На странице вопросов initQuestionsAccordion() динамически строит аккордеон. Из XML извлекаются все элементы &lt;item&gt;, для каждого создаётся блок accordion__item с кнопкой и панелью. Обработчик клика на кнопке закрывает все остальные панели и открывает текущую, переключая класс is-open и атрибут aria-expanded. Ниже показан фрагмент создания одного элемента аккордеона:</text:p>
      <text:p text:style-name="P1051"/>
      <table:table table:style-name="Table1052">
        <table:table-columns>
          <table:table-column table:style-name="TableColumn1053"/>
        </table:table-columns>
        <table:table-row table:style-name="TableRow1054">
          <table:table-cell table:style-name="TableCell1055">
            <text:p text:style-name="P1056">var wrap = document.createElement("div");</text:p>
            <text:p text:style-name="P1057">wrap.className = "accordion__item";</text:p>
            <text:p text:style-name="P1058">var btn = document.createElement("button");</text:p>
            <text:p text:style-name="P1059">btn.type = "button";</text:p>
            <text:p text:style-name="P1060">btn.className = "accordion__btn";</text:p>
            <text:p text:style-name="P1061">btn.setAttribute("aria-expanded", "false");</text:p>
            <text:p text:style-name="P1062">btn.textContent =<text:s/>q.textContent.trim();</text:p>
            <text:p text:style-name="P1063">// … создание панели и обработчик</text:p>
            <text:p text:style-name="P1064">wrap.appendChild(btn);</text:p>
            <text:p text:style-name="P1065">wrap.appendChild(panel);</text:p>
            <text:p text:style-name="P1066">root.appendChild(wrap);</text:p>
            <text:p text:style-name="P1067"/>
          </table:table-cell>
        </table:table-row>
      </table:table>
      <text:p text:style-name="P1068"/>
      <text:p text:style-name="P1069">Листинг 3.14 – Динамическое построение элемента аккордеона</text:p>
      <text:p text:style-name="P1070"/>
      <text:p text:style-name="P1071">Страница портфолио заполняется функцией initPortfolioPage(), которая обрабатывает &lt;session&gt; из portfolio.xml. Для каждой сессии формируется ссылка-карточка с обложкой и оверлеем. URL для перехода в галерею строится динамически: gallery.html#НазваниеСессии. Это позволяет одной странице галереи обслуживать любое количество фотосессий, добавляемых в XML.</text:p>
      <text:p text:style-name="P1072"/>
      <text:p text:style-name="P1073">Наиболее насыщенная логика у галереи (initGalleryPage()). Она реализует masonry-раскладку фотографий, полноэкранный лайтбокс и навигацию. Функция renderGallery() очищает контейнер и для каждого URL создаёт фигуру с кнопкой, при клике на которую вызывается openAt() — отображение соответствующего снимка в лайтбоксе. Лайтбокс управляется через атрибут hidden, а индексы пересчитываются циклически, позволяя листать фото стрелками на экране и клавишами клавиатуры. Также реализована реакция на изменение хэша в адресной строке, что даёт возможность делиться ссылкой на конкретную сессию.</text:p>
      <text:p text:style-name="P1074"/>
      <table:table table:style-name="Table1075">
        <table:table-columns>
          <table:table-column table:style-name="TableColumn1076"/>
        </table:table-columns>
        <table:table-row table:style-name="TableRow1077">
          <table:table-cell table:style-name="TableCell1078">
            <text:p text:style-name="P1079">function openAt(i) {</text:p>
            <text:p text:style-name="P1080"><text:s text:c="2"/>if (!state.images.length || !lbImg || !lbCap || !lightbox) return;</text:p>
            <text:p text:style-name="P1081"><text:s text:c="2"/>state.ii = ((i %<text:s/>state.images.length) + state.images.length) % state.images.length;</text:p>
            <text:p text:style-name="P1082"><text:s text:c="2"/>lbImg.src = state.images[state.ii];</text:p>
            <text:p text:style-name="P1083"><text:s text:c="2"/>lbImg.alt = state.title;</text:p>
            <text:p text:style-name="P1084"><text:s text:c="2"/>lbCap.textContent = state.title + " — " + (state.ii + 1) + " / " + state.images.length;</text:p>
            <text:p text:style-name="P1085"><text:s text:c="2"/>lightbox.hidden = false;</text:p>
            <text:p text:style-name="P1086"><text:s text:c="2"/>document.body.style.overflow = "hidden";</text:p>
            <text:p text:style-name="P1087">}</text:p>
            <text:p text:style-name="P1088"/>
          </table:table-cell>
        </table:table-row>
      </table:table>
      <text:p text:style-name="P1089"/>
      <text:p text:style-name="P1090">Листинг 3.15 – Функция открытия изображения в лайтбоксе</text:p>
      <text:p text:style-name="P1091"/>
      <text:p text:style-name="P1092">Дополнительные функции управления DOM включают: initNavToggle() для мобильного меню (переключение класса is-open и aria-expanded), initFabScroll() для плавной<text:s/>прокрутки наверх, initPhoneCopy() для копирования номера телефона в буфер обмена с резервным полифиллом и всплывающим toast-уведомлением, initNavActive() для подсветки активного пункта меню на основе атрибута data-page. Все функции вызываются после полной<text:s/>загрузки DOM в обработчике DOMContentLoaded, что гарантирует готовность элементов к взаимодействию. Такой модульный подход обеспечил чёткое разделение ответственности и простоту дальнейшей поддержки.<text:line-break/>3.5 Выводы</text:p>
      <text:p text:style-name="P1093"/>
      <text:p text:style-name="P1094">Реализация структуры веб-сайта завершена в<text:s/>полном соответствии с техническим заданием и спроектированными прототипами. Разработаны пять HTML-документов с семантической вёрсткой, где каждый структурный элемент (&lt;header&gt;, &lt;nav&gt;, &lt;main&gt;, &lt;section&gt;, &lt;article&gt;, &lt;footer&gt;) выполняет свою логическую роль.<text:s/>Применение SCSS с переменными, вложенностью и медиазапросами позволило создать гибкую адаптивную стилизацию, единую для всех страниц, а компиляция в main.css упростила подключение и поддержку. Данные, вынесенные в XML-файлы site.xml и portfolio.xml, отделены от представления, что обеспечивает удобное обновление контента. Векторная графика в формате SVG применена как для фавикона и иконок соцсетей, так и встроена непосредственно в разметку, гарантируя масштабируемость и малый объём. JavaScript-модуль main.js<text:s/>реализует всю клиентскую динамику: загрузку и парсинг XML, построение карточек портфолио, masonry-галереи, аккордеона, работу лайтбокса с навигацией, копирование номера телефона и управление мобильным меню. Модульная структура кода обеспечивает чёткое разделение ответственности и простоту дальнейшего сопровождения. Таким образом, практическая реализация полностью подготовила сайт к этапу тестирования.</text:p>
      <text:p text:style-name="P1095"/>
      <text:p text:style-name="P1096"/>
      <text:p text:style-name="P1097">4 Тестирование веб-сайта</text:p>
      <text:p text:style-name="P1098">4.1 Адаптивный дизайн веб-сайта</text:p>
      <text:p text:style-name="P1099"/>
      <text:p text:style-name="P1100">Адаптивный дизайн является одним из<text:s/>ключевых требований современной веб-разработки, поскольку пользователи обращаются к сайтам с различных устройств. В рамках тестирования адаптивного дизайна разработанный веб-сайт был проверен на корректность отображения при различных разрешениях экрана с использованием встроенных инструментов разработчика в браузере Google Chrome. Тестирование проводилось для следующих контрольных точек: ширина экрана 1920×1080 пикселей, 1366×768 пикселей, 768×1024 пикселей, а также 375×667 пикселей и 414×896 пикселей.</text:p>
      <text:p text:style-name="P1101">На десктопных разрешениях (ширина более 960 пикселей) главная страница корректно отображает трёхколоночную сетку категорий съёмок, где каждая карточка равномерно распределяется в строке. Четырёхколоночная сетка портфолио на странице portfolio.html эффективно использует пространство, а masonry-галерея на gallery.html формирует три столбца с плотной укладкой фотографий. Блок связи на главной странице выстроен в две колонки: слева фотография фотографа, справа — текст и кнопки. Бегущая строка масштабируется по высоте с помощью функции clamp(), достигая максимальной высоты 20rem на больших экранах.</text:p>
      <text:p text:style-name="P1102">При средних разрешениях (от 768 до 960 пикселей) начинают срабатывать медиазапросы, оптимизирующие компоновку. Сетка портфолио автоматически перестраивается с четырёх на две колонки, masonry-галерея сокращается до двух столбцов, что предотвращает чрезмерное сжатие миниатюр. Размеры шрифтов и отступы плавно уменьшаются благодаря использованию относительных единиц и функции clamp(), сохраняя читаемость и гармоничные пропорции.</text:p>
      <text:p text:style-name="P1103">На мобильных устройствах (ширина экрана менее 720 пикселей) активируется основной адаптивный режим. Навигационное меню трансформируется в гамбургер: ссылки скрываются в раскрывающуюся панель, которая анимируется по клику на кнопку с тремя полосками. Сетка категорий на главной странице и секция контактов переходят в одноколоночный режим, все элементы выстраиваются вертикально для удобного скроллинга. Masonry-галерея при ширине менее 560 пикселей переключается в одну колонку, фотографии выводятся на всю ширину экрана. Форма обратной связи и аккордеон вопросов сохраняют свою функциональность, а размеры шрифтов адаптируются в заданных диапазонах clamp(), гарантируя комфортное чтение без масштабирования. Все интерактивные элементы, включая лайтбокс и кнопку «Наверх», остаются доступными и удобными для нажатия пальцем.</text:p>
      <text:p text:style-name="P1104"/>
      <text:p text:style-name="P1105">4.2 Кроссбраузерность веб-сайта</text:p>
      <text:p text:style-name="P1106">Разные браузеры могут по-разному интерпретировать CSS-свойства и JavaScript-методы, поэтому то, что отлично работает в Google Chrome, может выглядеть некорректно в<text:s/>Mozilla Firefox или Safari. Для проверки кроссбраузерной совместимости разработанный веб-сайт был открыт в нескольких наиболее популярных браузерах. В каждом из этих браузеров проверялось корректное отображение всех элементов интерфейса, правильная работа<text:s/>анимаций и переходов, а также функциональность JavaScript-сценариев.</text:p>
      <text:p text:style-name="P1107">В браузере Google Chrome сайт отображается в полном соответствии с задуманным дизайном. Все CSS-свойства, включая Grid и Flexbox для адаптивных сеток, анимация бегущей строки marquee-scroll, плавные переходы и медиазапросы, работают корректно. JavaScript-функции, включая асинхронную загрузку XML-файлов с помощью fetch, парсинг через DOMParser, динамическое построение портфолио, галереи и аккордеона, открытие лайтбокса и копирование номера<text:s/>телефона, выполняются без ошибок. В консоли разработчика отсутствуют сообщения об ошибках или предупреждениях.</text:p>
      <text:p text:style-name="P1108">В браузере Mozilla Firefox сайт также отображается корректно. Эффект размытого фона шапки, реализованный через backdrop-filter с вендорным префиксом -webkit-, применяется штатно. CSS-анимации, включая marquee-scroll и grid-template-rows аккордеона, воспроизводятся плавно. JavaScript-функции работают идентично браузеру Chrome, что подтверждает кроссплатформенность написанного кода.</text:p>
      <text:p text:style-name="P1109">В браузере Safari<text:s/>было проверено отображение сайта на операционной системе macOS и iOS. Особое внимание уделялось поддержке SVG-графики и копирования текста. Все SVG-иконки, включая фавикон и кнопки соцсетей, отображаются корректно. Функция копирования номера телефона успешно использует современный navigator.clipboard.writeText(), а на более старых версиях срабатывает полифилл с document.execCommand('copy'). Анимации и плавный скроллинг scroll-behavior: smooth поддерживаются актуальными версиями Safari.</text:p>
      <text:p text:style-name="P1110">В браузере<text:s/>Microsoft Edge сайт отображается аналогично Google Chrome, поскольку оба браузера используют один и тот же рендеринговый движок Chromium. Все функции, включая CSS Grid, кастомные свойства и современные JavaScript-методы, поддерживаются в полном объёме.</text:p>
      <text:p text:style-name="P1111">В процессе тестирования был учтён режим prefers-reduced-motion, активируемый в настройках операционной системы. При включении этого режима CSS-анимация бегущей строки корректно отключается, что исключает дискомфорт для пользователей с чувствительностью к движению. В целом по результатам кроссбраузерного тестирования было установлено, что веб-сайт корректно отображается и функционирует во всех современных браузерах, а реализованные полифиллы и вендорные префиксы обеспечивают совместимость без влияния на общую работоспособность и удобство использования.</text:p>
      <text:p text:style-name="P1112"><text:span text:style-name="T1113">4.3<text:s/></text:span><text:span text:style-name="T1114">Тестирование</text:span><text:span text:style-name="T1115"><text:s/></text:span><text:span text:style-name="T1116">через</text:span><text:span text:style-name="T1117"><text:s/>W3C Markup Validation Service</text:span></text:p>
      <text:p text:style-name="P1118"/>
      <text:p text:style-name="P1119">Для подтверждения соответствия HTML-кода современным стандартам веб-разработки было проведено тестирование через официальный сервис валидации Консорциума W3C (W3C Markup Validation Service). Данный инструмент позволяет автоматически проверить синтаксическую корректность HTML-документов и выявить нарушения спецификации HTML5.</text:p>
      <text:p text:style-name="P1120"/>
      <text:p text:style-name="P1121">Тестированию подверглись все страницы веб-сайта: главная (index.html), портфолио (portfolio.html), галерея (gallery.html), контакты (contacts.html) и вопросы (questions.html). Каждая страница была проверена методом прямой вставки исходного кода в валидатор, а также посредством проверки по URL развёрнутой версии сайта на GitHub Pages.</text:p>
      <text:p text:style-name="P1122"/>
      <text:p text:style-name="P1123">По результатам валидации все пять страниц успешно прошли проверку. Ошибок и предупреждений не обнаружено, что подтверждает полное соответствие HTML-кода стандарту HTML5. На рисунках 4.1–4.4 представлены результаты проверки для главной страницы, портфолио, галереи и контактов соответственно.</text:p>
      <text:p text:style-name="P1124"><text:span text:style-name="T1125"><draw:frame draw:style-name="a7" draw:name="Рисунок 14" text:anchor-type="as-char" svg:x="0in" svg:y="0in" svg:width="6.69236in" svg:height="3.87639in" style:rel-width="scale" style:rel-height="scale"><draw:image xlink:href="media/image8.png" xlink:type="simple" xlink:show="embed" xlink:actuate="onLoad"/><svg:title/><svg:desc/></draw:frame></text:span></text:p>
      <text:p text:style-name="P1126">Рисунок 4.1 — Проверка на валидность главной страницы (index.html)</text:p>
      <text:p text:style-name="P1127"><text:span text:style-name="T1128"><draw:frame draw:style-name="a8" draw:name="Рисунок 15" text:anchor-type="as-char" svg:x="0in" svg:y="0in" svg:width="6.69236in" svg:height="3.66458in" style:rel-width="scale" style:rel-height="scale"><draw:image xlink:href="media/image9.png" xlink:type="simple" xlink:show="embed" xlink:actuate="onLoad"/><svg:title/><svg:desc/></draw:frame></text:span></text:p>
      <text:p text:style-name="P1129">Рисунок 4.2 — Проверка на валидность страницы портфолио (portfolio.html)</text:p>
      <text:p text:style-name="P1130"><text:span text:style-name="T1131"><draw:frame draw:style-name="a9" draw:name="Рисунок 16" text:anchor-type="as-char" svg:x="0in" svg:y="0in" svg:width="6.69236in" svg:height="3.80972in" style:rel-width="scale" style:rel-height="scale"><draw:image xlink:href="media/image10.png" xlink:type="simple" xlink:show="embed" xlink:actuate="onLoad"/><svg:title/><svg:desc/></draw:frame></text:span></text:p>
      <text:p text:style-name="P1132">Рисунок 4.3 — Проверка на валидность страницы галереи<text:s/>(gallery.html)</text:p>
      <text:p text:style-name="P1133"><text:span text:style-name="T1134"><draw:frame draw:style-name="a10" draw:name="Рисунок 17" text:anchor-type="as-char" svg:x="0in" svg:y="0in" svg:width="6.69236in" svg:height="3.73056in" style:rel-width="scale" style:rel-height="scale"><draw:image xlink:href="media/image11.png" xlink:type="simple" xlink:show="embed" xlink:actuate="onLoad"/><svg:title/><svg:desc/></draw:frame></text:span></text:p>
      <text:p text:style-name="P1135">Рисунок 4.4 — Проверка на валидность страницы контактов (contacts.html)</text:p>
      <text:p text:style-name="P1136"/>
      <text:p text:style-name="P1137">Таким образом, код всех страниц веб-сайта фотографа полностью соответствует требованиям спецификации HTML5, что гарантирует корректную интерпретацию разметки браузерами и поисковыми системами.</text:p>
      <text:p text:style-name="P1138"/>
      <text:p text:style-name="P1139">4.4 Выводы</text:p>
      <text:p text:style-name="P1140"/>
      <text:p text:style-name="P1141">Проведённое тестирование подтвердило полное соответствие разработанного веб-сайта требованиям технического задания в части адаптивности, кроссбраузерности и валидности кода. Адаптивный дизайн обеспечивает корректное<text:s/>отображение страниц во всём диапазоне экранов — от десктопных мониторов с разрешением 1920×1080 пикселей до мобильных устройств с шириной 375 пикселей; при этом сетки перестраиваются, навигация трансформируется в гамбургер-меню, а размеры элементов масштабируются с помощью функции clamp() без потери читаемости и функциональности. Кроссбраузерное тестирование, выполненное в браузерах Google Chrome, Mozilla Firefox, Safari и Microsoft Edge, показало идентичность визуального отображения и стабильную работу всех JavaScript-сценариев, включая асинхронную загрузку XML, анимации бегущей строки и аккордеона, а также копирование номера телефона с полифиллом. Проверка через W3C Markup Validation Service не выявила ошибок или предупреждений ни на одной из пяти страниц<text:s/>сайта, что свидетельствует о строгом соблюдении спецификации HTML5. Таким образом, веб-сайт полностью готов к публикации и практическому использованию.</text:p>
      <text:p text:style-name="P1142"/>
      <text:p text:style-name="P1143"/>
      <text:p text:style-name="P1144"/>
      <text:p text:style-name="P1145">Заключение</text:p>
      <text:p text:style-name="P1146"/>
      <text:p text:style-name="P1147">В ходе выполнения курсового проекта был спроектирован и реализован персональный веб-сайт<text:s/>фотографа Angelina Telpuk, представляющий портфолио, направления съёмок и контактную информацию в едином визуально привлекательном цифровом пространстве.</text:p>
      <text:p text:style-name="P1148">Поставленная цель — создание современного адаптивного ресурса для демонстрации работ и взаимодействия<text:s/>с клиентами — достигнута в полном объёме.</text:p>
      <text:p text:style-name="P1149">По результатам выполнения курсового проекта получены следующие основные результаты.</text:p>
      <text:p text:style-name="P1150">Разработана архитектура веб-сайта. Создан многостраничный иерархический веб-сайт, включающий 5 HTML-документов: главная страница,<text:s/>портфолио, галерея, контакты и вопросы-ответы, объединённых единой системой навигации с адаптивным мобильным меню.</text:p>
      <text:p text:style-name="P1151">Реализована семантическая вёрстка на HTML5. Использованы теги &lt;header&gt;, &lt;nav&gt;, &lt;main&gt;, &lt;section&gt;, &lt;article&gt;, &lt;figure&gt;, &lt;footer&gt;, что обеспечивает логическую структуру документов и доступность.</text:p>
      <text:p text:style-name="P1152">Создана адаптивная и кроссбраузерная вёрстка с применением SCSS и CSS3. Разработана единая таблица стилей main.css с переменными, вложенностью и медиазапросами, охватывающими диапазон экранов от 375 до 1920 пикселей. Сетки на Grid и Flexbox адаптируют количество колонок: от трёх до одной на главной, от четырёх до одной в галерее. Тестирование в браузерах Chrome, Firefox, Safari и Edge подтвердило корректность отображения.</text:p>
      <text:p text:style-name="P1153">Реализовано хранение данных в формате XML. Файлы site.xml и portfolio.xml содержат весь текстовый и конфигурационный контент, что позволяет централизованно управлять информацией без правки HTML-кода.</text:p>
      <text:p text:style-name="P1154">Разработаны интерактивные элементы на JavaScript. Реализованы: загрузка и парсинг XML через fetch и DOMParser, динамическое построение карточек портфолио и masonry-галереи, лайтбокс с клавиатурной навигацией, аккордеон FAQ с плавной анимацией, копирование номера телефона в буфер обмена с toast-уведомлением и полифиллом, мобильное гамбургер-меню<text:s/>и подсветка активного пункта навигации.</text:p>
      <text:p text:style-name="P1155">Использована векторная графика SVG. Встроенные и внешние SVG-иконки (камера, почта, Telegram, Instagram, стрелка «наверх») обеспечивают масштабируемость без потери качества и малый размер файлов.</text:p>
      <text:p text:style-name="P1156">Проведено тестирование. Выполнена проверка валидности HTML и CSS через сервисы W3C, протестированы интерактивные элементы, подтверждена адаптивность и кроссбраузерность. Разработано руководство пользователя.</text:p>
      <text:p text:style-name="P1157">Подготовлена пояснительная записка. Оформлен полный комплект документации в соответствии с требованиями. Все материалы, включая исходный код, размещены в репозитории на платформе GitHub.</text:p>
      <text:p text:style-name="P1158"/>
      <text:p text:style-name="P1159">СПИСОК ИСПОЛЬЗОВАННЫХ ЛИТЕРАТУРНЫХ ИСТОЧНИКОВ</text:p>
      <text:list text:style-name="LFO1" text:continue-numbering="true">
        <text:list-item>
          <text:p text:style-name="P1160"><text:span text:style-name="T1161">HTML. Web-технологии. Спецификации и стандарты [Электронный ресурс] // World Wide Web<text:s/></text:span><text:span text:style-name="T1162">Consortium. – Режим доступа:<text:s/></text:span><text:a xlink:href="https://www.w3.org./" office:target-frame-name="_top" xlink:show="replace"><text:span text:style-name="T1163">https://www.w3.org.</text:span></text:a><text:span text:style-name="T1164"><text:s/>– Дата доступа: 10.04.2026.</text:span></text:p>
        </text:list-item>
        <text:list-item>
          <text:p text:style-name="P1165"><text:span text:style-name="T1166">MDN Web Docs. Справочное руководство по HTML5 и CSS3 [Электронный ресурс]. – Режим доступа:<text:s/></text:span><text:a xlink:href="https://developer.mozilla.org./ru/" office:target-frame-name="_top" xlink:show="replace"><text:span text:style-name="T1167">https://developer.mozilla.org.</text:span></text:a><text:span text:style-name="T1168"><text:s/>– Дата доступа: 10.04.2026.</text:span></text:p>
        </text:list-item>
        <text:list-item>
          <text:p text:style-name="P1169"><text:span text:style-name="T1170">Sass: Syntactically Awesome Style Sheets.<text:s/></text:span><text:span text:style-name="T1171">Официальная документация препроцессора SCSS [Электронный ресурс]. – Режим доступа</text:span><text:a xlink:href="https://sass-lang.com/" office:target-frame-name="_top" xlink:show="replace"><text:span text:style-name="T1172">: https://sass-lang.com.</text:span></text:a><text:span text:style-name="T1173"><text:s/>– Дата</text:span><text:span text:style-name="T1174"><text:s/>доступа: 10.04.2026.</text:span></text:p>
        </text:list-item>
        <text:list-item>
          <text:p text:style-name="P1175"><text:span text:style-name="T1176">Кантор, И. Современный учебник JavaScript [Электронный ресурс]. – Режим доступа:<text:s/></text:span><text:a xlink:href="https://learn.javascript.ru./" office:target-frame-name="_top" xlink:show="replace"><text:span text:style-name="T1177">https://learn.javascript.ru.</text:span></text:a><text:span text:style-name="T1178"><text:s/>– Дата доступа: 10.04.2026.</text:span></text:p>
        </text:list-item>
        <text:list-item>
          <text:p text:style-name="P1179"><text:span text:style-name="T1180">Проектирование интерфейсов в Figma. Справочный це</text:span><text:span text:style-name="T1181">нтр разработчика [Электронный ресурс]. – Режим доступа:<text:s/></text:span><text:a xlink:href="https://help.figma.com/hc/en-us" office:target-frame-name="_top" xlink:show="replace"><text:span text:style-name="T1182">https://help.figma.com.</text:span></text:a><text:span text:style-name="T1183"><text:s/>– Дата доступа: 10.04.2026.</text:span></text:p>
        </text:list-item>
        <text:list-item>
          <text:p text:style-name="P1184"><text:span text:style-name="T1185">Гаевский, А. Ю. Создание Web-страниц и Web-сайтов. Самоучитель [Электронный ресурс] / А. Ю. Гаевски</text:span><text:span text:style-name="T1186">й, В. А. Романовский. – Режим доступа:<text:s/></text:span><text:a xlink:href="https://znanium.ru/" office:target-frame-name="_top" xlink:show="replace"><text:span text:style-name="T1187">znanium.com.</text:span></text:a><text:span text:style-name="T1188"><text:s/>– Дата доступа: 10.04.2026.</text:span></text:p>
        </text:list-item>
        <text:list-item>
          <text:p text:style-name="P1189"><text:span text:style-name="T1190">Дронов</text:span><text:span text:style-name="T1191">,<text:s/></text:span><text:span text:style-name="T1192">В</text:span><text:span text:style-name="T1193">.<text:s/></text:span><text:span text:style-name="T1194">А</text:span><text:span text:style-name="T1195">. HTML5, CSS3<text:s/></text:span><text:span text:style-name="T1196">и</text:span><text:span text:style-name="T1197"><text:s/>JavaScript.<text:s/></text:span><text:span text:style-name="T1198">Исчерпывающее руководство [Электронный ресурс]. – Режим доступа:</text:span><text:a xlink:href="https://bhv.ru./" office:target-frame-name="_top" xlink:show="replace"><text:span text:style-name="T1199"><text:s/></text:span><text:span text:style-name="T1200">bhv.ru.</text:span></text:a><text:span text:style-name="T1201"><text:s/>– Дата доступа: 10.04.2026.</text:span></text:p>
        </text:list-item>
        <text:list-item>
          <text:p text:style-name="P1202"><text:span text:style-name="T1203">Валидатор разметки W3C (Nu Html Checker) [Электронный ресурс]. – Режим доступа:<text:s/></text:span><text:a xlink:href="https://validator.w3.org./" office:target-frame-name="_top" xlink:show="replace"><text:span text:style-name="T1204">https://validator.w3.org.</text:span></text:a><text:span text:style-name="T1205"><text:s/>– Дата доступа: 10.04.2026.</text:span></text:p>
        </text:list-item>
        <text:list-item>
          <text:p text:style-name="P1206"><text:span text:style-name="T1207">GitHub Docs. Документация по работе с сист</text:span><text:span text:style-name="T1208">емой контроля версий Git [Электронный ресурс]. – Режим доступа:<text:s/></text:span><text:a xlink:href="https://docs.github.com./ru" office:target-frame-name="_top" xlink:show="replace"><text:span text:style-name="T1209">https://docs.github.com.</text:span></text:a><text:span text:style-name="T1210"><text:s/>– Дата доступа: 10.04.2026.</text:span></text:p>
        </text:list-item>
      </text:list>
      <text:p text:style-name="P1211"/>
      <text:p text:style-name="P1212"/>
      <text:p text:style-name="P1213">ПРИЛОЖЕНИЕ А</text:p>
      <text:p text:style-name="P1214">Прототипы веб-страниц</text:p>
      <text:p text:style-name="P1215"/>
      <text:p text:style-name="P1216"><text:span text:style-name="T1217"><draw:frame draw:style-name="a11" draw:name="Рисунок 18" text:anchor-type="as-char" svg:x="0in" svg:y="0in" svg:width="5.2299in" svg:height="7.73024in" style:rel-width="scale" style:rel-height="scale"><draw:image xlink:href="media/image3.png" xlink:type="simple" xlink:show="embed" xlink:actuate="onLoad"/><svg:title/><svg:desc/></draw:frame></text:span><text:span text:style-name="T1218"><text:line-break/></text:span><text:span text:style-name="T1219">Рисунок А.1 — Прототип главной страницы</text:span></text:p>
      <text:p text:style-name="P1220"/>
      <text:p text:style-name="P1221"><text:span text:style-name="T1222"><text:line-break/></text:span><text:span text:style-name="T1223"><draw:frame draw:style-name="a12" draw:name="Рисунок 12" text:anchor-type="as-char" svg:x="0in" svg:y="0in" svg:width="6.69236in" svg:height="3.3125in" style:rel-width="scale" style:rel-height="scale"><draw:image xlink:href="media/image7.png" xlink:type="simple" xlink:show="embed" xlink:actuate="onLoad"/><svg:title/><svg:desc/></draw:frame></text:span></text:p>
      <text:p text:style-name="P1224"><text:span text:style-name="T1225">Рисунок А.</text:span><text:span text:style-name="T1226">2</text:span><text:span text:style-name="T1227"><text:s/>— Прототип<text:s/></text:span><text:span text:style-name="T1228">страницы с вопросами</text:span></text:p>
      <text:p text:style-name="P1229"/>
      <text:p text:style-name="P1230"><text:span text:style-name="T1231"><draw:frame draw:style-name="a13" draw:name="Рисунок 13" text:anchor-type="as-char" svg:x="0in" svg:y="0in" svg:width="6.69236in" svg:height="3.33194in" style:rel-width="scale" style:rel-height="scale"><draw:image xlink:href="media/image6.png" xlink:type="simple" xlink:show="embed" xlink:actuate="onLoad"/><svg:title/><svg:desc/></draw:frame></text:span></text:p>
      <text:p text:style-name="P1232"><text:span text:style-name="T1233">Рисунок А.</text:span><text:span text:style-name="T1234">3</text:span><text:span text:style-name="T1235"><text:s/>— Прототип</text:span><text:span text:style-name="T1236"><text:s/>страницы с обратной связью</text:span></text:p>
      <text:p text:style-name="P1237"/>
      <text:p text:style-name="P1238"><text:span text:style-name="T1239"><draw:frame draw:style-name="a14" draw:name="Рисунок 14" text:anchor-type="as-char" svg:x="0in" svg:y="0in" svg:width="6.69236in" svg:height="3.29514in" style:rel-width="scale" style:rel-height="scale"><draw:image xlink:href="media/image4.png" xlink:type="simple" xlink:show="embed" xlink:actuate="onLoad"/><svg:title/><svg:desc/></draw:frame></text:span></text:p>
      <text:p text:style-name="P1240"><text:span text:style-name="T1241">Рисунок А</text:span><text:span text:style-name="T1242">.4</text:span><text:span text:style-name="T1243"><text:s/>— Прототип<text:s/></text:span><text:span text:style-name="T1244">страницы с портфолио</text:span></text:p>
      <text:p text:style-name="P1245"/>
      <text:p text:style-name="P1246"><text:span text:style-name="T1247"><draw:frame draw:style-name="a15" draw:name="Рисунок 17" text:anchor-type="as-char" svg:x="0in" svg:y="0in" svg:width="2.56286in" svg:height="8.59495in" style:rel-width="scale" style:rel-height="scale"><draw:image xlink:href="media/image5.png" xlink:type="simple" xlink:show="embed" xlink:actuate="onLoad"/><svg:title/><svg:desc/></draw:frame></text:span><text:span text:style-name="T1248"><text:s/></text:span></text:p>
      <text:p text:style-name="P1249"/>
      <text:p text:style-name="P1250"><text:span text:style-name="T1251">Рисунок А.</text:span><text:span text:style-name="T1252">5</text:span><text:span text:style-name="T1253"><text:s/>— Прототип<text:s/></text:span><text:span text:style-name="T1254">страницы с галерея</text:span></text:p>
      <text:p text:style-name="P1255"/>
      <text:p text:style-name="P1256"/>
      <text:p text:style-name="P1257"/>
      <text:p text:style-name="P1258"/>
      <text:p text:style-name="P1259">ПРИЛОЖЕНИЕ Б</text:p>
      <text:p text:style-name="P1260">Макет структуры веб-сайта<text:s/></text:p>
      <text:p text:style-name="P1261"><text:span text:style-name="T1262"><draw:frame draw:style-name="a16" draw:name="Рисунок 19" text:anchor-type="as-char" svg:x="0in" svg:y="0in" svg:width="6.0946in" svg:height="4.02139in" style:rel-width="scale" style:rel-height="scale"><draw:image xlink:href="media/image12.png" xlink:type="simple" xlink:show="embed" xlink:actuate="onLoad"/><svg:title/><svg:desc/></draw:frame></text:span></text:p>
      <text:p text:style-name="P1263">Рис Б.1 Макет<text:s/>структуры веб-сайта</text:p>
      <text:p text:style-name="P1264"/>
      <text:p text:style-name="P1265"/>
      <text:p text:style-name="P1266">ПРИЛОЖЕНИЕ В</text:p>
      <table:table table:style-name="Table1267">
        <table:table-columns>
          <table:table-column table:style-name="TableColumn1268"/>
        </table:table-columns>
        <table:table-row table:style-name="TableRow1269">
          <table:table-cell table:style-name="TableCell1270">
            <text:p text:style-name="P1271">&lt;!DOCTYPE html&gt;</text:p>
            <text:p text:style-name="P1272">&lt;html lang="ru"&gt;</text:p>
            <text:p text:style-name="P1273">&lt;head&gt;</text:p>
            <text:p text:style-name="P1274"><text:s text:c="2"/>&lt;meta charset="UTF-8"&gt;</text:p>
            <text:p text:style-name="P1275"><text:s text:c="2"/>&lt;meta name="viewport" content="width=device-width, initial-scale=1.0"&gt;</text:p>
            <text:p text:style-name="P1276"><text:s text:c="2"/>&lt;title&gt;Angelina Telpuk — фотограф&lt;/title&gt;</text:p>
            <text:p text:style-name="P1277"><text:s text:c="2"/>&lt;link rel="icon" href="Reolization/camera.svg" type="image/svg+xml"&gt;</text:p>
            <text:p text:style-name="P1278"><text:s text:c="2"/>&lt;link rel="preconnect" href="https://fonts.googleapis.com"&gt;</text:p>
            <text:p text:style-name="P1279"><text:s text:c="2"/>&lt;link rel="preconnect" href="https://fonts.gstatic.com" crossorigin&gt;</text:p>
            <text:p text:style-name="P1280"><text:s text:c="2"/>&lt;link<text:s/>href="https://fonts.googleapis.com/css2?family=Cormorant+Garamond:ital,wght@0,400;0,500;0,600;1,400&amp;family=Montserrat:wght@400;500;600&amp;display=swap" rel="stylesheet"&gt;</text:p>
            <text:p text:style-name="P1281"><text:s text:c="2"/>&lt;link rel="stylesheet" href="css/main.css"&gt;</text:p>
            <text:p text:style-name="P1282">&lt;/head&gt;</text:p>
            <text:p text:style-name="P1283">&lt;body class="page page--home" data-page="home"&gt;</text:p>
            <text:p text:style-name="P1284"><text:s text:c="2"/>&lt;header class="site-header" role="banner"&gt;</text:p>
            <text:p text:style-name="P1285"><text:s text:c="4"/>&lt;div class="site-header__inner"&gt;</text:p>
            <text:p text:style-name="P1286"><text:s text:c="6"/>&lt;p class="site-brand" id="site-brand"&gt;ANGELINA TELPUK&lt;/p&gt;</text:p>
            <text:p text:style-name="P1287"><text:s text:c="6"/>&lt;button type="button" class="nav-toggle" id="nav-toggle" aria-expanded="false" aria-controls="site-nav" aria-label="Открыть меню"&gt;</text:p>
            <text:p text:style-name="P1288"><text:s text:c="8"/>&lt;span&gt;&lt;/span&gt;&lt;span&gt;&lt;/span&gt;&lt;span&gt;&lt;/span&gt;</text:p>
            <text:p text:style-name="P1289"><text:s text:c="6"/>&lt;/button&gt;</text:p>
            <text:p text:style-name="P1290"><text:s text:c="6"/>&lt;nav class="site-nav" id="site-nav" aria-label="Основная навигация"&gt;</text:p>
            <text:p text:style-name="P1291"><text:s text:c="8"/>&lt;ul class="site-nav__list"&gt;</text:p>
            <text:p text:style-name="P1292"><text:s text:c="10"/>&lt;li&gt;&lt;a href="index.html"&gt;Главная&lt;/a&gt;&lt;/li&gt;</text:p>
            <text:p text:style-name="P1293"><text:s text:c="10"/>&lt;li&gt;&lt;a href="portfolio.html"&gt;Портфолио&lt;/a&gt;&lt;/li&gt;</text:p>
            <text:p text:style-name="P1294"><text:s text:c="10"/>&lt;li&gt;&lt;a href="contacts.html"&gt;Контакты&lt;/a&gt;&lt;/li&gt;</text:p>
            <text:p text:style-name="P1295"><text:s text:c="10"/>&lt;li&gt;&lt;a href="questions.html"&gt;Вопросы&lt;/a&gt;&lt;/li&gt;</text:p>
            <text:p text:style-name="P1296"><text:s text:c="8"/>&lt;/ul&gt;</text:p>
            <text:p text:style-name="P1297"><text:s text:c="6"/>&lt;/nav&gt;</text:p>
            <text:p text:style-name="P1298"><text:s text:c="4"/>&lt;/div&gt;</text:p>
            <text:p text:style-name="P1299"><text:s text:c="2"/>&lt;/header&gt;</text:p>
            <text:p text:style-name="P1300"/>
            <text:p text:style-name="P1301"><text:s text:c="2"/>&lt;div class="marquee-wrap" aria-hidden="true"&gt;</text:p>
            <text:p text:style-name="P1302"><text:s text:c="4"/>&lt;div class="marquee" id="marquee-track"&gt;&lt;/div&gt;</text:p>
            <text:p text:style-name="P1303"><text:s text:c="2"/>&lt;/div&gt;</text:p>
            <text:p text:style-name="P1304"/>
            <text:p text:style-name="P1305"><text:s text:c="2"/>&lt;main class="site-main" id="main"&gt;</text:p>
            <text:p text:style-name="P1306"><text:s text:c="4"/>&lt;section class="hero" aria-labelledby="hero-title"&gt;</text:p>
            <text:p text:style-name="P1307"><text:s text:c="6"/>&lt;h1 class="hero__title visually-hidden"<text:s/>id="hero-title"&gt;Angelina Telpuk&lt;/h1&gt;</text:p>
            <text:p text:style-name="P1308"><text:s text:c="6"/>&lt;div class="hero__text intro-text" id="intro-text"&gt;&lt;/div&gt;</text:p>
            <text:p text:style-name="P1309"><text:s text:c="4"/>&lt;/section&gt;</text:p>
            <text:p text:style-name="P1310"/>
            <text:p text:style-name="P1311"><text:s text:c="4"/>&lt;section class="categories" aria-label="Направления"&gt;</text:p>
            <text:p text:style-name="P1312"><text:s text:c="6"/>&lt;article class="cat-card"&gt;</text:p>
            <text:p text:style-name="P1313"><text:s text:c="8"/>&lt;a<text:s/>class="cat-card__link" href="portfolio.html"&gt;</text:p>
            <text:p text:style-name="P1314"><text:s text:c="10"/>&lt;figure class="cat-card__figure"&gt;</text:p>
            <text:p text:style-name="P1315"><text:s text:c="12"/>&lt;img src="Фотки для курсового/Ester/IMG_1337_jpg.jpeg" alt="Детские съемки" width="800" height="1000" loading="lazy"&gt;</text:p>
            <text:p text:style-name="P1316"><text:s text:c="10"/>&lt;/figure&gt;</text:p>
            <text:p text:style-name="P1317"><text:s text:c="10"/>&lt;div class="cat-card__body"&gt;</text:p>
            <text:p text:style-name="P1318"><text:s text:c="12"/>&lt;h2 class="cat-card__title"&gt;Детские&lt;/h2&gt;</text:p>
            <text:p text:style-name="P1319"><text:s text:c="12"/>&lt;p class="cat-card__desc"&gt;Чтобы увидеть портфолио, перейдите по ссылке&lt;/p&gt;</text:p>
            <text:p text:style-name="P1320"><text:s text:c="12"/>&lt;span class="cat-card__cta"&gt;Смотреть →&lt;/span&gt;</text:p>
            <text:p text:style-name="P1321"><text:s text:c="10"/>&lt;/div&gt;</text:p>
            <text:p text:style-name="P1322"><text:s text:c="8"/>&lt;/a&gt;</text:p>
            <text:p text:style-name="P1323"><text:s text:c="5"/><text:s/>&lt;/article&gt;</text:p>
            <text:p text:style-name="P1324"><text:s text:c="6"/>&lt;article class="cat-card"&gt;</text:p>
            <text:p text:style-name="P1325"><text:s text:c="8"/>&lt;a class="cat-card__link" href="portfolio.html"&gt;</text:p>
            <text:p text:style-name="P1326"><text:s text:c="10"/>&lt;figure class="cat-card__figure"&gt;</text:p>
            <text:p text:style-name="P1327"><text:s text:c="12"/>&lt;img src="Фотки для ленты/IMG_0216_jpg.jpeg" alt="Семейная съемка" width="800" height="1000" loading="lazy"&gt;</text:p>
            <text:p text:style-name="P1328"><text:s text:c="10"/>&lt;/figure&gt;</text:p>
            <text:p text:style-name="P1329"><text:s text:c="10"/>&lt;div class="cat-card__body"&gt;</text:p>
            <text:p text:style-name="P1330"><text:s text:c="12"/>&lt;h2 class="cat-card__title"&gt;Семейная&lt;/h2&gt;</text:p>
            <text:p text:style-name="P1331"><text:s text:c="12"/>&lt;p class="cat-card__desc"&gt;Чтобы увидеть портфолио, перейдите по ссылке&lt;/p&gt;</text:p>
            <text:p text:style-name="P1332"><text:s text:c="12"/>&lt;span class="cat-card__cta"&gt;Смотреть →&lt;/span&gt;</text:p>
            <text:p text:style-name="P1333"><text:s text:c="10"/>&lt;/div&gt;</text:p>
            <text:p text:style-name="P1334"><text:s text:c="8"/>&lt;/a&gt;</text:p>
            <text:p text:style-name="P1335"><text:s text:c="6"/>&lt;/article&gt;</text:p>
            <text:p text:style-name="P1336"><text:s text:c="6"/>&lt;article class="cat-card"&gt;</text:p>
            <text:p text:style-name="P1337"><text:s text:c="8"/>&lt;a class="cat-card__link" href="portfolio.html"&gt;</text:p>
            <text:p text:style-name="P1338"><text:s text:c="10"/>&lt;figure class="cat-card__figure"&gt;</text:p>
            <text:p text:style-name="P1339"><text:s text:c="12"/>&lt;img src="Фотки для<text:s/>ленты/IMG_7937.jpeg" alt="Портреты" width="800" height="1000" loading="lazy"&gt;</text:p>
            <text:p text:style-name="P1340"><text:s text:c="10"/>&lt;/figure&gt;</text:p>
            <text:p text:style-name="P1341"><text:s text:c="10"/>&lt;div class="cat-card__body"&gt;</text:p>
            <text:p text:style-name="P1342"><text:s text:c="12"/>&lt;h2 class="cat-card__title"&gt;Портреты&lt;/h2&gt;</text:p>
            <text:p text:style-name="P1343"><text:s text:c="12"/>&lt;p class="cat-card__desc"&gt;Чтобы увидеть портфолио, перейдите по ссылке&lt;/p&gt;</text:p>
            <text:p text:style-name="P1344"><text:s text:c="12"/>&lt;span class="cat-card__cta"&gt;Смотреть →&lt;/span&gt;</text:p>
            <text:p text:style-name="P1345"><text:s text:c="10"/>&lt;/div&gt;</text:p>
            <text:p text:style-name="P1346"><text:s text:c="8"/>&lt;/a&gt;</text:p>
            <text:p text:style-name="P1347"><text:s text:c="6"/>&lt;/article&gt;</text:p>
            <text:p text:style-name="P1348"><text:s text:c="4"/>&lt;/section&gt;</text:p>
            <text:p text:style-name="P1349"/>
            <text:p text:style-name="P1350"><text:s text:c="4"/>&lt;section class="connect-block connect-block--dark" aria-labelledby="connect-heading"&gt;</text:p>
            <text:p text:style-name="P1351"><text:s text:c="6"/>&lt;h2 class="visually-hidden" id="connect-heading"&gt;Связаться&lt;/h2&gt;</text:p>
            <text:p text:style-name="P1352"><text:s text:c="6"/>&lt;div class="connect-block__layout"&gt;</text:p>
            <text:p text:style-name="P1353"><text:s text:c="8"/>&lt;figure class="connect-block__photo"&gt;</text:p>
            <text:p text:style-name="P1354"><text:s text:c="10"/>&lt;img src="Ангелина/IMG_7209.jpeg" alt="" width="520" height="650" loading="lazy"&gt;</text:p>
            <text:p text:style-name="P1355"><text:s text:c="8"/>&lt;/figure&gt;</text:p>
            <text:p text:style-name="P1356"><text:s text:c="8"/>&lt;div class="connect-block__col"&gt;</text:p>
            <text:p text:style-name="P1357"><text:s text:c="10"/>&lt;p class="connect-block__text" id="cta-text"&gt;&lt;/p&gt;</text:p>
            <text:p text:style-name="P1358"><text:s text:c="10"/>&lt;div class="connect-actions connect-actions--pills"&gt;</text:p>
            <text:p text:style-name="P1359"><text:s text:c="12"/>&lt;a class="pill-btn" href="https://t.me/Angelina_Telpuk" target="_blank"<text:s/>rel="noopener noreferrer"&gt;TELEGRAM&lt;/a&gt;</text:p>
            <text:p text:style-name="P1360"><text:s text:c="12"/>&lt;a class="pill-btn" href="https://instagram.com/telpuk_photo" target="_blank" rel="noopener noreferrer"&gt;Instagram&lt;/a&gt;</text:p>
            <text:p text:style-name="P1361"><text:s text:c="12"/>&lt;a class="pill-btn"<text:s/>href="contacts.html"&gt;ПОЧТА&lt;/a&gt;</text:p>
            <text:p text:style-name="P1362"><text:s text:c="10"/>&lt;/div&gt;</text:p>
            <text:p text:style-name="P1363"><text:s text:c="8"/>&lt;/div&gt;</text:p>
            <text:p text:style-name="P1364"><text:s text:c="6"/>&lt;/div&gt;</text:p>
            <text:p text:style-name="P1365"><text:s text:c="4"/>&lt;/section&gt;</text:p>
            <text:p text:style-name="P1366"><text:s text:c="2"/>&lt;/main&gt;</text:p>
            <text:p text:style-name="P1367"/>
            <text:p text:style-name="P1368"><text:s text:c="2"/>&lt;footer class="site-footer" role="contentinfo"&gt;</text:p>
            <text:p text:style-name="P1369"><text:s text:c="4"/>&lt;div class="site-footer__inner"&gt;</text:p>
            <text:p text:style-name="P1370"><text:s text:c="6"/>&lt;p class="site-footer__copy" id="footer-copy"&gt;&lt;/p&gt;</text:p>
            <text:p text:style-name="P1371"><text:s text:c="6"/>&lt;ul<text:s/>class="site-footer__social" aria-label="Соцсети и почта"&gt;</text:p>
            <text:p text:style-name="P1372"><text:s text:c="8"/>&lt;li&gt;</text:p>
            <text:p text:style-name="P1373"><text:s text:c="10"/>&lt;a class="icon-link" href="mailto:akrugovets@icloud.com" title="Почта"&gt;</text:p>
            <text:p text:style-name="P1374"><text:s text:c="12"/>&lt;img src="Reolization/mail.svg" alt="" width="18" height="18"&gt;</text:p>
            <text:p text:style-name="P1375"><text:s text:c="10"/>&lt;/a&gt;</text:p>
            <text:p text:style-name="P1376"><text:s text:c="8"/>&lt;/li&gt;</text:p>
            <text:p text:style-name="P1377"><text:s text:c="8"/>&lt;li&gt;</text:p>
            <text:p text:style-name="P1378"><text:s text:c="10"/>&lt;a class="icon-link" href="https://t.me/Angelina_Telpuk" target="_blank" rel="noopener noreferrer" title="Telegram"&gt;</text:p>
            <text:p text:style-name="P1379"><text:s text:c="12"/>&lt;img src="Reolization/telegram.svg" alt="" width="18" height="18"&gt;</text:p>
            <text:p text:style-name="P1380"><text:s text:c="10"/>&lt;/a&gt;</text:p>
            <text:p text:style-name="P1381"><text:s text:c="8"/>&lt;/li&gt;</text:p>
            <text:p text:style-name="P1382"><text:s text:c="7"/><text:s/>&lt;li&gt;</text:p>
            <text:p text:style-name="P1383"><text:s text:c="10"/>&lt;a class="icon-link" href="https://instagram.com/telpuk_photo" target="_blank" rel="noopener noreferrer" title="Instagram"&gt;</text:p>
            <text:p text:style-name="P1384"><text:s text:c="12"/>&lt;img src="Reolization/instagram.svg" alt="" width="18" height="18"&gt;</text:p>
            <text:p text:style-name="P1385"><text:s text:c="10"/>&lt;/a&gt;</text:p>
            <text:p text:style-name="P1386"><text:s text:c="8"/>&lt;/li&gt;</text:p>
            <text:p text:style-name="P1387"><text:s text:c="6"/>&lt;/ul&gt;</text:p>
            <text:p text:style-name="P1388"><text:s text:c="4"/>&lt;/div&gt;</text:p>
            <text:p text:style-name="P1389"><text:s text:c="2"/>&lt;/footer&gt;</text:p>
            <text:p text:style-name="P1390"/>
            <text:p text:style-name="P1391"><text:s text:c="2"/>&lt;div class="fab" aria-label="Быстрые действия"&gt;</text:p>
            <text:p text:style-name="P1392"><text:s text:c="4"/>&lt;button type="button" class="fab__btn" id="fab-scroll" title="Наверх" aria-label="Прокрутка наверх"&gt;</text:p>
            <text:p text:style-name="P1393"><text:s text:c="6"/>&lt;svg viewBox="0 0 24 24" width="22" height="22" xmlns="http://www.w3.org/2000/svg" aria-hidden="true"&gt;</text:p>
            <text:p text:style-name="P1394"><text:s text:c="8"/>&lt;path d="M12 5l7 7h-4v7H9v-7H5l7-7z" fill="currentColor"/&gt;</text:p>
            <text:p text:style-name="P1395"><text:s text:c="6"/>&lt;/svg&gt;</text:p>
            <text:p text:style-name="P1396"><text:s text:c="4"/>&lt;/button&gt;</text:p>
            <text:p text:style-name="P1397"><text:s text:c="2"/>&lt;/div&gt;</text:p>
            <text:p text:style-name="P1398"/>
            <text:p text:style-name="P1399"><text:s text:c="2"/>&lt;div class="toast" id="toast" role="status" aria-live="polite" hidden&gt;&lt;/div&gt;</text:p>
            <text:p text:style-name="P1400"/>
            <text:p text:style-name="P1401"><text:s text:c="2"/>&lt;script src="js/main.js" defer&gt;&lt;/script&gt;</text:p>
            <text:p text:style-name="P1402">&lt;/body&gt;</text:p>
            <text:p text:style-name="P1403">&lt;/html&gt;</text:p>
          </table:table-cell>
        </table:table-row>
      </table:table>
      <text:p text:style-name="P1404"><text:span text:style-name="T1405"><text:line-break/></text:span><text:span text:style-name="T1406">Листинг В.1 - Листинг главной страницы<text:s/></text:span><text:span text:style-name="T1407">HTML</text:span><text:span text:style-name="T1408">-документа (</text:span><text:span text:style-name="T1409">index</text:span><text:span text:style-name="T1410">.</text:span><text:span text:style-name="T1411">html</text:span><text:span text:style-name="T1412">)</text:span></text:p>
      <text:p text:style-name="P1413"/>
      <table:table table:style-name="Table1414">
        <table:table-columns>
          <table:table-column table:style-name="TableColumn1415"/>
        </table:table-columns>
        <table:table-row table:style-name="TableRow1416">
          <table:table-cell table:style-name="TableCell1417">
            <text:p text:style-name="P1418">&lt;!DOCTYPE html&gt;</text:p>
            <text:p text:style-name="P1419">&lt;html lang="ru"&gt;</text:p>
            <text:p text:style-name="P1420">&lt;head&gt;</text:p>
            <text:p text:style-name="P1421"><text:s text:c="2"/>&lt;meta charset="UTF-8"&gt;</text:p>
            <text:p text:style-name="P1422"><text:s text:c="2"/>&lt;meta name="viewport" content="width=device-width,<text:s/>initial-scale=1.0"&gt;</text:p>
            <text:p text:style-name="P1423"><text:s text:c="2"/>&lt;title&gt;Портфолио — Angelina Telpuk&lt;/title&gt;</text:p>
            <text:p text:style-name="P1424"><text:s text:c="2"/>&lt;link rel="icon" href="Reolization/camera.svg" type="image/svg+xml"&gt;</text:p>
            <text:p text:style-name="P1425"><text:s text:c="2"/>&lt;link rel="preconnect" href="https://fonts.googleapis.com"&gt;</text:p>
            <text:p text:style-name="P1426"><text:s text:c="2"/>&lt;link rel="preconnect" href="https://fonts.gstatic.com"<text:s/>crossorigin&gt;</text:p>
            <text:p text:style-name="P1427"><text:s text:c="2"/>&lt;link href="https://fonts.googleapis.com/css2?family=Cormorant+Garamond:ital,wght@0,400;0,500;0,600;1,400&amp;family=Montserrat:wght@400;500;600&amp;display=swap" rel="stylesheet"&gt;</text:p>
            <text:p text:style-name="P1428"><text:s text:c="2"/>&lt;link rel="stylesheet" href="css/main.css"&gt;</text:p>
            <text:p text:style-name="P1429">&lt;/head&gt;</text:p>
            <text:p text:style-name="P1430">&lt;body class="page page--portfolio" data-page="portfolio"&gt;</text:p>
            <text:p text:style-name="P1431"><text:s text:c="2"/>&lt;header class="site-header" role="banner"&gt;</text:p>
            <text:p text:style-name="P1432"><text:s text:c="4"/>&lt;div class="site-header__inner"&gt;</text:p>
            <text:p text:style-name="P1433"><text:s text:c="6"/>&lt;p class="site-brand"&gt;ANGELINA TELPUK&lt;/p&gt;</text:p>
            <text:p text:style-name="P1434"><text:s text:c="6"/>&lt;button type="button" class="nav-toggle" id="nav-toggle" aria-expanded="false" aria-controls="site-nav" aria-label="Открыть меню"&gt;</text:p>
            <text:p text:style-name="P1435"><text:s text:c="8"/>&lt;span&gt;&lt;/span&gt;&lt;span&gt;&lt;/span&gt;&lt;span&gt;&lt;/span&gt;</text:p>
            <text:p text:style-name="P1436"><text:s text:c="6"/>&lt;/button&gt;</text:p>
            <text:p text:style-name="P1437"><text:s text:c="6"/>&lt;nav class="site-nav" id="site-nav" aria-label="Основная навигация"&gt;</text:p>
            <text:p text:style-name="P1438"><text:s text:c="8"/>&lt;ul class="site-nav__list"&gt;</text:p>
            <text:p text:style-name="P1439"><text:s text:c="10"/>&lt;li&gt;&lt;a href="index.html"&gt;Главная&lt;/a&gt;&lt;/li&gt;</text:p>
            <text:p text:style-name="P1440"><text:s text:c="10"/>&lt;li&gt;&lt;a href="portfolio.html"&gt;Портфолио&lt;/a&gt;&lt;/li&gt;</text:p>
            <text:p text:style-name="P1441"><text:s text:c="10"/>&lt;li&gt;&lt;a href="contacts.html"&gt;Контакты&lt;/a&gt;&lt;/li&gt;</text:p>
            <text:p text:style-name="P1442"><text:s text:c="10"/>&lt;li&gt;&lt;a href="questions.html"&gt;Вопросы&lt;/a&gt;&lt;/li&gt;</text:p>
            <text:p text:style-name="P1443"><text:s text:c="8"/>&lt;/ul&gt;</text:p>
            <text:p text:style-name="P1444"><text:s text:c="6"/>&lt;/nav&gt;</text:p>
            <text:p text:style-name="P1445"><text:s text:c="4"/>&lt;/div&gt;</text:p>
            <text:p text:style-name="P1446"><text:s text:c="2"/>&lt;/header&gt;</text:p>
            <text:p text:style-name="P1447"/>
            <text:p text:style-name="P1448"><text:s text:c="2"/>&lt;main class="site-main site-main--narrow"&gt;</text:p>
            <text:p text:style-name="P1449"><text:s text:c="4"/>&lt;section class="portfolio-grid" id="portfolio-grid" aria-label="Галерея фотосессий"&gt;&lt;/section&gt;</text:p>
            <text:p text:style-name="P1450"><text:s text:c="2"/>&lt;/main&gt;</text:p>
            <text:p text:style-name="P1451"/>
            <text:p text:style-name="P1452"><text:s text:c="2"/>&lt;footer class="site-footer" role="contentinfo"&gt;</text:p>
            <text:p text:style-name="P1453"><text:s text:c="4"/>&lt;div class="site-footer__inner"&gt;</text:p>
            <text:p text:style-name="P1454"><text:s text:c="6"/>&lt;p class="site-footer__copy"&gt;© 2026 Angelina Telpuk. Все фотографии защищены авторским правом&lt;/p&gt;</text:p>
            <text:p text:style-name="P1455"><text:s text:c="6"/>&lt;ul class="site-footer__social" aria-label="Соцсети и почта"&gt;</text:p>
            <text:p text:style-name="P1456"><text:s text:c="8"/>&lt;li&gt;</text:p>
            <text:p text:style-name="P1457"><text:s text:c="10"/>&lt;a class="icon-link" href="mailto:akrugovets@icloud.com" title="Почта"&gt;</text:p>
            <text:p text:style-name="P1458"><text:s text:c="5"/><text:s text:c="7"/>&lt;img src="Reolization/mail.svg" alt="" width="18" height="18"&gt;</text:p>
            <text:p text:style-name="P1459"><text:s text:c="10"/>&lt;/a&gt;</text:p>
            <text:p text:style-name="P1460"><text:s text:c="8"/>&lt;/li&gt;</text:p>
            <text:p text:style-name="P1461"><text:s text:c="8"/>&lt;li&gt;</text:p>
            <text:p text:style-name="P1462"><text:s text:c="10"/>&lt;a class="icon-link" href="https://t.me/Angelina_Telpuk" target="_blank" rel="noopener noreferrer" title="Telegram"&gt;</text:p>
            <text:p text:style-name="P1463"><text:s text:c="12"/>&lt;img src="Reolization/telegram.svg" alt="" width="18" height="18"&gt;</text:p>
            <text:p text:style-name="P1464"><text:s text:c="10"/>&lt;/a&gt;</text:p>
            <text:p text:style-name="P1465"><text:s text:c="8"/>&lt;/li&gt;</text:p>
            <text:p text:style-name="P1466"><text:s text:c="8"/>&lt;li&gt;</text:p>
            <text:p text:style-name="P1467"><text:s text:c="10"/>&lt;a class="icon-link" href="https://instagram.com/telpuk_photo" target="_blank" rel="noopener noreferrer" title="Instagram"&gt;</text:p>
            <text:p text:style-name="P1468"><text:s/><text:s text:c="11"/>&lt;img src="Reolization/instagram.svg" alt="" width="18" height="18"&gt;</text:p>
            <text:p text:style-name="P1469"><text:s text:c="10"/>&lt;/a&gt;</text:p>
            <text:p text:style-name="P1470"><text:s text:c="8"/>&lt;/li&gt;</text:p>
            <text:p text:style-name="P1471"><text:s text:c="6"/>&lt;/ul&gt;</text:p>
            <text:p text:style-name="P1472"><text:s text:c="4"/>&lt;/div&gt;</text:p>
            <text:p text:style-name="P1473"><text:s text:c="2"/>&lt;/footer&gt;</text:p>
            <text:p text:style-name="P1474"/>
            <text:p text:style-name="P1475"><text:s text:c="2"/>&lt;div class="fab" aria-label="Быстрые действия"&gt;</text:p>
            <text:p text:style-name="P1476"><text:s text:c="4"/>&lt;button type="button" class="fab__btn"<text:s/>id="fab-scroll" title="Наверх" aria-label="Прокрутка наверх"&gt;</text:p>
            <text:p text:style-name="P1477"><text:s text:c="6"/>&lt;svg viewBox="0 0 24 24" width="22" height="22" xmlns="http://www.w3.org/2000/svg" aria-hidden="true"&gt;</text:p>
            <text:p text:style-name="P1478"><text:s text:c="8"/>&lt;path d="M12 5l7 7h-4v7H9v-7H5l7-7z" fill="currentColor"/&gt;</text:p>
            <text:p text:style-name="P1479"><text:s text:c="6"/>&lt;/svg&gt;</text:p>
            <text:p text:style-name="P1480"><text:s text:c="4"/>&lt;/button&gt;</text:p>
            <text:p text:style-name="P1481"><text:s text:c="2"/>&lt;/div&gt;</text:p>
            <text:p text:style-name="P1482"/>
            <text:p text:style-name="P1483"><text:s text:c="2"/>&lt;div class="toast" id="toast" role="status" aria-live="polite" hidden&gt;&lt;/div&gt;</text:p>
            <text:p text:style-name="P1484"/>
            <text:p text:style-name="P1485"><text:s text:c="2"/>&lt;script src="js/main.js" defer&gt;&lt;/script&gt;</text:p>
            <text:p text:style-name="P1486">&lt;/body&gt;</text:p>
            <text:p text:style-name="P1487">&lt;/html&gt;</text:p>
          </table:table-cell>
        </table:table-row>
      </table:table>
      <text:p text:style-name="P1488"><text:span text:style-name="T1489">Листинг В.</text:span><text:span text:style-name="T1490">2</text:span><text:span text:style-name="T1491"><text:s/>- Листинг страницы<text:s/></text:span><text:span text:style-name="T1492">с портфолио<text:s/></text:span><text:span text:style-name="T1493">HTML</text:span><text:span text:style-name="T1494">-документа (</text:span><text:span text:style-name="T1495">portfolio</text:span><text:span text:style-name="T1496">.</text:span><text:span text:style-name="T1497">html</text:span><text:span text:style-name="T1498">)</text:span></text:p>
      <text:p text:style-name="P1499"/>
      <table:table table:style-name="Table1500">
        <table:table-columns>
          <table:table-column table:style-name="TableColumn1501"/>
        </table:table-columns>
        <table:table-row table:style-name="TableRow1502">
          <table:table-cell table:style-name="TableCell1503">
            <text:p text:style-name="P1504">&lt;!DOCTYPE html&gt;</text:p>
            <text:p text:style-name="P1505">&lt;html lang="ru"&gt;</text:p>
            <text:p text:style-name="P1506">&lt;head&gt;</text:p>
            <text:p text:style-name="P1507"><text:s text:c="2"/>&lt;meta charset="UTF-8"&gt;</text:p>
            <text:p text:style-name="P1508"><text:s text:c="2"/>&lt;meta name="viewport" content="width=device-width, initial-scale=1.0"&gt;</text:p>
            <text:p text:style-name="P1509"><text:s text:c="2"/>&lt;title&gt;Галерея — Angelina Telpuk&lt;/title&gt;</text:p>
            <text:p text:style-name="P1510"><text:s text:c="2"/>&lt;link rel="icon" href="Reolization/camera.svg" type="image/svg+xml"&gt;</text:p>
            <text:p text:style-name="P1511"><text:s text:c="2"/>&lt;link rel="preconnect" href="https://fonts.googleapis.com"&gt;</text:p>
            <text:p text:style-name="P1512"><text:s text:c="2"/>&lt;link rel="preconnect" href="https://fonts.gstatic.com" crossorigin&gt;</text:p>
            <text:p text:style-name="P1513"><text:s text:c="2"/>&lt;link href="https://fonts.googleapis.com/css2?family=Cormorant+Garamond:ital,wght@0,400;0,500;0,600;1,400&amp;family=Montserrat:wght@400;500;600&amp;display=swap" rel="stylesheet"&gt;</text:p>
            <text:p text:style-name="P1514"><text:s text:c="2"/>&lt;link rel="stylesheet" href="css/main.css"&gt;</text:p>
            <text:p text:style-name="P1515">&lt;/head&gt;</text:p>
            <text:p text:style-name="P1516">&lt;body class="page page--gallery" data-page="gallery"&gt;</text:p>
            <text:p text:style-name="P1517"><text:s text:c="2"/>&lt;header class="site-header" role="banner"&gt;</text:p>
            <text:p text:style-name="P1518"><text:s text:c="4"/>&lt;div class="site-header__inner"&gt;</text:p>
            <text:p text:style-name="P1519"><text:s text:c="6"/>&lt;p<text:s/>class="site-brand"&gt;ANGELINA TELPUK&lt;/p&gt;</text:p>
            <text:p text:style-name="P1520"><text:s text:c="6"/>&lt;button type="button" class="nav-toggle" id="nav-toggle" aria-expanded="false" aria-controls="site-nav" aria-label="Открыть меню"&gt;</text:p>
            <text:p text:style-name="P1521"><text:s text:c="8"/>&lt;span&gt;&lt;/span&gt;&lt;span&gt;&lt;/span&gt;&lt;span&gt;&lt;/span&gt;</text:p>
            <text:p text:style-name="P1522"><text:s text:c="6"/>&lt;/button&gt;</text:p>
            <text:p text:style-name="P1523"><text:s text:c="6"/>&lt;nav class="site-nav" id="site-nav" aria-label="Основная навигация"&gt;</text:p>
            <text:p text:style-name="P1524"><text:s text:c="8"/>&lt;ul class="site-nav__list"&gt;</text:p>
            <text:p text:style-name="P1525"><text:s text:c="10"/>&lt;li&gt;&lt;a href="index.html"&gt;Главная&lt;/a&gt;&lt;/li&gt;</text:p>
            <text:p text:style-name="P1526"><text:s text:c="10"/>&lt;li&gt;&lt;a href="portfolio.html"&gt;Портфолио&lt;/a&gt;&lt;/li&gt;</text:p>
            <text:p text:style-name="P1527"><text:s text:c="10"/>&lt;li&gt;&lt;a href="contacts.html"&gt;Контакты&lt;/a&gt;&lt;/li&gt;</text:p>
            <text:p text:style-name="P1528"><text:s text:c="10"/>&lt;li&gt;&lt;a href="questions.html"&gt;Вопросы&lt;/a&gt;&lt;/li&gt;</text:p>
            <text:p text:style-name="P1529"><text:s text:c="8"/>&lt;/ul&gt;</text:p>
            <text:p text:style-name="P1530"><text:s text:c="6"/>&lt;/nav&gt;</text:p>
            <text:p text:style-name="P1531"><text:s text:c="4"/>&lt;/div&gt;</text:p>
            <text:p text:style-name="P1532"><text:s text:c="2"/>&lt;/header&gt;</text:p>
            <text:p text:style-name="P1533"/>
            <text:p text:style-name="P1534"><text:s text:c="2"/>&lt;main class="site-main site-main--gallery"&gt;</text:p>
            <text:p text:style-name="P1535"><text:s text:c="4"/>&lt;p class="gallery-back"&gt;&lt;a href="portfolio.html"&gt;← Портфолио&lt;/a&gt;&lt;/p&gt;</text:p>
            <text:p text:style-name="P1536"><text:s text:c="4"/>&lt;header<text:s/>class="gallery-head"&gt;</text:p>
            <text:p text:style-name="P1537"><text:s text:c="6"/>&lt;h1 class="gallery-head__title" id="gallery-title"&gt;Галерея&lt;/h1&gt;</text:p>
            <text:p text:style-name="P1538"><text:s text:c="6"/>&lt;p class="gallery-head__sub" id="gallery-sub" hidden&gt;Портфолио&lt;/p&gt;</text:p>
            <text:p text:style-name="P1539"><text:s text:c="4"/>&lt;/header&gt;</text:p>
            <text:p text:style-name="P1540"><text:s text:c="4"/>&lt;p class="gallery-empty" id="gallery-empty" hidden&gt;Выберите фотосессию в<text:s/>разделе &lt;a href="portfolio.html"&gt;Портфолио&lt;/a&gt;.&lt;/p&gt;</text:p>
            <text:p text:style-name="P1541"><text:s text:c="4"/>&lt;section class="gallery-masonry" id="gallery-masonry" aria-label="Фотографии"&gt;&lt;/section&gt;</text:p>
            <text:p text:style-name="P1542"><text:s text:c="2"/>&lt;/main&gt;</text:p>
            <text:p text:style-name="P1543"/>
            <text:p text:style-name="P1544"><text:s text:c="2"/>&lt;footer class="site-footer" role="contentinfo"&gt;</text:p>
            <text:p text:style-name="P1545"><text:s text:c="4"/>&lt;div class="site-footer__inner"&gt;</text:p>
            <text:p text:style-name="P1546"><text:s text:c="6"/>&lt;p class="site-footer__copy"&gt;© 2026 Angelina Telpuk. Все фотографии защищены авторским правом&lt;/p&gt;</text:p>
            <text:p text:style-name="P1547"><text:s text:c="6"/>&lt;ul class="site-footer__social" aria-label="Соцсети и почта"&gt;</text:p>
            <text:p text:style-name="P1548"><text:s text:c="8"/>&lt;li&gt;</text:p>
            <text:p text:style-name="P1549"><text:s text:c="10"/>&lt;a class="icon-link" href="mailto:akrugovets@icloud.com" title="Почта"&gt;</text:p>
            <text:p text:style-name="P1550"><text:s text:c="2"/><text:s text:c="10"/>&lt;img src="Reolization/mail.svg" alt="" width="18" height="18"&gt;</text:p>
            <text:p text:style-name="P1551"><text:s text:c="10"/>&lt;/a&gt;</text:p>
            <text:p text:style-name="P1552"><text:s text:c="8"/>&lt;/li&gt;</text:p>
            <text:p text:style-name="P1553"><text:s text:c="8"/>&lt;li&gt;</text:p>
            <text:p text:style-name="P1554"><text:s text:c="10"/>&lt;a class="icon-link" href="https://t.me/Angelina_Telpuk" target="_blank" rel="noopener noreferrer" title="Telegram"&gt;</text:p>
            <text:p text:style-name="P1555"><text:s text:c="12"/>&lt;img src="Reolization/telegram.svg" alt="" width="18" height="18"&gt;</text:p>
            <text:p text:style-name="P1556"><text:s text:c="10"/>&lt;/a&gt;</text:p>
            <text:p text:style-name="P1557"><text:s text:c="8"/>&lt;/li&gt;</text:p>
            <text:p text:style-name="P1558"><text:s text:c="8"/>&lt;li&gt;</text:p>
            <text:p text:style-name="P1559"><text:s text:c="10"/>&lt;a class="icon-link" href="https://instagram.com/telpuk_photo" target="_blank" rel="noopener noreferrer"<text:s/>title="Instagram"&gt;</text:p>
            <text:p text:style-name="P1560"><text:s text:c="12"/>&lt;img src="Reolization/instagram.svg" alt="" width="18" height="18"&gt;</text:p>
            <text:p text:style-name="P1561"><text:s text:c="10"/>&lt;/a&gt;</text:p>
            <text:p text:style-name="P1562"><text:s text:c="8"/>&lt;/li&gt;</text:p>
            <text:p text:style-name="P1563"><text:s text:c="6"/>&lt;/ul&gt;</text:p>
            <text:p text:style-name="P1564"><text:s text:c="4"/>&lt;/div&gt;</text:p>
            <text:p text:style-name="P1565"><text:s text:c="2"/>&lt;/footer&gt;</text:p>
            <text:p text:style-name="P1566"/>
            <text:p text:style-name="P1567"><text:s text:c="2"/>&lt;div class="lightbox" id="lightbox" hidden&gt;</text:p>
            <text:p text:style-name="P1568"><text:s text:c="4"/>&lt;button type="button"<text:s/>class="lightbox__close" id="lightbox-close" aria-label="Закрыть"&gt;×&lt;/button&gt;</text:p>
            <text:p text:style-name="P1569"><text:s text:c="4"/>&lt;button type="button" class="lightbox__nav lightbox__nav--prev" id="lightbox-prev" aria-label="Предыдущее фото"&gt;‹&lt;/button&gt;</text:p>
            <text:p text:style-name="P1570"><text:s text:c="4"/>&lt;button type="button" class="lightbox__nav lightbox__nav--next" id="lightbox-next" aria-label="Следующее фото"&gt;›&lt;/button&gt;</text:p>
            <text:p text:style-name="P1571"><text:s text:c="4"/>&lt;figure class="lightbox__figure"&gt;</text:p>
            <text:p text:style-name="P1572"><text:s text:c="6"/>&lt;img src="" alt="" id="lightbox-img"&gt;</text:p>
            <text:p text:style-name="P1573"><text:s text:c="6"/>&lt;figcaption id="lightbox-cap" class="lightbox__cap"&gt;&lt;/figcaption&gt;</text:p>
            <text:p text:style-name="P1574"><text:s text:c="4"/>&lt;/figure&gt;</text:p>
            <text:p text:style-name="P1575"><text:s text:c="2"/>&lt;/div&gt;</text:p>
            <text:p text:style-name="P1576"/>
            <text:p text:style-name="P1577"><text:s text:c="2"/>&lt;div class="fab" aria-label="Быстрые действия"&gt;</text:p>
            <text:p text:style-name="P1578"><text:s text:c="4"/>&lt;button type="button" class="fab__btn" id="fab-scroll" title="Наверх" aria-label="Прокрутка наверх"&gt;</text:p>
            <text:p text:style-name="P1579"><text:s text:c="6"/>&lt;svg viewBox="0 0 24 24" width="22" height="22" xmlns="http://www.w3.org/2000/svg" aria-hidden="true"&gt;</text:p>
            <text:p text:style-name="P1580"><text:s text:c="8"/>&lt;path d="M12 5l7 7h-4v7H9v-7H5l7-7z" fill="currentColor"/&gt;</text:p>
            <text:p text:style-name="P1581"><text:s text:c="6"/>&lt;/svg&gt;</text:p>
            <text:p text:style-name="P1582"><text:s text:c="4"/>&lt;/button&gt;</text:p>
            <text:p text:style-name="P1583"><text:s text:c="2"/>&lt;/div&gt;</text:p>
            <text:p text:style-name="P1584"/>
            <text:p text:style-name="P1585"><text:s text:c="2"/>&lt;div class="toast" id="toast" role="status" aria-live="polite" hidden&gt;&lt;/div&gt;</text:p>
            <text:p text:style-name="P1586"/>
            <text:p text:style-name="P1587"><text:s text:c="2"/>&lt;script src="js/main.js" defer&gt;&lt;/script&gt;</text:p>
            <text:p text:style-name="P1588">&lt;/body&gt;</text:p>
            <text:p text:style-name="P1589">&lt;/html&gt;</text:p>
          </table:table-cell>
        </table:table-row>
      </table:table>
      <text:p text:style-name="P1590"><text:span text:style-name="T1591">Листинг В.</text:span><text:span text:style-name="T1592">2</text:span><text:span text:style-name="T1593"><text:s/>- Листинг страницы<text:s/></text:span><text:span text:style-name="T1594">с галереей<text:s/></text:span><text:span text:style-name="T1595">HTML</text:span><text:span text:style-name="T1596">-документа (</text:span><text:span text:style-name="T1597">gallery</text:span><text:span text:style-name="T1598">.</text:span><text:span text:style-name="T1599">html</text:span><text:span text:style-name="T1600">)</text:span></text:p>
      <text:p text:style-name="P1601"/>
      <table:table table:style-name="Table1602">
        <table:table-columns>
          <table:table-column table:style-name="TableColumn1603"/>
        </table:table-columns>
        <table:table-row table:style-name="TableRow1604">
          <table:table-cell table:style-name="TableCell1605">
            <text:p text:style-name="P1606">&lt;!DOCTYPE html&gt;</text:p>
            <text:p text:style-name="P1607">&lt;html lang="ru"&gt;</text:p>
            <text:p text:style-name="P1608">&lt;head&gt;</text:p>
            <text:p text:style-name="P1609"><text:s text:c="2"/>&lt;meta charset="UTF-8"&gt;</text:p>
            <text:p text:style-name="P1610"><text:s text:c="2"/>&lt;meta name="viewport" content="width=device-width, initial-scale=1.0"&gt;</text:p>
            <text:p text:style-name="P1611"><text:s text:c="2"/>&lt;title&gt;Контакты — Angelina Telpuk&lt;/title&gt;</text:p>
            <text:p text:style-name="P1612"><text:s/><text:s/>&lt;link rel="icon" href="Reolization/camera.svg" type="image/svg+xml"&gt;</text:p>
            <text:p text:style-name="P1613"><text:s text:c="2"/>&lt;link rel="preconnect" href="https://fonts.googleapis.com"&gt;</text:p>
            <text:p text:style-name="P1614"><text:s text:c="2"/>&lt;link rel="preconnect" href="https://fonts.gstatic.com" crossorigin&gt;</text:p>
            <text:p text:style-name="P1615"><text:s text:c="2"/>&lt;link href="https://fonts.googleapis.com/css2?family=Cormorant+Garamond:ital,wght@0,400;0,500;0,600;1,400&amp;family=Montserrat:wght@400;500;600&amp;display=swap" rel="stylesheet"&gt;</text:p>
            <text:p text:style-name="P1616"><text:s text:c="2"/>&lt;link rel="stylesheet" href="css/main.css"&gt;</text:p>
            <text:p text:style-name="P1617">&lt;/head&gt;</text:p>
            <text:p text:style-name="P1618">&lt;body class="page page--contacts" data-page="contacts"&gt;</text:p>
            <text:p text:style-name="P1619"><text:s text:c="2"/>&lt;header<text:s/>class="site-header" role="banner"&gt;</text:p>
            <text:p text:style-name="P1620"><text:s text:c="4"/>&lt;div class="site-header__inner"&gt;</text:p>
            <text:p text:style-name="P1621"><text:s text:c="6"/>&lt;p class="site-brand"&gt;ANGELINA TELPUK&lt;/p&gt;</text:p>
            <text:p text:style-name="P1622"><text:s text:c="6"/>&lt;button type="button" class="nav-toggle" id="nav-toggle" aria-expanded="false" aria-controls="site-nav" aria-label="Открыть меню"&gt;</text:p>
            <text:p text:style-name="P1623"><text:s text:c="8"/>&lt;span&gt;&lt;/span&gt;&lt;span&gt;&lt;/span&gt;&lt;span&gt;&lt;/span&gt;</text:p>
            <text:p text:style-name="P1624"><text:s text:c="6"/>&lt;/button&gt;</text:p>
            <text:p text:style-name="P1625"><text:s text:c="6"/>&lt;nav class="site-nav" id="site-nav" aria-label="Основная навигация"&gt;</text:p>
            <text:p text:style-name="P1626"><text:s text:c="8"/>&lt;ul class="site-nav__list"&gt;</text:p>
            <text:p text:style-name="P1627"><text:s text:c="10"/>&lt;li&gt;&lt;a href="index.html"&gt;Главная&lt;/a&gt;&lt;/li&gt;</text:p>
            <text:p text:style-name="P1628"><text:s text:c="10"/>&lt;li&gt;&lt;a href="portfolio.html"&gt;Портфолио&lt;/a&gt;&lt;/li&gt;</text:p>
            <text:p text:style-name="P1629"><text:s text:c="10"/>&lt;li&gt;&lt;a href="contacts.html"&gt;Контакты&lt;/a&gt;&lt;/li&gt;</text:p>
            <text:p text:style-name="P1630"><text:s text:c="10"/>&lt;li&gt;&lt;a href="questions.html"&gt;Вопросы&lt;/a&gt;&lt;/li&gt;</text:p>
            <text:p text:style-name="P1631"><text:s text:c="8"/>&lt;/ul&gt;</text:p>
            <text:p text:style-name="P1632"><text:s text:c="6"/>&lt;/nav&gt;</text:p>
            <text:p text:style-name="P1633"><text:s text:c="4"/>&lt;/div&gt;</text:p>
            <text:p text:style-name="P1634"><text:s text:c="2"/>&lt;/header&gt;</text:p>
            <text:p text:style-name="P1635"/>
            <text:p text:style-name="P1636"><text:s text:c="2"/>&lt;main class="site-main"&gt;</text:p>
            <text:p text:style-name="P1637"><text:s text:c="4"/>&lt;section class="contact-hero" aria-labelledby="contacts-title"&gt;</text:p>
            <text:p text:style-name="P1638"><text:s text:c="6"/>&lt;div class="contact-hero__grid"&gt;</text:p>
            <text:p text:style-name="P1639"><text:s text:c="8"/>&lt;figure class="contact-hero__photo"&gt;</text:p>
            <text:p text:style-name="P1640"><text:s text:c="10"/>&lt;img src="Ангелина/IMG_6840.jpeg" alt="Angelina Telpuk" width="900" height="1100" loading="lazy"&gt;</text:p>
            <text:p text:style-name="P1641"><text:s text:c="8"/>&lt;/figure&gt;</text:p>
            <text:p text:style-name="P1642"><text:s text:c="8"/>&lt;div class="contact-hero__content"&gt;</text:p>
            <text:p text:style-name="P1643"><text:s text:c="10"/>&lt;h1 class="page-head__title" id="contacts-title"&gt;Контакты&lt;/h1&gt;</text:p>
            <text:p text:style-name="P1644"><text:s text:c="10"/>&lt;p class="contact-hero__phone-wrap"&gt;</text:p>
            <text:p text:style-name="P1645"><text:s text:c="12"/>&lt;button type="button" class="phone-copy" id="phone-copy"<text:s/>data-phone="+375293157155"&gt;+375293157155&lt;/button&gt;</text:p>
            <text:p text:style-name="P1646"><text:s text:c="12"/>&lt;span class="hint" id="phone-hint"&gt;Нажмите, чтобы скопировать номер&lt;/span&gt;</text:p>
            <text:p text:style-name="P1647"><text:s text:c="10"/>&lt;/p&gt;</text:p>
            <text:p text:style-name="P1648"><text:s text:c="10"/>&lt;form class="contact-form contact-form--lines" id="contact-form" action="https://formsubmit.co/akrugovets@icloud.com" method="POST" novalidate&gt;</text:p>
            <text:p text:style-name="P1649"><text:s text:c="12"/>&lt;input type="hidden" name="_subject" value="Сообщение с сайта Angelina Telpuk"&gt;</text:p>
            <text:p text:style-name="P1650"><text:s text:c="12"/>&lt;input type="hidden" name="_captcha" value="false"&gt;</text:p>
            <text:p text:style-name="P1651"><text:s text:c="12"/>&lt;input type="hidden" name="_template"<text:s/>value="table"&gt;</text:p>
            <text:p text:style-name="P1652"><text:s text:c="12"/>&lt;div class="field-line"&gt;</text:p>
            <text:p text:style-name="P1653"><text:s text:c="14"/>&lt;span class="field-line__label"&gt;Ваше имя&lt;/span&gt;</text:p>
            <text:p text:style-name="P1654"><text:s text:c="14"/>&lt;input class="field-line__input" type="text" name="name" required autocomplete="name" placeholder=" "&gt;</text:p>
            <text:p text:style-name="P1655"><text:s text:c="12"/>&lt;/div&gt;</text:p>
            <text:p text:style-name="P1656"><text:s text:c="6"/><text:s text:c="6"/>&lt;div class="field-line"&gt;</text:p>
            <text:p text:style-name="P1657"><text:s text:c="14"/>&lt;span class="field-line__label"&gt;Электронная почта&lt;/span&gt;</text:p>
            <text:p text:style-name="P1658"><text:s text:c="14"/>&lt;input class="field-line__input" type="email" name="email" required autocomplete="email" placeholder=" "&gt;</text:p>
            <text:p text:style-name="P1659"><text:s text:c="12"/>&lt;/div&gt;</text:p>
            <text:p text:style-name="P1660"><text:s text:c="12"/>&lt;div class="field-line"&gt;</text:p>
            <text:p text:style-name="P1661"><text:s text:c="14"/>&lt;span class="field-line__label"&gt;Сообщение&lt;/span&gt;</text:p>
            <text:p text:style-name="P1662"><text:s text:c="14"/>&lt;textarea class="field-line__input field-line__input--area" name="message" rows="4" required placeholder=" "&gt;&lt;/textarea&gt;</text:p>
            <text:p text:style-name="P1663"><text:s text:c="12"/>&lt;/div&gt;</text:p>
            <text:p text:style-name="P1664"><text:s text:c="12"/>&lt;button type="submit" class="btn btn--pill btn--primary"&gt;Отправить&lt;/button&gt;</text:p>
            <text:p text:style-name="P1665"><text:s text:c="10"/>&lt;/form&gt;</text:p>
            <text:p text:style-name="P1666"><text:s text:c="8"/>&lt;/div&gt;</text:p>
            <text:p text:style-name="P1667"><text:s text:c="6"/>&lt;/div&gt;</text:p>
            <text:p text:style-name="P1668"><text:s text:c="4"/>&lt;/section&gt;</text:p>
            <text:p text:style-name="P1669"/>
            <text:p text:style-name="P1670"><text:s text:c="4"/>&lt;section class="connect-block connect-block--row connect-block--plain" aria-label="Быстрые контакты"&gt;</text:p>
            <text:p text:style-name="P1671"><text:s text:c="6"/>&lt;div<text:s/>class="connect-actions connect-actions--pills connect-actions--row"&gt;</text:p>
            <text:p text:style-name="P1672"><text:s text:c="8"/>&lt;a class="pill-btn" href="https://t.me/Angelina_Telpuk" target="_blank" rel="noopener noreferrer"&gt;TELEGRAM&lt;/a&gt;</text:p>
            <text:p text:style-name="P1673"><text:s text:c="8"/>&lt;a class="pill-btn" href="https://instagram.com/telpuk_photo" target="_blank" rel="noopener noreferrer"&gt;Instagram&lt;/a&gt;</text:p>
            <text:p text:style-name="P1674"><text:s text:c="8"/>&lt;a class="pill-btn" href="contacts.html#contact-form"&gt;ПОЧТА&lt;/a&gt;</text:p>
            <text:p text:style-name="P1675"><text:s text:c="6"/>&lt;/div&gt;</text:p>
            <text:p text:style-name="P1676"><text:s text:c="4"/>&lt;/section&gt;</text:p>
            <text:p text:style-name="P1677"><text:s text:c="2"/>&lt;/main&gt;</text:p>
            <text:p text:style-name="P1678"/>
            <text:p text:style-name="P1679"><text:s text:c="2"/>&lt;footer class="site-footer" role="contentinfo"&gt;</text:p>
            <text:p text:style-name="P1680"><text:s text:c="4"/>&lt;div class="site-footer__inner"&gt;</text:p>
            <text:p text:style-name="P1681"><text:s text:c="6"/>&lt;p class="site-footer__copy"&gt;© 2026 Angelina Telpuk. Все фотографии защищены авторским правом&lt;/p&gt;</text:p>
            <text:p text:style-name="P1682"><text:s text:c="6"/>&lt;ul class="site-footer__social" aria-label="Соцсети и почта"&gt;</text:p>
            <text:p text:style-name="P1683"><text:s text:c="8"/>&lt;li&gt;</text:p>
            <text:p text:style-name="P1684"><text:s text:c="10"/>&lt;a class="icon-link" href="mailto:akrugovets@icloud.com" title="Почта"&gt;</text:p>
            <text:p text:style-name="P1685"><text:s text:c="12"/>&lt;img src="Reolization/mail.svg" alt="" width="18" height="18"&gt;</text:p>
            <text:p text:style-name="P1686"><text:s text:c="10"/>&lt;/a&gt;</text:p>
            <text:p text:style-name="P1687"><text:s text:c="8"/>&lt;/li&gt;</text:p>
            <text:p text:style-name="P1688"><text:s text:c="8"/>&lt;li&gt;</text:p>
            <text:p text:style-name="P1689"><text:s text:c="10"/>&lt;a class="icon-link" href="https://t.me/Angelina_Telpuk" target="_blank" rel="noopener noreferrer" title="Telegram"&gt;</text:p>
            <text:p text:style-name="P1690"><text:s/><text:s text:c="11"/>&lt;img src="Reolization/telegram.svg" alt="" width="18" height="18"&gt;</text:p>
            <text:p text:style-name="P1691"><text:s text:c="10"/>&lt;/a&gt;</text:p>
            <text:p text:style-name="P1692"><text:s text:c="8"/>&lt;/li&gt;</text:p>
            <text:p text:style-name="P1693"><text:s text:c="8"/>&lt;li&gt;</text:p>
            <text:p text:style-name="P1694"><text:s text:c="10"/>&lt;a class="icon-link" href="https://instagram.com/telpuk_photo" target="_blank" rel="noopener noreferrer" title="Instagram"&gt;</text:p>
            <text:p text:style-name="P1695"><text:s text:c="2"/><text:s text:c="10"/>&lt;img src="Reolization/instagram.svg" alt="" width="18" height="18"&gt;</text:p>
            <text:p text:style-name="P1696"><text:s text:c="10"/>&lt;/a&gt;</text:p>
            <text:p text:style-name="P1697"><text:s text:c="8"/>&lt;/li&gt;</text:p>
            <text:p text:style-name="P1698"><text:s text:c="6"/>&lt;/ul&gt;</text:p>
            <text:p text:style-name="P1699"><text:s text:c="4"/>&lt;/div&gt;</text:p>
            <text:p text:style-name="P1700"><text:s text:c="2"/>&lt;/footer&gt;</text:p>
            <text:p text:style-name="P1701"/>
            <text:p text:style-name="P1702"><text:s text:c="2"/>&lt;div class="fab" aria-label="Быстрые действия"&gt;</text:p>
            <text:p text:style-name="P1703"><text:s text:c="4"/>&lt;button type="button" class="fab__btn"<text:s/>id="fab-scroll" title="Наверх" aria-label="Прокрутка наверх"&gt;</text:p>
            <text:p text:style-name="P1704"><text:s text:c="6"/>&lt;svg viewBox="0 0 24 24" width="22" height="22" xmlns="http://www.w3.org/2000/svg" aria-hidden="true"&gt;</text:p>
            <text:p text:style-name="P1705"><text:s text:c="8"/>&lt;path d="M12 5l7 7h-4v7H9v-7H5l7-7z" fill="currentColor"/&gt;</text:p>
            <text:p text:style-name="P1706"><text:s text:c="6"/>&lt;/svg&gt;</text:p>
            <text:p text:style-name="P1707"><text:s text:c="4"/>&lt;/button&gt;</text:p>
            <text:p text:style-name="P1708"><text:s text:c="2"/>&lt;/div&gt;</text:p>
            <text:p text:style-name="P1709"/>
            <text:p text:style-name="P1710"><text:s text:c="2"/>&lt;div class="toast" id="toast" role="status" aria-live="polite" hidden&gt;&lt;/div&gt;</text:p>
            <text:p text:style-name="P1711"/>
            <text:p text:style-name="P1712"><text:s text:c="2"/>&lt;script src="js/main.js" defer&gt;&lt;/script&gt;</text:p>
            <text:p text:style-name="P1713">&lt;/body&gt;</text:p>
            <text:p text:style-name="P1714">&lt;/html&gt;</text:p>
          </table:table-cell>
        </table:table-row>
      </table:table>
      <text:p text:style-name="P1715"/>
      <text:p text:style-name="P1716"><text:span text:style-name="T1717">Листинг В.</text:span><text:span text:style-name="T1718">3</text:span><text:span text:style-name="T1719"><text:s/>- Листинг страницы<text:s/></text:span><text:span text:style-name="T1720">с обратной связью<text:s/></text:span><text:span text:style-name="T1721">HTML</text:span><text:span text:style-name="T1722">-документа (</text:span><text:span text:style-name="T1723">contacts</text:span><text:span text:style-name="T1724">.</text:span><text:span text:style-name="T1725">html</text:span><text:span text:style-name="T1726">)</text:span></text:p>
      <text:p text:style-name="P1727"/>
      <table:table table:style-name="Table1728">
        <table:table-columns>
          <table:table-column table:style-name="TableColumn1729"/>
        </table:table-columns>
        <table:table-row table:style-name="TableRow1730">
          <table:table-cell table:style-name="TableCell1731">
            <text:p text:style-name="P1732">&lt;!DOCTYPE html&gt;</text:p>
            <text:p text:style-name="P1733">&lt;html lang="ru"&gt;</text:p>
            <text:p text:style-name="P1734">&lt;head&gt;</text:p>
            <text:p text:style-name="P1735"><text:s text:c="2"/>&lt;meta charset="UTF-8"&gt;</text:p>
            <text:p text:style-name="P1736"><text:s text:c="2"/>&lt;meta name="viewport" content="width=device-width, initial-scale=1.0"&gt;</text:p>
            <text:p text:style-name="P1737"><text:s text:c="2"/>&lt;title&gt;Вопросы — Angelina Telpuk&lt;/title&gt;</text:p>
            <text:p text:style-name="P1738"><text:s text:c="2"/>&lt;link rel="icon" href="Reolization/camera.svg" type="image/svg+xml"&gt;</text:p>
            <text:p text:style-name="P1739"><text:s text:c="2"/>&lt;link rel="preconnect" href="https://fonts.googleapis.com"&gt;</text:p>
            <text:p text:style-name="P1740"><text:s text:c="2"/>&lt;link rel="preconnect" href="https://fonts.gstatic.com" crossorigin&gt;</text:p>
            <text:p text:style-name="P1741"><text:s text:c="2"/>&lt;link href="https://fonts.googleapis.com/css2?family=Cormorant+Garamond:ital,wght@0,400;0,500;0,600;1,400&amp;family=Montserrat:wght@400;500;600&amp;display=swap" rel="stylesheet"&gt;</text:p>
            <text:p text:style-name="P1742"><text:s text:c="2"/>&lt;link rel="stylesheet" href="css/main.css"&gt;</text:p>
            <text:p text:style-name="P1743">&lt;/head&gt;</text:p>
            <text:p text:style-name="P1744">&lt;body class="page page--questions" data-page="questions"&gt;</text:p>
            <text:p text:style-name="P1745"><text:s text:c="2"/>&lt;header class="site-header" role="banner"&gt;</text:p>
            <text:p text:style-name="P1746"><text:s text:c="4"/>&lt;div class="site-header__inner"&gt;</text:p>
            <text:p text:style-name="P1747"><text:s text:c="6"/>&lt;p class="site-brand"&gt;ANGELINA TELPUK&lt;/p&gt;</text:p>
            <text:p text:style-name="P1748"><text:s text:c="6"/>&lt;button type="button" class="nav-toggle" id="nav-toggle" aria-expanded="false" aria-controls="site-nav" aria-label="Открыть меню"&gt;</text:p>
            <text:p text:style-name="P1749"><text:s text:c="8"/>&lt;span&gt;&lt;/span&gt;&lt;span&gt;&lt;/span&gt;&lt;span&gt;&lt;/span&gt;</text:p>
            <text:p text:style-name="P1750"><text:s text:c="6"/>&lt;/button&gt;</text:p>
            <text:p text:style-name="P1751"><text:s text:c="6"/>&lt;nav class="site-nav" id="site-nav" aria-label="Основная навигация"&gt;</text:p>
            <text:p text:style-name="P1752"><text:s text:c="8"/>&lt;ul class="site-nav__list"&gt;</text:p>
            <text:p text:style-name="P1753"><text:s text:c="10"/>&lt;li&gt;&lt;a href="index.html"&gt;Главная&lt;/a&gt;&lt;/li&gt;</text:p>
            <text:p text:style-name="P1754"><text:s text:c="10"/>&lt;li&gt;&lt;a href="portfolio.html"&gt;Портфолио&lt;/a&gt;&lt;/li&gt;</text:p>
            <text:p text:style-name="P1755"><text:s text:c="10"/>&lt;li&gt;&lt;a<text:s/>href="contacts.html"&gt;Контакты&lt;/a&gt;&lt;/li&gt;</text:p>
            <text:p text:style-name="P1756"><text:s text:c="10"/>&lt;li&gt;&lt;a href="questions.html"&gt;Вопросы&lt;/a&gt;&lt;/li&gt;</text:p>
            <text:p text:style-name="P1757"><text:s text:c="8"/>&lt;/ul&gt;</text:p>
            <text:p text:style-name="P1758"><text:s text:c="6"/>&lt;/nav&gt;</text:p>
            <text:p text:style-name="P1759"><text:s text:c="4"/>&lt;/div&gt;</text:p>
            <text:p text:style-name="P1760"><text:s text:c="2"/>&lt;/header&gt;</text:p>
            <text:p text:style-name="P1761"/>
            <text:p text:style-name="P1762"><text:s text:c="2"/>&lt;main class="site-main"&gt;</text:p>
            <text:p text:style-name="P1763"><text:s text:c="4"/>&lt;section class="faq-layout" aria-labelledby="faq-page-title"&gt;</text:p>
            <text:p text:style-name="P1764"><text:s text:c="6"/>&lt;figure class="faq-layout__photo"&gt;</text:p>
            <text:p text:style-name="P1765"><text:s text:c="8"/>&lt;img src="Ангелина/IMG_9891.jpeg" alt="" width="900" height="1100" loading="lazy"&gt;</text:p>
            <text:p text:style-name="P1766"><text:s text:c="6"/>&lt;/figure&gt;</text:p>
            <text:p text:style-name="P1767"><text:s text:c="6"/>&lt;div class="faq-layout__content"&gt;</text:p>
            <text:p text:style-name="P1768"><text:s text:c="8"/>&lt;h1 class="page-head__title" id="faq-page-title"&gt;Вопросы и ответы&lt;/h1&gt;</text:p>
            <text:p text:style-name="P1769"><text:s text:c="6"/><text:s text:c="2"/>&lt;div class="accordion" id="faq-accordion"&gt;&lt;/div&gt;</text:p>
            <text:p text:style-name="P1770"><text:s text:c="6"/>&lt;/div&gt;</text:p>
            <text:p text:style-name="P1771"><text:s text:c="4"/>&lt;/section&gt;</text:p>
            <text:p text:style-name="P1772"><text:s text:c="2"/>&lt;/main&gt;</text:p>
            <text:p text:style-name="P1773"/>
            <text:p text:style-name="P1774"><text:s text:c="2"/>&lt;footer class="site-footer" role="contentinfo"&gt;</text:p>
            <text:p text:style-name="P1775"><text:s text:c="4"/>&lt;div class="site-footer__inner"&gt;</text:p>
            <text:p text:style-name="P1776"><text:s text:c="6"/>&lt;p class="site-footer__copy"&gt;© 2026 Angelina Telpuk. Все<text:s/>фотографии защищены авторским правом&lt;/p&gt;</text:p>
            <text:p text:style-name="P1777"><text:s text:c="6"/>&lt;ul class="site-footer__social" aria-label="Соцсети и почта"&gt;</text:p>
            <text:p text:style-name="P1778"><text:s text:c="8"/>&lt;li&gt;</text:p>
            <text:p text:style-name="P1779"><text:s text:c="10"/>&lt;a class="icon-link" href="mailto:akrugovets@icloud.com" title="Почта"&gt;</text:p>
            <text:p text:style-name="P1780"><text:s text:c="12"/>&lt;img src="Reolization/mail.svg" alt="" width="18" height="18"&gt;</text:p>
            <text:p text:style-name="P1781"><text:s text:c="10"/>&lt;/a&gt;</text:p>
            <text:p text:style-name="P1782"><text:s text:c="8"/>&lt;/li&gt;</text:p>
            <text:p text:style-name="P1783"><text:s text:c="8"/>&lt;li&gt;</text:p>
            <text:p text:style-name="P1784"><text:s text:c="10"/>&lt;a class="icon-link" href="https://t.me/Angelina_Telpuk" target="_blank" rel="noopener noreferrer" title="Telegram"&gt;</text:p>
            <text:p text:style-name="P1785"><text:s text:c="12"/>&lt;img<text:s/>src="Reolization/telegram.svg" alt="" width="18" height="18"&gt;</text:p>
            <text:p text:style-name="P1786"><text:s text:c="10"/>&lt;/a&gt;</text:p>
            <text:p text:style-name="P1787"><text:s text:c="8"/>&lt;/li&gt;</text:p>
            <text:p text:style-name="P1788"><text:s text:c="8"/>&lt;li&gt;</text:p>
            <text:p text:style-name="P1789"><text:s text:c="10"/>&lt;a class="icon-link" href="https://instagram.com/telpuk_photo" target="_blank" rel="noopener noreferrer" title="Instagram"&gt;</text:p>
            <text:p text:style-name="P1790"><text:s text:c="12"/>&lt;img src="Reolization/instagram.svg" alt="" width="18" height="18"&gt;</text:p>
            <text:p text:style-name="P1791"><text:s text:c="10"/>&lt;/a&gt;</text:p>
            <text:p text:style-name="P1792"><text:s text:c="8"/>&lt;/li&gt;</text:p>
            <text:p text:style-name="P1793"><text:s text:c="6"/>&lt;/ul&gt;</text:p>
            <text:p text:style-name="P1794"><text:s text:c="4"/>&lt;/div&gt;</text:p>
            <text:p text:style-name="P1795"><text:s text:c="2"/>&lt;/footer&gt;</text:p>
            <text:p text:style-name="P1796"/>
            <text:p text:style-name="P1797"><text:s text:c="2"/>&lt;div class="fab" aria-label="Быстрые действия"&gt;</text:p>
            <text:p text:style-name="P1798"><text:s text:c="4"/>&lt;button type="button" class="fab__btn" id="fab-scroll" title="Наверх" aria-label="Прокрутка наверх"&gt;</text:p>
            <text:p text:style-name="P1799"><text:s text:c="6"/>&lt;svg viewBox="0 0 24 24" width="22" height="22" xmlns="http://www.w3.org/2000/svg" aria-hidden="true"&gt;</text:p>
            <text:p text:style-name="P1800"><text:s text:c="8"/>&lt;path d="M12 5l7 7h-4v7H9v-7H5l7-7z" fill="currentColor"/&gt;</text:p>
            <text:p text:style-name="P1801"><text:s text:c="6"/>&lt;/svg&gt;</text:p>
            <text:p text:style-name="P1802"><text:s text:c="4"/>&lt;/button&gt;</text:p>
            <text:p text:style-name="P1803"><text:s text:c="2"/>&lt;/div&gt;</text:p>
            <text:p text:style-name="P1804"/>
            <text:p text:style-name="P1805"><text:s text:c="2"/>&lt;div class="toast" id="toast" role="status" aria-live="polite" hidden&gt;&lt;/div&gt;</text:p>
            <text:p text:style-name="P1806"/>
            <text:p text:style-name="P1807"><text:s text:c="2"/>&lt;script src="js/main.js" defer&gt;&lt;/script&gt;</text:p>
            <text:p text:style-name="P1808">&lt;/body&gt;</text:p>
            <text:p text:style-name="P1809">&lt;/html&gt;</text:p>
          </table:table-cell>
        </table:table-row>
      </table:table>
      <text:p text:style-name="P1810"><text:span text:style-name="T1811">Листинг В.</text:span><text:span text:style-name="T1812">4</text:span><text:span text:style-name="T1813"><text:s/>- Листинг страницы<text:s/></text:span><text:span text:style-name="T1814">с обратной связью<text:s/></text:span><text:span text:style-name="T1815">HTML</text:span><text:span text:style-name="T1816">-документа (</text:span><text:span text:style-name="T1817">contacts</text:span><text:span text:style-name="T1818">.</text:span><text:span text:style-name="T1819">html</text:span><text:span text:style-name="T1820">)</text:span></text:p>
      <text:p text:style-name="P1821"/>
      <table:table table:style-name="Table1822">
        <table:table-columns>
          <table:table-column table:style-name="TableColumn1823"/>
        </table:table-columns>
        <table:table-row table:style-name="TableRow1824">
          <table:table-cell table:style-name="TableCell1825">
            <text:p text:style-name="P1826">&lt;!DOCTYPE html&gt;</text:p>
            <text:p text:style-name="P1827">&lt;html lang="ru"&gt;</text:p>
            <text:p text:style-name="P1828">&lt;head&gt;</text:p>
            <text:p text:style-name="P1829"><text:s text:c="2"/>&lt;meta<text:s/>charset="UTF-8"&gt;</text:p>
            <text:p text:style-name="P1830"><text:s text:c="2"/>&lt;meta name="viewport" content="width=device-width, initial-scale=1.0"&gt;</text:p>
            <text:p text:style-name="P1831"><text:s text:c="2"/>&lt;title&gt;Вопросы — Angelina Telpuk&lt;/title&gt;</text:p>
            <text:p text:style-name="P1832"><text:s text:c="2"/>&lt;link rel="icon" href="Reolization/camera.svg" type="image/svg+xml"&gt;</text:p>
            <text:p text:style-name="P1833"><text:s text:c="2"/>&lt;link rel="preconnect" href="https://fonts.googleapis.com"&gt;</text:p>
            <text:p text:style-name="P1834"><text:s text:c="2"/>&lt;link rel="preconnect" href="https://fonts.gstatic.com" crossorigin&gt;</text:p>
            <text:p text:style-name="P1835"><text:s text:c="2"/>&lt;link href="https://fonts.googleapis.com/css2?family=Cormorant+Garamond:ital,wght@0,400;0,500;0,600;1,400&amp;family=Montserrat:wght@400;500;600&amp;display=swap" rel="stylesheet"&gt;</text:p>
            <text:p text:style-name="P1836"><text:s text:c="2"/>&lt;link rel="stylesheet" href="css/main.css"&gt;</text:p>
            <text:p text:style-name="P1837">&lt;/head&gt;</text:p>
            <text:p text:style-name="P1838">&lt;body class="page page--questions" data-page="questions"&gt;</text:p>
            <text:p text:style-name="P1839"><text:s text:c="2"/>&lt;header class="site-header" role="banner"&gt;</text:p>
            <text:p text:style-name="P1840"><text:s text:c="4"/>&lt;div class="site-header__inner"&gt;</text:p>
            <text:p text:style-name="P1841"><text:s text:c="6"/>&lt;p class="site-brand"&gt;ANGELINA TELPUK&lt;/p&gt;</text:p>
            <text:p text:style-name="P1842"><text:s text:c="6"/>&lt;button type="button" class="nav-toggle" id="nav-toggle" aria-expanded="false" aria-controls="site-nav" aria-label="Открыть меню"&gt;</text:p>
            <text:p text:style-name="P1843"><text:s text:c="8"/>&lt;span&gt;&lt;/span&gt;&lt;span&gt;&lt;/span&gt;&lt;span&gt;&lt;/span&gt;</text:p>
            <text:p text:style-name="P1844"><text:s text:c="6"/>&lt;/button&gt;</text:p>
            <text:p text:style-name="P1845"><text:s text:c="6"/>&lt;nav class="site-nav" id="site-nav" aria-label="Основная навигация"&gt;</text:p>
            <text:p text:style-name="P1846"><text:s text:c="8"/>&lt;ul class="site-nav__list"&gt;</text:p>
            <text:p text:style-name="P1847"><text:s text:c="10"/>&lt;li&gt;&lt;a href="index.html"&gt;Главная&lt;/a&gt;&lt;/li&gt;</text:p>
            <text:p text:style-name="P1848"><text:s text:c="10"/>&lt;li&gt;&lt;a href="portfolio.html"&gt;Портфолио&lt;/a&gt;&lt;/li&gt;</text:p>
            <text:p text:style-name="P1849"><text:s text:c="10"/>&lt;li&gt;&lt;a href="contacts.html"&gt;Контакты&lt;/a&gt;&lt;/li&gt;</text:p>
            <text:p text:style-name="P1850"><text:s text:c="10"/>&lt;li&gt;&lt;a href="questions.html"&gt;Вопросы&lt;/a&gt;&lt;/li&gt;</text:p>
            <text:p text:style-name="P1851"><text:s text:c="8"/>&lt;/ul&gt;</text:p>
            <text:p text:style-name="P1852"><text:s text:c="6"/>&lt;/nav&gt;</text:p>
            <text:p text:style-name="P1853"><text:s text:c="4"/>&lt;/div&gt;</text:p>
            <text:p text:style-name="P1854"><text:s text:c="2"/>&lt;/header&gt;</text:p>
            <text:p text:style-name="P1855"/>
            <text:p text:style-name="P1856"><text:s text:c="2"/>&lt;main class="site-main"&gt;</text:p>
            <text:p text:style-name="P1857"><text:s text:c="4"/>&lt;section class="faq-layout" aria-labelledby="faq-page-title"&gt;</text:p>
            <text:p text:style-name="P1858"><text:s text:c="6"/>&lt;figure class="faq-layout__photo"&gt;</text:p>
            <text:p text:style-name="P1859"><text:s text:c="8"/>&lt;img src="Ангелина/IMG_9891.jpeg" alt="" width="900" height="1100" loading="lazy"&gt;</text:p>
            <text:p text:style-name="P1860"><text:s text:c="6"/>&lt;/figure&gt;</text:p>
            <text:p text:style-name="P1861"><text:s text:c="6"/>&lt;div class="faq-layout__content"&gt;</text:p>
            <text:p text:style-name="P1862"><text:s text:c="8"/>&lt;h1 class="page-head__title" id="faq-page-title"&gt;Вопросы и ответы&lt;/h1&gt;</text:p>
            <text:p text:style-name="P1863"><text:s text:c="8"/>&lt;div class="accordion" id="faq-accordion"&gt;&lt;/div&gt;</text:p>
            <text:p text:style-name="P1864"><text:s text:c="6"/>&lt;/div&gt;</text:p>
            <text:p text:style-name="P1865"><text:s text:c="4"/>&lt;/section&gt;</text:p>
            <text:p text:style-name="P1866"><text:s text:c="2"/>&lt;/main&gt;</text:p>
            <text:p text:style-name="P1867"/>
            <text:p text:style-name="P1868"><text:s text:c="2"/>&lt;footer class="site-footer" role="contentinfo"&gt;</text:p>
            <text:p text:style-name="P1869"><text:s text:c="4"/>&lt;div class="site-footer__inner"&gt;</text:p>
            <text:p text:style-name="P1870"><text:s text:c="6"/>&lt;p class="site-footer__copy"&gt;© 2026 Angelina Telpuk. Все фотографии защищены авторским правом&lt;/p&gt;</text:p>
            <text:p text:style-name="P1871"><text:s text:c="6"/>&lt;ul<text:s/>class="site-footer__social" aria-label="Соцсети и почта"&gt;</text:p>
            <text:p text:style-name="P1872"><text:s text:c="8"/>&lt;li&gt;</text:p>
            <text:p text:style-name="P1873"><text:s text:c="10"/>&lt;a class="icon-link" href="mailto:akrugovets@icloud.com" title="Почта"&gt;</text:p>
            <text:p text:style-name="P1874"><text:s text:c="12"/>&lt;img src="Reolization/mail.svg" alt="" width="18" height="18"&gt;</text:p>
            <text:p text:style-name="P1875"><text:s text:c="10"/>&lt;/a&gt;</text:p>
            <text:p text:style-name="P1876"><text:s text:c="8"/>&lt;/li&gt;</text:p>
            <text:p text:style-name="P1877"><text:s text:c="8"/>&lt;li&gt;</text:p>
            <text:p text:style-name="P1878"><text:s text:c="10"/>&lt;a class="icon-link" href="https://t.me/Angelina_Telpuk" target="_blank" rel="noopener noreferrer" title="Telegram"&gt;</text:p>
            <text:p text:style-name="P1879"><text:s text:c="12"/>&lt;img src="Reolization/telegram.svg" alt="" width="18" height="18"&gt;</text:p>
            <text:p text:style-name="P1880"><text:s text:c="10"/>&lt;/a&gt;</text:p>
            <text:p text:style-name="P1881"><text:s text:c="8"/>&lt;/li&gt;</text:p>
            <text:p text:style-name="P1882"><text:s text:c="7"/><text:s/>&lt;li&gt;</text:p>
            <text:p text:style-name="P1883"><text:s text:c="10"/>&lt;a class="icon-link" href="https://instagram.com/telpuk_photo" target="_blank" rel="noopener noreferrer" title="Instagram"&gt;</text:p>
            <text:p text:style-name="P1884"><text:s text:c="12"/>&lt;img src="Reolization/instagram.svg" alt="" width="18" height="18"&gt;</text:p>
            <text:p text:style-name="P1885"><text:s text:c="10"/>&lt;/a&gt;</text:p>
            <text:p text:style-name="P1886"><text:s text:c="8"/>&lt;/li&gt;</text:p>
            <text:p text:style-name="P1887"><text:s text:c="6"/>&lt;/ul&gt;</text:p>
            <text:p text:style-name="P1888"><text:s text:c="4"/>&lt;/div&gt;</text:p>
            <text:p text:style-name="P1889"><text:s text:c="2"/>&lt;/footer&gt;</text:p>
            <text:p text:style-name="P1890"/>
            <text:p text:style-name="P1891"><text:s text:c="2"/>&lt;div class="fab" aria-label="Быстрые действия"&gt;</text:p>
            <text:p text:style-name="P1892"><text:s text:c="4"/>&lt;button type="button" class="fab__btn" id="fab-scroll" title="Наверх" aria-label="Прокрутка наверх"&gt;</text:p>
            <text:p text:style-name="P1893"><text:s text:c="6"/>&lt;svg viewBox="0 0 24 24" width="22" height="22" xmlns="http://www.w3.org/2000/svg" aria-hidden="true"&gt;</text:p>
            <text:p text:style-name="P1894"><text:s text:c="8"/>&lt;path d="M12 5l7 7h-4v7H9v-7H5l7-7z" fill="currentColor"/&gt;</text:p>
            <text:p text:style-name="P1895"><text:s text:c="6"/>&lt;/svg&gt;</text:p>
            <text:p text:style-name="P1896"><text:s text:c="4"/>&lt;/button&gt;</text:p>
            <text:p text:style-name="P1897"><text:s text:c="2"/>&lt;/div&gt;</text:p>
            <text:p text:style-name="P1898"/>
            <text:p text:style-name="P1899"><text:s text:c="2"/>&lt;div class="toast" id="toast" role="status" aria-live="polite" hidden&gt;&lt;/div&gt;</text:p>
            <text:p text:style-name="P1900"/>
            <text:p text:style-name="P1901"><text:s text:c="2"/>&lt;script<text:s/>src="js/main.js" defer&gt;&lt;/script&gt;</text:p>
            <text:p text:style-name="P1902">&lt;/body&gt;</text:p>
            <text:p text:style-name="P1903">&lt;/html&gt;</text:p>
          </table:table-cell>
        </table:table-row>
      </table:table>
      <text:p text:style-name="P1904"><text:span text:style-name="T1905">Листинг В.</text:span><text:span text:style-name="T1906">5</text:span><text:span text:style-name="T1907"><text:s/>- Листинг страницы<text:s/></text:span><text:span text:style-name="T1908">c</text:span><text:span text:style-name="T1909"><text:s/>вопросами<text:s/></text:span><text:span text:style-name="T1910">HTML</text:span><text:span text:style-name="T1911">-документа (</text:span><text:span text:style-name="T1912">questions</text:span><text:span text:style-name="T1913">.</text:span><text:span text:style-name="T1914">html</text:span><text:span text:style-name="T1915">)</text:span></text:p>
      <text:p text:style-name="P1916"/>
      <text:p text:style-name="P1917">ПРИЛОЖЕНИЕ Г</text:p>
      <text:p text:style-name="P1918"><text:span text:style-name="T1919">Листинг SCSS и CSS</text:span></text:p>
      <table:table table:style-name="Table1920">
        <table:table-columns>
          <table:table-column table:style-name="TableColumn1921"/>
        </table:table-columns>
        <table:table-row table:style-name="TableRow1922">
          <table:table-cell table:style-name="TableCell1923">
            <text:p text:style-name="P1924">$color-bg: #fafafa;</text:p>
            <text:p text:style-name="P1925">$color-text: #1a1a1a;</text:p>
            <text:p text:style-name="P1926">$color-muted: #5c5c5c;</text:p>
            <text:p text:style-name="P1927">$color-line: #e6e6e6;</text:p>
            <text:p text:style-name="P1928">$color-accent: #111;</text:p>
            <text:p text:style-name="P1929">$font-sans: "Montserrat", system-ui, -apple-system, "Segoe UI", Roboto, sans-serif;</text:p>
            <text:p text:style-name="P1930">$font-serif: "Cormorant Garamond", Georgia, "Times New Roman", serif;</text:p>
            <text:p text:style-name="P1931">$max-width: 1120px;</text:p>
            <text:p text:style-name="P1932"/>
            <text:p text:style-name="P1933">*,</text:p>
            <text:p text:style-name="P1934">*::before,</text:p>
            <text:p text:style-name="P1935">*::after {</text:p>
            <text:p text:style-name="P1936"><text:s text:c="2"/>box-sizing: border-box;</text:p>
            <text:p text:style-name="P1937">}</text:p>
            <text:p text:style-name="P1938"/>
            <text:p text:style-name="P1939">html {</text:p>
            <text:p text:style-name="P1940"><text:s text:c="2"/>-webkit-text-size-adjust: 100%;</text:p>
            <text:p text:style-name="P1941"><text:s text:c="2"/>scroll-behavior: smooth;</text:p>
            <text:p text:style-name="P1942">}</text:p>
            <text:p text:style-name="P1943"/>
            <text:p text:style-name="P1944">body {</text:p>
            <text:p text:style-name="P1945"><text:s text:c="2"/>margin: 0;</text:p>
            <text:p text:style-name="P1946"><text:s text:c="2"/>font-family: $font-sans;</text:p>
            <text:p text:style-name="P1947"><text:s text:c="2"/>color: $color-text;</text:p>
            <text:p text:style-name="P1948"><text:s text:c="2"/>background: $color-bg;</text:p>
            <text:p text:style-name="P1949"><text:s text:c="2"/>line-height: 1.55;</text:p>
            <text:p text:style-name="P1950">}</text:p>
            <text:p text:style-name="P1951"/>
            <text:p text:style-name="P1952">img {</text:p>
            <text:p text:style-name="P1953"><text:s text:c="2"/>max-width: 100%;</text:p>
            <text:p text:style-name="P1954"><text:s text:c="2"/>height: auto;</text:p>
            <text:p text:style-name="P1955"><text:s text:c="2"/>display: block;</text:p>
            <text:p text:style-name="P1956">}</text:p>
            <text:p text:style-name="P1957"/>
            <text:p text:style-name="P1958">a {</text:p>
            <text:p text:style-name="P1959"><text:s text:c="2"/>color: inherit;</text:p>
            <text:p text:style-name="P1960"><text:s text:c="2"/>text-decoration: none;</text:p>
            <text:p text:style-name="P1961">}</text:p>
            <text:p text:style-name="P1962"/>
            <text:p text:style-name="P1963">button {</text:p>
            <text:p text:style-name="P1964"><text:s text:c="2"/>font: inherit;</text:p>
            <text:p text:style-name="P1965"><text:s text:c="2"/>cursor: pointer;</text:p>
            <text:p text:style-name="P1966">}</text:p>
            <text:p text:style-name="P1967"/>
            <text:p text:style-name="P1968">.visually-hidden {</text:p>
            <text:p text:style-name="P1969"><text:s text:c="2"/>position: absolute;</text:p>
            <text:p text:style-name="P1970"><text:s text:c="2"/>width: 1px;</text:p>
            <text:p text:style-name="P1971"><text:s text:c="2"/>height: 1px;</text:p>
            <text:p text:style-name="P1972"><text:s text:c="2"/>padding: 0;</text:p>
            <text:p text:style-name="P1973"><text:s text:c="2"/>margin: -1px;</text:p>
            <text:p text:style-name="P1974"><text:s text:c="2"/>overflow: hidden;</text:p>
            <text:p text:style-name="P1975"><text:s text:c="2"/>clip: rect(0, 0, 0, 0);</text:p>
            <text:p text:style-name="P1976"><text:s text:c="2"/>white-space: nowrap;</text:p>
            <text:p text:style-name="P1977"><text:s text:c="2"/>border: 0;</text:p>
            <text:p text:style-name="P1978">}</text:p>
            <text:p text:style-name="P1979"/>
            <text:p text:style-name="P1980">.site-header {</text:p>
            <text:p text:style-name="P1981"><text:s text:c="2"/>position: sticky;</text:p>
            <text:p text:style-name="P1982"><text:s text:c="2"/>top: 0;</text:p>
            <text:p text:style-name="P1983"><text:s text:c="2"/>z-index: 40;</text:p>
            <text:p text:style-name="P1984"><text:s text:c="2"/>background: rgba($color-bg, 0.92);</text:p>
            <text:p text:style-name="P1985"><text:s text:c="2"/>-webkit-backdrop-filter: blur(8px);</text:p>
            <text:p text:style-name="P1986"><text:s text:c="2"/>backdrop-filter: blur(8px);</text:p>
            <text:p text:style-name="P1987"><text:s text:c="2"/>border-bottom: 1px solid $color-line;</text:p>
            <text:p text:style-name="P1988">}</text:p>
            <text:p text:style-name="P1989"/>
            <text:p text:style-name="P1990">.site-header__inner {</text:p>
            <text:p text:style-name="P1991"><text:s text:c="2"/>max-width: $max-width;</text:p>
            <text:p text:style-name="P1992"><text:s text:c="2"/>margin: 0 auto;</text:p>
            <text:p text:style-name="P1993"><text:s text:c="2"/>padding: 0.75rem 1.25rem 1rem;</text:p>
            <text:p text:style-name="P1994"><text:s text:c="2"/>display: flex;</text:p>
            <text:p text:style-name="P1995"><text:s text:c="2"/>flex-direction: column;</text:p>
            <text:p text:style-name="P1996"><text:s text:c="2"/>align-items: center;</text:p>
            <text:p text:style-name="P1997"><text:s text:c="2"/>gap: 0.35rem;</text:p>
            <text:p text:style-name="P1998">}</text:p>
            <text:p text:style-name="P1999"/>
            <text:p text:style-name="P2000">.site-brand {</text:p>
            <text:p text:style-name="P2001"><text:s text:c="2"/>margin: 0;</text:p>
            <text:p text:style-name="P2002"><text:s text:c="2"/>letter-spacing: 0.22em;</text:p>
            <text:p text:style-name="P2003"><text:s text:c="2"/>font-size: clamp(0.58rem, 1.25vw, 0.68rem);</text:p>
            <text:p text:style-name="P2004"><text:s text:c="2"/>text-transform: uppercase;</text:p>
            <text:p text:style-name="P2005"><text:s text:c="2"/>font-weight: 600;</text:p>
            <text:p text:style-name="P2006"><text:s text:c="2"/>font-family: $font-sans;</text:p>
            <text:p text:style-name="P2007">}</text:p>
            <text:p text:style-name="P2008"/>
            <text:p text:style-name="P2009">.site-nav__list {</text:p>
            <text:p text:style-name="P2010"><text:s text:c="2"/>list-style: none;</text:p>
            <text:p text:style-name="P2011"><text:s text:c="2"/>margin: 0;</text:p>
            <text:p text:style-name="P2012"><text:s text:c="2"/>padding: 0;</text:p>
            <text:p text:style-name="P2013"><text:s text:c="2"/>display: flex;</text:p>
            <text:p text:style-name="P2014"><text:s text:c="2"/>flex-wrap: wrap;</text:p>
            <text:p text:style-name="P2015"><text:s text:c="2"/>justify-content: center;</text:p>
            <text:p text:style-name="P2016"><text:s text:c="2"/>gap: 0.75rem<text:s/>1.5rem;</text:p>
            <text:p text:style-name="P2017">}</text:p>
            <text:p text:style-name="P2018"/>
            <text:p text:style-name="P2019">.site-nav a {</text:p>
            <text:p text:style-name="P2020"><text:s text:c="2"/>padding: 0.2rem 0;</text:p>
            <text:p text:style-name="P2021"><text:s text:c="2"/>font-size: 0.68rem;</text:p>
            <text:p text:style-name="P2022"><text:s text:c="2"/>letter-spacing: 0.1em;</text:p>
            <text:p text:style-name="P2023"><text:s text:c="2"/>text-transform: uppercase;</text:p>
            <text:p text:style-name="P2024"><text:s text:c="2"/>font-family: $font-sans;</text:p>
            <text:p text:style-name="P2025"><text:s text:c="2"/>font-weight: 500;</text:p>
            <text:p text:style-name="P2026"><text:s text:c="2"/>background-image: linear-gradient(currentColor, currentColor);</text:p>
            <text:p text:style-name="P2027"><text:s text:c="2"/>background-repeat: no-repeat;</text:p>
            <text:p text:style-name="P2028"><text:s text:c="2"/>background-position: 0 100%;</text:p>
            <text:p text:style-name="P2029"><text:s text:c="2"/>background-size: 0% 1px;</text:p>
            <text:p text:style-name="P2030"><text:s text:c="2"/>transition: background-size 0.2s ease;</text:p>
            <text:p text:style-name="P2031">}</text:p>
            <text:p text:style-name="P2032"/>
            <text:p text:style-name="P2033">.site-nav a:hover,</text:p>
            <text:p text:style-name="P2034">.site-nav a.is-active {</text:p>
            <text:p text:style-name="P2035"><text:s text:c="2"/>background-size: 100% 1px;</text:p>
            <text:p text:style-name="P2036">}</text:p>
            <text:p text:style-name="P2037"/>
            <text:p text:style-name="P2038">.nav-toggle {</text:p>
            <text:p text:style-name="P2039"><text:s text:c="2"/>display: none;</text:p>
            <text:p text:style-name="P2040"><text:s text:c="2"/>width: 2.5rem;</text:p>
            <text:p text:style-name="P2041"><text:s text:c="2"/>height:<text:s/>2.5rem;</text:p>
            <text:p text:style-name="P2042"><text:s text:c="2"/>border: 1px solid $color-line;</text:p>
            <text:p text:style-name="P2043"><text:s text:c="2"/>border-radius: 4px;</text:p>
            <text:p text:style-name="P2044"><text:s text:c="2"/>background: #fff;</text:p>
            <text:p text:style-name="P2045"><text:s text:c="2"/>padding: 0;</text:p>
            <text:p text:style-name="P2046"><text:s text:c="2"/>flex-direction: column;</text:p>
            <text:p text:style-name="P2047"><text:s text:c="2"/>align-items: center;</text:p>
            <text:p text:style-name="P2048"><text:s text:c="2"/>justify-content: center;</text:p>
            <text:p text:style-name="P2049"><text:s text:c="2"/>gap: 5px;</text:p>
            <text:p text:style-name="P2050">}</text:p>
            <text:p text:style-name="P2051"/>
            <text:p text:style-name="P2052">.nav-toggle span {</text:p>
            <text:p text:style-name="P2053"><text:s text:c="2"/>display: block;</text:p>
            <text:p text:style-name="P2054"><text:s text:c="2"/>width: 1.25rem;</text:p>
            <text:p text:style-name="P2055"><text:s text:c="2"/>height: 2px;</text:p>
            <text:p text:style-name="P2056"><text:s text:c="2"/>background: $color-text;</text:p>
            <text:p text:style-name="P2057">}</text:p>
            <text:p text:style-name="P2058"/>
            <text:p text:style-name="P2059">@media (max-width: 720px) {</text:p>
            <text:p text:style-name="P2060"><text:s text:c="2"/>.site-header__inner {</text:p>
            <text:p text:style-name="P2061"><text:s text:c="4"/>flex-direction: row;</text:p>
            <text:p text:style-name="P2062"><text:s text:c="4"/>flex-wrap: wrap;</text:p>
            <text:p text:style-name="P2063"><text:s text:c="4"/>align-items: center;</text:p>
            <text:p text:style-name="P2064"><text:s text:c="4"/>justify-content: space-between;</text:p>
            <text:p text:style-name="P2065"><text:s text:c="4"/>gap: 0.5rem 0.75rem;</text:p>
            <text:p text:style-name="P2066"><text:s text:c="4"/>padding: 0.75rem 1rem 1rem;</text:p>
            <text:p text:style-name="P2067"><text:s text:c="2"/>}</text:p>
            <text:p text:style-name="P2068"/>
            <text:p text:style-name="P2069"><text:s text:c="2"/>.site-brand {</text:p>
            <text:p text:style-name="P2070"><text:s text:c="4"/>flex: 1 1 auto;</text:p>
            <text:p text:style-name="P2071"><text:s text:c="4"/>min-width: 0;</text:p>
            <text:p text:style-name="P2072"><text:s text:c="4"/>text-align: left;</text:p>
            <text:p text:style-name="P2073"><text:s text:c="2"/>}</text:p>
            <text:p text:style-name="P2074"/>
            <text:p text:style-name="P2075"><text:s text:c="2"/>.nav-toggle {</text:p>
            <text:p text:style-name="P2076"><text:s text:c="4"/>display: inline-flex;</text:p>
            <text:p text:style-name="P2077"><text:s text:c="4"/>flex: 0 0 auto;</text:p>
            <text:p text:style-name="P2078"><text:s text:c="4"/>align-self: center;</text:p>
            <text:p text:style-name="P2079"><text:s text:c="2"/>}</text:p>
            <text:p text:style-name="P2080"/>
            <text:p text:style-name="P2081"><text:s text:c="2"/>.site-nav {</text:p>
            <text:p text:style-name="P2082"><text:s text:c="4"/>flex: 1 0 100%;</text:p>
            <text:p text:style-name="P2083"><text:s text:c="4"/>width: 100%;</text:p>
            <text:p text:style-name="P2084"><text:s text:c="4"/>max-width: 100%;</text:p>
            <text:p text:style-name="P2085"><text:s text:c="4"/>max-height: 0;</text:p>
            <text:p text:style-name="P2086"><text:s text:c="4"/>overflow: hidden;</text:p>
            <text:p text:style-name="P2087"><text:s text:c="4"/>transition: max-height 0.35s ease;</text:p>
            <text:p text:style-name="P2088"><text:s text:c="2"/>}</text:p>
            <text:p text:style-name="P2089"/>
            <text:p text:style-name="P2090"><text:s text:c="2"/>.site-nav.is-open {</text:p>
            <text:p text:style-name="P2091"><text:s text:c="4"/>max-height: 320px;</text:p>
            <text:p text:style-name="P2092"><text:s text:c="2"/>}</text:p>
            <text:p text:style-name="P2093"/>
            <text:p text:style-name="P2094"><text:s text:c="2"/>.site-nav__list {</text:p>
            <text:p text:style-name="P2095"><text:s text:c="4"/>flex-direction: column;</text:p>
            <text:p text:style-name="P2096"><text:s text:c="4"/>align-items: flex-start;</text:p>
            <text:p text:style-name="P2097"><text:s text:c="4"/>padding: 0.5rem 0 0.75rem;</text:p>
            <text:p text:style-name="P2098"><text:s text:c="2"/>}</text:p>
            <text:p text:style-name="P2099">}</text:p>
            <text:p text:style-name="P2100"/>
            <text:p text:style-name="P2101">.marquee-wrap {</text:p>
            <text:p text:style-name="P2102"><text:s text:c="2"/>overflow: hidden;</text:p>
            <text:p text:style-name="P2103"><text:s text:c="2"/>border-bottom: 1px solid $color-line;</text:p>
            <text:p text:style-name="P2104"><text:s text:c="2"/>background: #fff;</text:p>
            <text:p text:style-name="P2105">}</text:p>
            <text:p text:style-name="P2106"/>
            <text:p text:style-name="P2107">.marquee {</text:p>
            <text:p text:style-name="P2108"><text:s text:c="2"/>display: flex;</text:p>
            <text:p text:style-name="P2109"><text:s text:c="2"/>width: max-content;</text:p>
            <text:p text:style-name="P2110"><text:s text:c="2"/>gap: 0.65rem;</text:p>
            <text:p text:style-name="P2111"><text:s text:c="2"/>padding: 0.55rem 0;</text:p>
            <text:p text:style-name="P2112"><text:s text:c="2"/>animation: marquee-scroll 56s linear infinite;</text:p>
            <text:p text:style-name="P2113">}</text:p>
            <text:p text:style-name="P2114"/>
            <text:p text:style-name="P2115">.marquee img {</text:p>
            <text:p text:style-name="P2116"><text:s text:c="2"/>flex: 0 0 auto;</text:p>
            <text:p text:style-name="P2117"><text:s text:c="2"/>width: auto;</text:p>
            <text:p text:style-name="P2118"><text:s text:c="2"/>height: clamp(12rem, 25vw, 20rem);</text:p>
            <text:p text:style-name="P2119"><text:s text:c="2"/>object-fit: cover;</text:p>
            <text:p text:style-name="P2120"><text:s text:c="2"/>border-radius: 2px;</text:p>
            <text:p text:style-name="P2121"><text:s text:c="2"/>filter: grayscale(0.08);</text:p>
            <text:p text:style-name="P2122">}</text:p>
            <text:p text:style-name="P2123"/>
            <text:p text:style-name="P2124">@keyframes marquee-scroll {</text:p>
            <text:p text:style-name="P2125"><text:s text:c="2"/>0% {</text:p>
            <text:p text:style-name="P2126"><text:s text:c="4"/>transform: translateX(0);</text:p>
            <text:p text:style-name="P2127"><text:s text:c="2"/>}</text:p>
            <text:p text:style-name="P2128"/>
            <text:p text:style-name="P2129"><text:s text:c="2"/>100% {</text:p>
            <text:p text:style-name="P2130"><text:s text:c="4"/>transform:<text:s/>translateX(-50%);</text:p>
            <text:p text:style-name="P2131"><text:s text:c="2"/>}</text:p>
            <text:p text:style-name="P2132">}</text:p>
            <text:p text:style-name="P2133"/>
            <text:p text:style-name="P2134">@media (prefers-reduced-motion: reduce) {</text:p>
            <text:p text:style-name="P2135"><text:s text:c="2"/>.marquee {</text:p>
            <text:p text:style-name="P2136"><text:s text:c="4"/>animation: none;</text:p>
            <text:p text:style-name="P2137"><text:s text:c="2"/>}</text:p>
            <text:p text:style-name="P2138">}</text:p>
            <text:p text:style-name="P2139"/>
            <text:p text:style-name="P2140">.site-main {</text:p>
            <text:p text:style-name="P2141"><text:s text:c="2"/>max-width: $max-width;</text:p>
            <text:p text:style-name="P2142"><text:s text:c="2"/>margin: 0 auto;</text:p>
            <text:p text:style-name="P2143"><text:s text:c="2"/>padding: 2.25rem 1.25rem 3rem;</text:p>
            <text:p text:style-name="P2144">}</text:p>
            <text:p text:style-name="P2145"/>
            <text:p text:style-name="P2146">.site-main--narrow {</text:p>
            <text:p text:style-name="P2147"><text:s text:c="2"/>max-width: 1200px;</text:p>
            <text:p text:style-name="P2148">}</text:p>
            <text:p text:style-name="P2149"/>
            <text:p text:style-name="P2150">.hero {</text:p>
            <text:p text:style-name="P2151"><text:s text:c="2"/>position: relative;</text:p>
            <text:p text:style-name="P2152"><text:s text:c="2"/>padding: 1.25rem 0 2rem;</text:p>
            <text:p text:style-name="P2153"><text:s text:c="2"/>text-align: center;</text:p>
            <text:p text:style-name="P2154">}</text:p>
            <text:p text:style-name="P2155"/>
            <text:p text:style-name="P2156">.intro-text {</text:p>
            <text:p text:style-name="P2157"><text:s text:c="2"/>max-width: 46rem;</text:p>
            <text:p text:style-name="P2158"><text:s text:c="2"/>margin: 0 auto;</text:p>
            <text:p text:style-name="P2159"><text:s text:c="2"/>font-family: $font-serif;</text:p>
            <text:p text:style-name="P2160"><text:s text:c="2"/>font-size: clamp(1rem, 2.4vw, 1.15rem);</text:p>
            <text:p text:style-name="P2161"><text:s text:c="2"/>white-space: pre-line;</text:p>
            <text:p text:style-name="P2162"><text:s text:c="2"/>color: $color-text;</text:p>
            <text:p text:style-name="P2163">}</text:p>
            <text:p text:style-name="P2164"/>
            <text:p text:style-name="P2165">.categories {</text:p>
            <text:p text:style-name="P2166"><text:s text:c="2"/>display: grid;</text:p>
            <text:p text:style-name="P2167"><text:s text:c="2"/>grid-template-columns: repeat(3, minmax(0, 1fr));</text:p>
            <text:p text:style-name="P2168"><text:s text:c="2"/>gap: 1.25rem;</text:p>
            <text:p text:style-name="P2169"><text:s text:c="2"/>margin-top: 2rem;</text:p>
            <text:p text:style-name="P2170">}</text:p>
            <text:p text:style-name="P2171"/>
            <text:p text:style-name="P2172">@media (max-width: 900px) {</text:p>
            <text:p text:style-name="P2173"><text:s text:c="2"/>.categories {</text:p>
            <text:p text:style-name="P2174"><text:s text:c="4"/>grid-template-columns: 1fr;</text:p>
            <text:p text:style-name="P2175"><text:s text:c="2"/>}</text:p>
            <text:p text:style-name="P2176">}</text:p>
            <text:p text:style-name="P2177"/>
            <text:p text:style-name="P2178">.cat-card {</text:p>
            <text:p text:style-name="P2179"><text:s text:c="2"/>background: #fff;</text:p>
            <text:p text:style-name="P2180"><text:s text:c="2"/>border: 1px solid<text:s/>$color-line;</text:p>
            <text:p text:style-name="P2181">}</text:p>
            <text:p text:style-name="P2182"/>
            <text:p text:style-name="P2183">.cat-card__link {</text:p>
            <text:p text:style-name="P2184"><text:s text:c="2"/>display: flex;</text:p>
            <text:p text:style-name="P2185"><text:s text:c="2"/>flex-direction: column;</text:p>
            <text:p text:style-name="P2186"><text:s text:c="2"/>height: 100%;</text:p>
            <text:p text:style-name="P2187"><text:s text:c="2"/>transition: box-shadow 0.2s ease, transform 0.2s ease;</text:p>
            <text:p text:style-name="P2188">}</text:p>
            <text:p text:style-name="P2189"/>
            <text:p text:style-name="P2190">.cat-card__link:hover {</text:p>
            <text:p text:style-name="P2191"><text:s text:c="2"/>box-shadow: 0 12px 30px rgba(0, 0, 0, 0.08);</text:p>
            <text:p text:style-name="P2192"><text:s text:c="2"/>transform: translateY(-2px);</text:p>
            <text:p text:style-name="P2193">}</text:p>
            <text:p text:style-name="P2194"/>
            <text:p text:style-name="P2195">.cat-card__figure {</text:p>
            <text:p text:style-name="P2196"><text:s text:c="2"/>margin: 0;</text:p>
            <text:p text:style-name="P2197"><text:s text:c="2"/>aspect-ratio: 4 / 5;</text:p>
            <text:p text:style-name="P2198"><text:s text:c="2"/>overflow: hidden;</text:p>
            <text:p text:style-name="P2199">}</text:p>
            <text:p text:style-name="P2200"/>
            <text:p text:style-name="P2201">.cat-card__figure img {</text:p>
            <text:p text:style-name="P2202"><text:s text:c="2"/>width: 100%;</text:p>
            <text:p text:style-name="P2203"><text:s text:c="2"/>height: 100%;</text:p>
            <text:p text:style-name="P2204"><text:s text:c="2"/>object-fit: cover;</text:p>
            <text:p text:style-name="P2205"><text:s text:c="2"/>transition: transform 0.45s ease;</text:p>
            <text:p text:style-name="P2206">}</text:p>
            <text:p text:style-name="P2207"/>
            <text:p text:style-name="P2208">.cat-card__link:hover .cat-card__figure img {</text:p>
            <text:p text:style-name="P2209"><text:s text:c="2"/>transform: scale(1.04);</text:p>
            <text:p text:style-name="P2210">}</text:p>
            <text:p text:style-name="P2211"/>
            <text:p text:style-name="P2212">.cat-card__body {</text:p>
            <text:p text:style-name="P2213"><text:s text:c="2"/>padding: 1.1rem 1.1rem 1.35rem;</text:p>
            <text:p text:style-name="P2214"><text:s text:c="2"/>display: flex;</text:p>
            <text:p text:style-name="P2215"><text:s text:c="2"/>flex-direction: column;</text:p>
            <text:p text:style-name="P2216"><text:s text:c="2"/>gap: 0.35rem;</text:p>
            <text:p text:style-name="P2217"><text:s text:c="2"/>flex: 1;</text:p>
            <text:p text:style-name="P2218">}</text:p>
            <text:p text:style-name="P2219"/>
            <text:p text:style-name="P2220">.cat-card__title {</text:p>
            <text:p text:style-name="P2221"><text:s text:c="2"/>margin: 0;</text:p>
            <text:p text:style-name="P2222"><text:s text:c="2"/>font-family: $font-serif;</text:p>
            <text:p text:style-name="P2223"><text:s text:c="2"/>font-size: 1.35rem;</text:p>
            <text:p text:style-name="P2224"><text:s text:c="2"/>font-weight: 400;</text:p>
            <text:p text:style-name="P2225">}</text:p>
            <text:p text:style-name="P2226"/>
            <text:p text:style-name="P2227">.cat-card__desc {</text:p>
            <text:p text:style-name="P2228"><text:s text:c="2"/>margin: 0;</text:p>
            <text:p text:style-name="P2229"><text:s text:c="2"/>color: $color-muted;</text:p>
            <text:p text:style-name="P2230"><text:s text:c="2"/>font-size: 0.82rem;</text:p>
            <text:p text:style-name="P2231"><text:s text:c="2"/>flex: 1;</text:p>
            <text:p text:style-name="P2232">}</text:p>
            <text:p text:style-name="P2233"/>
            <text:p text:style-name="P2234">.cat-card__cta {</text:p>
            <text:p text:style-name="P2235"><text:s text:c="2"/>margin-top: 0.5rem;</text:p>
            <text:p text:style-name="P2236"><text:s text:c="2"/>font-size: 0.82rem;</text:p>
            <text:p text:style-name="P2237"><text:s text:c="2"/>letter-spacing: 0.12em;</text:p>
            <text:p text:style-name="P2238"><text:s text:c="2"/>text-transform: uppercase;</text:p>
            <text:p text:style-name="P2239">}</text:p>
            <text:p text:style-name="P2240"/>
            <text:p text:style-name="P2241">.connect-block {</text:p>
            <text:p text:style-name="P2242"><text:s text:c="2"/>margin-top: 3rem;</text:p>
            <text:p text:style-name="P2243"><text:s text:c="2"/>padding-top: 2rem;</text:p>
            <text:p text:style-name="P2244"><text:s text:c="2"/>border-top: 1px solid $color-line;</text:p>
            <text:p text:style-name="P2245">}</text:p>
            <text:p text:style-name="P2246"/>
            <text:p text:style-name="P2247">.connect-block--dark {</text:p>
            <text:p text:style-name="P2248"><text:s text:c="2"/>margin-top: 3rem;</text:p>
            <text:p text:style-name="P2249"><text:s text:c="2"/>padding: 2.75rem 1.5rem 3rem;</text:p>
            <text:p text:style-name="P2250"><text:s text:c="2"/>border-top: none;</text:p>
            <text:p text:style-name="P2251"><text:s text:c="2"/>background: #e4e1dc;</text:p>
            <text:p text:style-name="P2252"><text:s text:c="2"/>color: #151515;</text:p>
            <text:p text:style-name="P2253"><text:s text:c="2"/>width: 100vw;</text:p>
            <text:p text:style-name="P2254"><text:s text:c="2"/>margin-left: calc(50% - 50vw);</text:p>
            <text:p text:style-name="P2255"><text:s text:c="2"/>box-shadow: inset 0 1px 0 rgba(255, 255, 255, 0.35);</text:p>
            <text:p text:style-name="P2256">}</text:p>
            <text:p text:style-name="P2257"/>
            <text:p text:style-name="P2258">.connect-block__layout {</text:p>
            <text:p text:style-name="P2259"><text:s text:c="2"/>max-width: $max-width;</text:p>
            <text:p text:style-name="P2260"><text:s text:c="2"/>margin: 0 auto;</text:p>
            <text:p text:style-name="P2261"><text:s text:c="2"/>display: grid;</text:p>
            <text:p text:style-name="P2262"><text:s text:c="2"/>grid-template-columns: minmax(0, 0.42fr) minmax(0, 1fr);</text:p>
            <text:p text:style-name="P2263"><text:s text:c="2"/>gap: 2rem 2.5rem;</text:p>
            <text:p text:style-name="P2264"><text:s text:c="2"/>align-items: center;</text:p>
            <text:p text:style-name="P2265">}</text:p>
            <text:p text:style-name="P2266"/>
            <text:p text:style-name="P2267">@media (max-width: 820px) {</text:p>
            <text:p text:style-name="P2268"><text:s text:c="2"/>.connect-block__layout {</text:p>
            <text:p text:style-name="P2269"><text:s text:c="4"/>grid-template-columns: 1fr;</text:p>
            <text:p text:style-name="P2270"><text:s text:c="2"/>}</text:p>
            <text:p text:style-name="P2271">}</text:p>
            <text:p text:style-name="P2272"/>
            <text:p text:style-name="P2273">.connect-block__photo {</text:p>
            <text:p text:style-name="P2274"><text:s text:c="2"/>margin: 0;</text:p>
            <text:p text:style-name="P2275">}</text:p>
            <text:p text:style-name="P2276"/>
            <text:p text:style-name="P2277">.connect-block__photo img {</text:p>
            <text:p text:style-name="P2278"><text:s text:c="2"/>width: 100%;</text:p>
            <text:p text:style-name="P2279"><text:s text:c="2"/>max-height: 420px;</text:p>
            <text:p text:style-name="P2280"><text:s text:c="2"/>object-fit: cover;</text:p>
            <text:p text:style-name="P2281">}</text:p>
            <text:p text:style-name="P2282"/>
            <text:p text:style-name="P2283">.connect-block__col {</text:p>
            <text:p text:style-name="P2284"><text:s text:c="2"/>display: flex;</text:p>
            <text:p text:style-name="P2285"><text:s text:c="2"/>flex-direction: column;</text:p>
            <text:p text:style-name="P2286"><text:s text:c="2"/>gap: 1.35rem;</text:p>
            <text:p text:style-name="P2287">}</text:p>
            <text:p text:style-name="P2288"/>
            <text:p text:style-name="P2289">.connect-block--dark .connect-block__text {</text:p>
            <text:p text:style-name="P2290"><text:s text:c="2"/>margin: 0;</text:p>
            <text:p text:style-name="P2291"><text:s text:c="2"/>max-width: none;</text:p>
            <text:p text:style-name="P2292"><text:s text:c="2"/>text-align: left;</text:p>
            <text:p text:style-name="P2293"><text:s text:c="2"/>font-size: 1.08rem;</text:p>
            <text:p text:style-name="P2294"><text:s text:c="2"/>line-height: 1.65;</text:p>
            <text:p text:style-name="P2295"><text:s text:c="2"/>font-family: $font-serif;</text:p>
            <text:p text:style-name="P2296">}</text:p>
            <text:p text:style-name="P2297"/>
            <text:p text:style-name="P2298">.pill-btn {</text:p>
            <text:p text:style-name="P2299"><text:s text:c="2"/>display:<text:s/>inline-flex;</text:p>
            <text:p text:style-name="P2300"><text:s text:c="2"/>align-items: center;</text:p>
            <text:p text:style-name="P2301"><text:s text:c="2"/>justify-content: center;</text:p>
            <text:p text:style-name="P2302"><text:s text:c="2"/>padding: 0.55rem 1.35rem;</text:p>
            <text:p text:style-name="P2303"><text:s text:c="2"/>border-radius: 999px;</text:p>
            <text:p text:style-name="P2304"><text:s text:c="2"/>border: 1px solid rgba(21, 21, 21, 0.55);</text:p>
            <text:p text:style-name="P2305"><text:s text:c="2"/>background: transparent;</text:p>
            <text:p text:style-name="P2306"><text:s text:c="2"/>font-family: $font-sans;</text:p>
            <text:p text:style-name="P2307"><text:s text:c="2"/>font-size: 0.65rem;</text:p>
            <text:p text:style-name="P2308"><text:s text:c="2"/>font-weight: 600;</text:p>
            <text:p text:style-name="P2309"><text:s/><text:s/>letter-spacing: 0.16em;</text:p>
            <text:p text:style-name="P2310"><text:s text:c="2"/>text-transform: uppercase;</text:p>
            <text:p text:style-name="P2311"><text:s text:c="2"/>color: inherit;</text:p>
            <text:p text:style-name="P2312"><text:s text:c="2"/>transition: background 0.2s ease, color 0.2s ease, border-color 0.2s ease;</text:p>
            <text:p text:style-name="P2313">}</text:p>
            <text:p text:style-name="P2314"/>
            <text:p text:style-name="P2315">.pill-btn:hover {</text:p>
            <text:p text:style-name="P2316"><text:s text:c="2"/>background: #151515;</text:p>
            <text:p text:style-name="P2317"><text:s text:c="2"/>color: #fff;</text:p>
            <text:p text:style-name="P2318"><text:s text:c="2"/>border-color: #151515;</text:p>
            <text:p text:style-name="P2319">}</text:p>
            <text:p text:style-name="P2320"/>
            <text:p text:style-name="P2321">.connect-block--plain {</text:p>
            <text:p text:style-name="P2322"><text:s text:c="2"/>margin-top: 2.5rem;</text:p>
            <text:p text:style-name="P2323"><text:s text:c="2"/>padding-top: 2rem;</text:p>
            <text:p text:style-name="P2324"><text:s text:c="2"/>border-top: 1px solid $color-line;</text:p>
            <text:p text:style-name="P2325"><text:s text:c="2"/>background: transparent;</text:p>
            <text:p text:style-name="P2326"><text:s text:c="2"/>width: auto;</text:p>
            <text:p text:style-name="P2327"><text:s text:c="2"/>margin-left: 0;</text:p>
            <text:p text:style-name="P2328"><text:s text:c="2"/>box-shadow: none;</text:p>
            <text:p text:style-name="P2329">}</text:p>
            <text:p text:style-name="P2330"/>
            <text:p text:style-name="P2331">.connect-block--plain .pill-btn {</text:p>
            <text:p text:style-name="P2332"><text:s text:c="2"/>border-color: rgba(26, 26, 26, 0.35);</text:p>
            <text:p text:style-name="P2333">}</text:p>
            <text:p text:style-name="P2334"/>
            <text:p text:style-name="P2335">.connect-block--plain .pill-btn:hover {</text:p>
            <text:p text:style-name="P2336"><text:s text:c="2"/>background: #151515;</text:p>
            <text:p text:style-name="P2337"><text:s text:c="2"/>color: #fff;</text:p>
            <text:p text:style-name="P2338"><text:s text:c="2"/>border-color: #151515;</text:p>
            <text:p text:style-name="P2339">}</text:p>
            <text:p text:style-name="P2340"/>
            <text:p text:style-name="P2341">.connect-block__text {</text:p>
            <text:p text:style-name="P2342"><text:s text:c="2"/>max-width: 40rem;</text:p>
            <text:p text:style-name="P2343"><text:s text:c="2"/>margin: 0 auto 1.75rem;</text:p>
            <text:p text:style-name="P2344"><text:s text:c="2"/>text-align: center;</text:p>
            <text:p text:style-name="P2345"><text:s text:c="2"/>font-size: 1.05rem;</text:p>
            <text:p text:style-name="P2346">}</text:p>
            <text:p text:style-name="P2347"/>
            <text:p text:style-name="P2348">.connect-actions {</text:p>
            <text:p text:style-name="P2349"><text:s text:c="2"/>display: grid;</text:p>
            <text:p text:style-name="P2350"><text:s text:c="2"/>grid-template-columns: repeat(3, minmax(0, 1fr));</text:p>
            <text:p text:style-name="P2351"><text:s text:c="2"/>gap: 1rem;</text:p>
            <text:p text:style-name="P2352">}</text:p>
            <text:p text:style-name="P2353"/>
            <text:p text:style-name="P2354">.connect-actions--row {</text:p>
            <text:p text:style-name="P2355"><text:s text:c="2"/>max-width: 900px;</text:p>
            <text:p text:style-name="P2356"><text:s text:c="2"/>margin: 0 auto;</text:p>
            <text:p text:style-name="P2357">}</text:p>
            <text:p text:style-name="P2358"/>
            <text:p text:style-name="P2359">.connect-actions.connect-actions--pills {</text:p>
            <text:p text:style-name="P2360"><text:s text:c="2"/>display: flex;</text:p>
            <text:p text:style-name="P2361"><text:s text:c="2"/>flex-wrap: wrap;</text:p>
            <text:p text:style-name="P2362"><text:s text:c="2"/>gap: 0.65rem 0.85rem;</text:p>
            <text:p text:style-name="P2363"><text:s text:c="2"/>justify-content: flex-start;</text:p>
            <text:p text:style-name="P2364"><text:s text:c="2"/>grid-template-columns: unset;</text:p>
            <text:p text:style-name="P2365">}</text:p>
            <text:p text:style-name="P2366"/>
            <text:p text:style-name="P2367">.connect-actions.connect-actions--pills.connect-actions--row {</text:p>
            <text:p text:style-name="P2368"><text:s text:c="2"/>justify-content: center;</text:p>
            <text:p text:style-name="P2369">}</text:p>
            <text:p text:style-name="P2370"/>
            <text:p text:style-name="P2371">@media (max-width: 720px) {</text:p>
            <text:p text:style-name="P2372"><text:s text:c="2"/>.connect-actions:not(.connect-actions--pills) {</text:p>
            <text:p text:style-name="P2373"><text:s text:c="4"/>grid-template-columns: 1fr;</text:p>
            <text:p text:style-name="P2374"><text:s text:c="2"/>}</text:p>
            <text:p text:style-name="P2375">}</text:p>
            <text:p text:style-name="P2376"/>
            <text:p text:style-name="P2377">.site-footer {</text:p>
            <text:p text:style-name="P2378"><text:s text:c="2"/>border-top: 1px solid $color-line;</text:p>
            <text:p text:style-name="P2379"><text:s text:c="2"/>padding: 1.05rem 1rem 1.35rem;</text:p>
            <text:p text:style-name="P2380"><text:s text:c="2"/>margin-top: 1.5rem;</text:p>
            <text:p text:style-name="P2381">}</text:p>
            <text:p text:style-name="P2382"/>
            <text:p text:style-name="P2383">.site-footer__inner {</text:p>
            <text:p text:style-name="P2384"><text:s text:c="2"/>max-width: $max-width;</text:p>
            <text:p text:style-name="P2385"><text:s text:c="2"/>margin: 0 auto;</text:p>
            <text:p text:style-name="P2386"><text:s text:c="2"/>display: flex;</text:p>
            <text:p text:style-name="P2387"><text:s text:c="2"/>flex-wrap: wrap;</text:p>
            <text:p text:style-name="P2388"><text:s text:c="2"/>align-items: center;</text:p>
            <text:p text:style-name="P2389"><text:s text:c="2"/>justify-content: space-between;</text:p>
            <text:p text:style-name="P2390"><text:s text:c="2"/>gap: 0.65rem;</text:p>
            <text:p text:style-name="P2391">}</text:p>
            <text:p text:style-name="P2392"/>
            <text:p text:style-name="P2393">.site-footer__copy {</text:p>
            <text:p text:style-name="P2394"><text:s text:c="2"/>margin: 0;</text:p>
            <text:p text:style-name="P2395"><text:s text:c="2"/>font-size: 0.66rem;</text:p>
            <text:p text:style-name="P2396"><text:s text:c="2"/>color: $color-muted;</text:p>
            <text:p text:style-name="P2397"><text:s text:c="2"/>font-family: $font-sans;</text:p>
            <text:p text:style-name="P2398"><text:s text:c="2"/>letter-spacing: 0.02em;</text:p>
            <text:p text:style-name="P2399">}</text:p>
            <text:p text:style-name="P2400"/>
            <text:p text:style-name="P2401">.site-footer__social {</text:p>
            <text:p text:style-name="P2402"><text:s text:c="2"/>list-style: none;</text:p>
            <text:p text:style-name="P2403"><text:s text:c="2"/>margin: 0;</text:p>
            <text:p text:style-name="P2404"><text:s text:c="2"/>padding: 0;</text:p>
            <text:p text:style-name="P2405"><text:s text:c="2"/>display: flex;</text:p>
            <text:p text:style-name="P2406"><text:s text:c="2"/>gap: 0.55rem;</text:p>
            <text:p text:style-name="P2407"><text:s text:c="2"/>align-items: center;</text:p>
            <text:p text:style-name="P2408">}</text:p>
            <text:p text:style-name="P2409"/>
            <text:p text:style-name="P2410">.icon-link {</text:p>
            <text:p text:style-name="P2411"><text:s text:c="2"/>display: inline-flex;</text:p>
            <text:p text:style-name="P2412"><text:s text:c="2"/>width: 1.65rem;</text:p>
            <text:p text:style-name="P2413"><text:s text:c="2"/>height: 1.65rem;</text:p>
            <text:p text:style-name="P2414"><text:s text:c="2"/>align-items: center;</text:p>
            <text:p text:style-name="P2415"><text:s text:c="2"/>justify-content: center;</text:p>
            <text:p text:style-name="P2416"><text:s text:c="2"/>border-radius: 50%;</text:p>
            <text:p text:style-name="P2417"><text:s text:c="2"/>background: #111;</text:p>
            <text:p text:style-name="P2418"><text:s text:c="2"/>transition: transform 0.15s ease, opacity 0.15s ease;</text:p>
            <text:p text:style-name="P2419">}</text:p>
            <text:p text:style-name="P2420"/>
            <text:p text:style-name="P2421">.icon-link img {</text:p>
            <text:p text:style-name="P2422"><text:s text:c="2"/>width: 15px;</text:p>
            <text:p text:style-name="P2423"><text:s text:c="2"/>height: 15px;</text:p>
            <text:p text:style-name="P2424"><text:s text:c="2"/>object-fit: contain;</text:p>
            <text:p text:style-name="P2425">}</text:p>
            <text:p text:style-name="P2426"/>
            <text:p text:style-name="P2427">.icon-link:hover {</text:p>
            <text:p text:style-name="P2428"><text:s text:c="2"/>transform:<text:s/>translateY(-2px);</text:p>
            <text:p text:style-name="P2429"><text:s text:c="2"/>opacity: 0.9;</text:p>
            <text:p text:style-name="P2430">}</text:p>
            <text:p text:style-name="P2431"/>
            <text:p text:style-name="P2432">.fab {</text:p>
            <text:p text:style-name="P2433"><text:s text:c="2"/>position: fixed;</text:p>
            <text:p text:style-name="P2434"><text:s text:c="2"/>right: 1rem;</text:p>
            <text:p text:style-name="P2435"><text:s text:c="2"/>bottom: 1rem;</text:p>
            <text:p text:style-name="P2436"><text:s text:c="2"/>z-index: 50;</text:p>
            <text:p text:style-name="P2437"><text:s text:c="2"/>display: flex;</text:p>
            <text:p text:style-name="P2438"><text:s text:c="2"/>flex-direction: column;</text:p>
            <text:p text:style-name="P2439"><text:s text:c="2"/>gap: 0.5rem;</text:p>
            <text:p text:style-name="P2440"><text:s text:c="2"/>align-items: flex-end;</text:p>
            <text:p text:style-name="P2441">}</text:p>
            <text:p text:style-name="P2442"/>
            <text:p text:style-name="P2443">.fab__btn {</text:p>
            <text:p text:style-name="P2444"><text:s text:c="2"/>width: 2.75rem;</text:p>
            <text:p text:style-name="P2445"><text:s text:c="2"/>height: 2.75rem;</text:p>
            <text:p text:style-name="P2446"><text:s text:c="2"/>border-radius: 50%;</text:p>
            <text:p text:style-name="P2447"><text:s text:c="2"/>border: 1px solid $color-line;</text:p>
            <text:p text:style-name="P2448"><text:s text:c="2"/>background: #fff;</text:p>
            <text:p text:style-name="P2449"><text:s text:c="2"/>color: #111;</text:p>
            <text:p text:style-name="P2450"><text:s text:c="2"/>box-shadow: 0 6px 18px rgba(0, 0, 0, 0.12);</text:p>
            <text:p text:style-name="P2451"><text:s text:c="2"/>display: inline-flex;</text:p>
            <text:p text:style-name="P2452"><text:s text:c="2"/>align-items: center;</text:p>
            <text:p text:style-name="P2453"><text:s text:c="2"/>justify-content: center;</text:p>
            <text:p text:style-name="P2454">}</text:p>
            <text:p text:style-name="P2455"/>
            <text:p text:style-name="P2456">.toast {</text:p>
            <text:p text:style-name="P2457"><text:s text:c="2"/>position: fixed;</text:p>
            <text:p text:style-name="P2458"><text:s text:c="2"/>left: 50%;</text:p>
            <text:p text:style-name="P2459"><text:s text:c="2"/>bottom: 5.5rem;</text:p>
            <text:p text:style-name="P2460"><text:s text:c="2"/>transform: translateX(-50%);</text:p>
            <text:p text:style-name="P2461"><text:s text:c="2"/>background: #111;</text:p>
            <text:p text:style-name="P2462"><text:s text:c="2"/>color: #fff;</text:p>
            <text:p text:style-name="P2463"><text:s text:c="2"/>padding: 0.55rem 1rem;</text:p>
            <text:p text:style-name="P2464"><text:s text:c="2"/>border-radius: 999px;</text:p>
            <text:p text:style-name="P2465"><text:s text:c="2"/>font-size: 0.85rem;</text:p>
            <text:p text:style-name="P2466"><text:s text:c="2"/>z-index: 60;</text:p>
            <text:p text:style-name="P2467"><text:s text:c="2"/>box-shadow: 0 6px 20px rgba(0, 0, 0, 0.2);</text:p>
            <text:p text:style-name="P2468">}</text:p>
            <text:p text:style-name="P2469"/>
            <text:p text:style-name="P2470">.page-head {</text:p>
            <text:p text:style-name="P2471"><text:s text:c="2"/>text-align: center;</text:p>
            <text:p text:style-name="P2472"><text:s text:c="2"/>margin-bottom: 2rem;</text:p>
            <text:p text:style-name="P2473">}</text:p>
            <text:p text:style-name="P2474"/>
            <text:p text:style-name="P2475">.page-head__title {</text:p>
            <text:p text:style-name="P2476"><text:s text:c="2"/>margin: 0 0 0.35rem;</text:p>
            <text:p text:style-name="P2477"><text:s text:c="2"/>font-family: $font-serif;</text:p>
            <text:p text:style-name="P2478"><text:s text:c="2"/>font-weight: 500;</text:p>
            <text:p text:style-name="P2479"><text:s text:c="2"/>font-size: clamp(1.75rem, 4vw, 2.4rem);</text:p>
            <text:p text:style-name="P2480">}</text:p>
            <text:p text:style-name="P2481"/>
            <text:p text:style-name="P2482">.page-head__lead {</text:p>
            <text:p text:style-name="P2483"><text:s text:c="2"/>margin: 0;</text:p>
            <text:p text:style-name="P2484"><text:s text:c="2"/>color: $color-muted;</text:p>
            <text:p text:style-name="P2485">}</text:p>
            <text:p text:style-name="P2486"/>
            <text:p text:style-name="P2487">.portfolio-grid {</text:p>
            <text:p text:style-name="P2488"><text:s text:c="2"/>display: grid;</text:p>
            <text:p text:style-name="P2489"><text:s text:c="2"/>grid-template-columns: repeat(4, minmax(0, 1fr));</text:p>
            <text:p text:style-name="P2490"><text:s text:c="2"/>gap: 0.75rem;</text:p>
            <text:p text:style-name="P2491">}</text:p>
            <text:p text:style-name="P2492"/>
            <text:p text:style-name="P2493">@media (max-width: 960px) {</text:p>
            <text:p text:style-name="P2494"><text:s text:c="2"/>.portfolio-grid {</text:p>
            <text:p text:style-name="P2495"><text:s text:c="4"/>grid-template-columns: repeat(2, minmax(0, 1fr));</text:p>
            <text:p text:style-name="P2496"><text:s text:c="2"/>}</text:p>
            <text:p text:style-name="P2497">}</text:p>
            <text:p text:style-name="P2498"/>
            <text:p text:style-name="P2499">.portfolio-card {</text:p>
            <text:p text:style-name="P2500"><text:s text:c="2"/>position: relative;</text:p>
            <text:p text:style-name="P2501"><text:s text:c="2"/>border: 1px solid $color-line;</text:p>
            <text:p text:style-name="P2502"><text:s text:c="2"/>overflow: hidden;</text:p>
            <text:p text:style-name="P2503"><text:s text:c="2"/>cursor: pointer;</text:p>
            <text:p text:style-name="P2504"><text:s text:c="2"/>background: #fff;</text:p>
            <text:p text:style-name="P2505"><text:s text:c="2"/>display: block;</text:p>
            <text:p text:style-name="P2506"><text:s text:c="2"/>text-decoration: none;</text:p>
            <text:p text:style-name="P2507"><text:s text:c="2"/>color: inherit;</text:p>
            <text:p text:style-name="P2508">}</text:p>
            <text:p text:style-name="P2509"/>
            <text:p text:style-name="P2510">a.portfolio-card:focus-visible {</text:p>
            <text:p text:style-name="P2511"><text:s text:c="2"/>outline: 2px solid #111;</text:p>
            <text:p text:style-name="P2512"><text:s text:c="2"/>outline-offset: 2px;</text:p>
            <text:p text:style-name="P2513">}</text:p>
            <text:p text:style-name="P2514"/>
            <text:p text:style-name="P2515">.portfolio-card__img {</text:p>
            <text:p text:style-name="P2516"><text:s text:c="2"/>aspect-ratio: 3 / 4;</text:p>
            <text:p text:style-name="P2517"><text:s text:c="2"/>width: 100%;</text:p>
            <text:p text:style-name="P2518"><text:s text:c="2"/>object-fit: cover;</text:p>
            <text:p text:style-name="P2519"><text:s text:c="2"/>display: block;</text:p>
            <text:p text:style-name="P2520"><text:s text:c="2"/>transition: transform 0.4s ease;</text:p>
            <text:p text:style-name="P2521">}</text:p>
            <text:p text:style-name="P2522"/>
            <text:p text:style-name="P2523">.portfolio-card:hover .portfolio-card__img {</text:p>
            <text:p text:style-name="P2524"><text:s text:c="2"/>transform: scale(1.05);</text:p>
            <text:p text:style-name="P2525">}</text:p>
            <text:p text:style-name="P2526"/>
            <text:p text:style-name="P2527">.portfolio-card__overlay {</text:p>
            <text:p text:style-name="P2528"><text:s text:c="2"/>position: absolute;</text:p>
            <text:p text:style-name="P2529"><text:s text:c="2"/>inset: 0;</text:p>
            <text:p text:style-name="P2530"><text:s text:c="2"/>display: flex;</text:p>
            <text:p text:style-name="P2531"><text:s text:c="2"/>align-items:<text:s/>flex-end;</text:p>
            <text:p text:style-name="P2532"><text:s text:c="2"/>padding: 0.75rem;</text:p>
            <text:p text:style-name="P2533"><text:s text:c="2"/>background: linear-gradient(to top, rgba(0, 0, 0, 0.55), transparent 55%);</text:p>
            <text:p text:style-name="P2534"><text:s text:c="2"/>color: #fff;</text:p>
            <text:p text:style-name="P2535"><text:s text:c="2"/>font-size: 0.9rem;</text:p>
            <text:p text:style-name="P2536"><text:s text:c="2"/>letter-spacing: 0.04em;</text:p>
            <text:p text:style-name="P2537"><text:s text:c="2"/>opacity: 0;</text:p>
            <text:p text:style-name="P2538"><text:s text:c="2"/>transition: opacity 0.25s ease;</text:p>
            <text:p text:style-name="P2539">}</text:p>
            <text:p text:style-name="P2540"/>
            <text:p text:style-name="P2541">.portfolio-card:hover .portfolio-card__overlay,</text:p>
            <text:p text:style-name="P2542">.portfolio-card:focus-within .portfolio-card__overlay {</text:p>
            <text:p text:style-name="P2543"><text:s text:c="2"/>opacity: 1;</text:p>
            <text:p text:style-name="P2544">}</text:p>
            <text:p text:style-name="P2545"/>
            <text:p text:style-name="P2546">.lightbox {</text:p>
            <text:p text:style-name="P2547"><text:s text:c="2"/>position: fixed;</text:p>
            <text:p text:style-name="P2548"><text:s text:c="2"/>inset: 0;</text:p>
            <text:p text:style-name="P2549"><text:s text:c="2"/>z-index: 80;</text:p>
            <text:p text:style-name="P2550"><text:s text:c="2"/>background: rgba(0, 0, 0, 0.88);</text:p>
            <text:p text:style-name="P2551"><text:s text:c="2"/>display: grid;</text:p>
            <text:p text:style-name="P2552"><text:s text:c="2"/>place-items: center;</text:p>
            <text:p text:style-name="P2553"><text:s text:c="2"/>padding: 2.5rem 1rem;</text:p>
            <text:p text:style-name="P2554">}</text:p>
            <text:p text:style-name="P2555"/>
            <text:p text:style-name="P2556">.lightbox[hidden] {</text:p>
            <text:p text:style-name="P2557"><text:s text:c="2"/>display: none !important;</text:p>
            <text:p text:style-name="P2558">}</text:p>
            <text:p text:style-name="P2559"/>
            <text:p text:style-name="P2560">.lightbox__figure {</text:p>
            <text:p text:style-name="P2561"><text:s text:c="2"/>margin: 0;</text:p>
            <text:p text:style-name="P2562"><text:s text:c="2"/>max-width: min(1100px, 100%);</text:p>
            <text:p text:style-name="P2563"><text:s text:c="2"/>max-height: 90vh;</text:p>
            <text:p text:style-name="P2564"><text:s text:c="2"/>display: flex;</text:p>
            <text:p text:style-name="P2565"><text:s text:c="2"/>flex-direction: column;</text:p>
            <text:p text:style-name="P2566"><text:s text:c="2"/>align-items: center;</text:p>
            <text:p text:style-name="P2567"><text:s text:c="2"/>gap:<text:s/>0.5rem;</text:p>
            <text:p text:style-name="P2568">}</text:p>
            <text:p text:style-name="P2569"/>
            <text:p text:style-name="P2570">.lightbox__figure img {</text:p>
            <text:p text:style-name="P2571"><text:s text:c="2"/>max-height: 78vh;</text:p>
            <text:p text:style-name="P2572"><text:s text:c="2"/>width: auto;</text:p>
            <text:p text:style-name="P2573"><text:s text:c="2"/>max-width: 100%;</text:p>
            <text:p text:style-name="P2574"><text:s text:c="2"/>object-fit: contain;</text:p>
            <text:p text:style-name="P2575">}</text:p>
            <text:p text:style-name="P2576"/>
            <text:p text:style-name="P2577">.lightbox__cap {</text:p>
            <text:p text:style-name="P2578"><text:s text:c="2"/>color: #eee;</text:p>
            <text:p text:style-name="P2579"><text:s text:c="2"/>font-size: 0.9rem;</text:p>
            <text:p text:style-name="P2580"><text:s text:c="2"/>text-align: center;</text:p>
            <text:p text:style-name="P2581">}</text:p>
            <text:p text:style-name="P2582"/>
            <text:p text:style-name="P2583">.lightbox__close,</text:p>
            <text:p text:style-name="P2584">.lightbox__nav {</text:p>
            <text:p text:style-name="P2585"><text:s text:c="2"/>position:<text:s/>absolute;</text:p>
            <text:p text:style-name="P2586"><text:s text:c="2"/>border: none;</text:p>
            <text:p text:style-name="P2587"><text:s text:c="2"/>background: rgba(255, 255, 255, 0.12);</text:p>
            <text:p text:style-name="P2588"><text:s text:c="2"/>color: #fff;</text:p>
            <text:p text:style-name="P2589"><text:s text:c="2"/>font-size: 2rem;</text:p>
            <text:p text:style-name="P2590"><text:s text:c="2"/>line-height: 1;</text:p>
            <text:p text:style-name="P2591"><text:s text:c="2"/>width: 2.5rem;</text:p>
            <text:p text:style-name="P2592"><text:s text:c="2"/>height: 2.5rem;</text:p>
            <text:p text:style-name="P2593"><text:s text:c="2"/>border-radius: 50%;</text:p>
            <text:p text:style-name="P2594">}</text:p>
            <text:p text:style-name="P2595"/>
            <text:p text:style-name="P2596">.lightbox__close {</text:p>
            <text:p text:style-name="P2597"><text:s text:c="2"/>top: 1rem;</text:p>
            <text:p text:style-name="P2598"><text:s text:c="2"/>right: 1rem;</text:p>
            <text:p text:style-name="P2599">}</text:p>
            <text:p text:style-name="P2600"/>
            <text:p text:style-name="P2601">.lightbox__nav {</text:p>
            <text:p text:style-name="P2602"><text:s text:c="2"/>top: 50%;</text:p>
            <text:p text:style-name="P2603"><text:s text:c="2"/>transform: translateY(-50%);</text:p>
            <text:p text:style-name="P2604">}</text:p>
            <text:p text:style-name="P2605"/>
            <text:p text:style-name="P2606">.lightbox__nav--prev {</text:p>
            <text:p text:style-name="P2607"><text:s text:c="2"/>left: 0.75rem;</text:p>
            <text:p text:style-name="P2608">}</text:p>
            <text:p text:style-name="P2609"/>
            <text:p text:style-name="P2610">.lightbox__nav--next {</text:p>
            <text:p text:style-name="P2611"><text:s text:c="2"/>right: 0.75rem;</text:p>
            <text:p text:style-name="P2612">}</text:p>
            <text:p text:style-name="P2613"/>
            <text:p text:style-name="P2614">.contact-hero__grid {</text:p>
            <text:p text:style-name="P2615"><text:s text:c="2"/>display: grid;</text:p>
            <text:p text:style-name="P2616"><text:s text:c="2"/>grid-template-columns: minmax(0, 1.05fr) minmax(0, 1.1fr);</text:p>
            <text:p text:style-name="P2617"><text:s text:c="2"/>gap:<text:s/>2rem;</text:p>
            <text:p text:style-name="P2618"><text:s text:c="2"/>align-items: start;</text:p>
            <text:p text:style-name="P2619">}</text:p>
            <text:p text:style-name="P2620"/>
            <text:p text:style-name="P2621">@media (max-width: 900px) {</text:p>
            <text:p text:style-name="P2622"><text:s text:c="2"/>.contact-hero__grid {</text:p>
            <text:p text:style-name="P2623"><text:s text:c="4"/>grid-template-columns: 1fr;</text:p>
            <text:p text:style-name="P2624"><text:s text:c="2"/>}</text:p>
            <text:p text:style-name="P2625">}</text:p>
            <text:p text:style-name="P2626"/>
            <text:p text:style-name="P2627">.contact-hero__photo img {</text:p>
            <text:p text:style-name="P2628"><text:s text:c="2"/>width: 100%;</text:p>
            <text:p text:style-name="P2629"><text:s text:c="2"/>max-height: 640px;</text:p>
            <text:p text:style-name="P2630"><text:s text:c="2"/>object-fit: cover;</text:p>
            <text:p text:style-name="P2631">}</text:p>
            <text:p text:style-name="P2632"/>
            <text:p text:style-name="P2633">.contact-hero__phone-wrap {</text:p>
            <text:p text:style-name="P2634"><text:s text:c="2"/>margin: 0 0 1.25rem;</text:p>
            <text:p text:style-name="P2635">}</text:p>
            <text:p text:style-name="P2636"/>
            <text:p text:style-name="P2637">.phone-copy {</text:p>
            <text:p text:style-name="P2638"><text:s text:c="2"/>display: inline-block;</text:p>
            <text:p text:style-name="P2639"><text:s text:c="2"/>border: none;</text:p>
            <text:p text:style-name="P2640"><text:s text:c="2"/>background: none;</text:p>
            <text:p text:style-name="P2641"><text:s text:c="2"/>padding: 0;</text:p>
            <text:p text:style-name="P2642"><text:s text:c="2"/>font-size: clamp(1.2rem, 3vw, 1.6rem);</text:p>
            <text:p text:style-name="P2643"><text:s text:c="2"/>font-weight: 600;</text:p>
            <text:p text:style-name="P2644"><text:s text:c="2"/>letter-spacing: 0.04em;</text:p>
            <text:p text:style-name="P2645"><text:s text:c="2"/>border-bottom: 1px dashed currentColor;</text:p>
            <text:p text:style-name="P2646">}</text:p>
            <text:p text:style-name="P2647"/>
            <text:p text:style-name="P2648">.hint {</text:p>
            <text:p text:style-name="P2649"><text:s text:c="2"/>display: block;</text:p>
            <text:p text:style-name="P2650"><text:s text:c="2"/>margin-top: 0.35rem;</text:p>
            <text:p text:style-name="P2651"><text:s text:c="2"/>font-size: 0.85rem;</text:p>
            <text:p text:style-name="P2652"><text:s text:c="2"/>color: $color-muted;</text:p>
            <text:p text:style-name="P2653">}</text:p>
            <text:p text:style-name="P2654"/>
            <text:p text:style-name="P2655">.contact-form {</text:p>
            <text:p text:style-name="P2656"><text:s text:c="2"/>display: flex;</text:p>
            <text:p text:style-name="P2657"><text:s text:c="2"/>flex-direction: column;</text:p>
            <text:p text:style-name="P2658"><text:s text:c="2"/>gap: 0.85rem;</text:p>
            <text:p text:style-name="P2659">}</text:p>
            <text:p text:style-name="P2660"/>
            <text:p text:style-name="P2661">.field {</text:p>
            <text:p text:style-name="P2662"><text:s text:c="2"/>display: flex;</text:p>
            <text:p text:style-name="P2663"><text:s text:c="2"/>flex-direction: column;</text:p>
            <text:p text:style-name="P2664"><text:s text:c="2"/>gap: 0.25rem;</text:p>
            <text:p text:style-name="P2665"><text:s text:c="2"/>font-size: 0.9rem;</text:p>
            <text:p text:style-name="P2666">}</text:p>
            <text:p text:style-name="P2667"/>
            <text:p text:style-name="P2668">.field input,</text:p>
            <text:p text:style-name="P2669">.field textarea {</text:p>
            <text:p text:style-name="P2670"><text:s text:c="2"/>border: 1px solid $color-line;</text:p>
            <text:p text:style-name="P2671"><text:s text:c="2"/>padding: 0.65rem 0.75rem;</text:p>
            <text:p text:style-name="P2672"><text:s text:c="2"/>border-radius: 2px;</text:p>
            <text:p text:style-name="P2673"><text:s text:c="2"/>font: inherit;</text:p>
            <text:p text:style-name="P2674"><text:s text:c="2"/>background: #fff;</text:p>
            <text:p text:style-name="P2675">}</text:p>
            <text:p text:style-name="P2676"/>
            <text:p text:style-name="P2677">.btn {</text:p>
            <text:p text:style-name="P2678"><text:s text:c="2"/>border: 1px solid $color-accent;</text:p>
            <text:p text:style-name="P2679"><text:s text:c="2"/>padding: 0.75rem 1.25rem;</text:p>
            <text:p text:style-name="P2680"><text:s text:c="2"/>border-radius: 2px;</text:p>
            <text:p text:style-name="P2681"><text:s text:c="2"/>text-transform: uppercase;</text:p>
            <text:p text:style-name="P2682"><text:s text:c="2"/>letter-spacing: 0.12em;</text:p>
            <text:p text:style-name="P2683"><text:s text:c="2"/>font-size: 0.78rem;</text:p>
            <text:p text:style-name="P2684">}</text:p>
            <text:p text:style-name="P2685"/>
            <text:p text:style-name="P2686">.btn--primary {</text:p>
            <text:p text:style-name="P2687"><text:s text:c="2"/>background: $color-accent;</text:p>
            <text:p text:style-name="P2688"><text:s text:c="2"/>color: #fff;</text:p>
            <text:p text:style-name="P2689">}</text:p>
            <text:p text:style-name="P2690"/>
            <text:p text:style-name="P2691">.btn--pill {</text:p>
            <text:p text:style-name="P2692"><text:s text:c="2"/>border-radius: 999px;</text:p>
            <text:p text:style-name="P2693"><text:s text:c="2"/>align-self: flex-start;</text:p>
            <text:p text:style-name="P2694"><text:s text:c="2"/>padding: 0.65rem 1.85rem;</text:p>
            <text:p text:style-name="P2695"><text:s text:c="2"/>font-family: $font-sans;</text:p>
            <text:p text:style-name="P2696"><text:s text:c="2"/>font-size: 0.68rem;</text:p>
            <text:p text:style-name="P2697"><text:s text:c="2"/>font-weight: 600;</text:p>
            <text:p text:style-name="P2698">}</text:p>
            <text:p text:style-name="P2699"/>
            <text:p text:style-name="P2700">.contact-form--lines {</text:p>
            <text:p text:style-name="P2701"><text:s text:c="2"/>gap: 1.35rem;</text:p>
            <text:p text:style-name="P2702">}</text:p>
            <text:p text:style-name="P2703"/>
            <text:p text:style-name="P2704">.field-line {</text:p>
            <text:p text:style-name="P2705"><text:s text:c="2"/>display: flex;</text:p>
            <text:p text:style-name="P2706"><text:s text:c="2"/>flex-direction: column;</text:p>
            <text:p text:style-name="P2707"><text:s text:c="2"/>gap: 0.35rem;</text:p>
            <text:p text:style-name="P2708">}</text:p>
            <text:p text:style-name="P2709"/>
            <text:p text:style-name="P2710">.field-line__label {</text:p>
            <text:p text:style-name="P2711"><text:s text:c="2"/>font-family: $font-sans;</text:p>
            <text:p text:style-name="P2712"><text:s text:c="2"/>font-size: 0.6rem;</text:p>
            <text:p text:style-name="P2713"><text:s text:c="2"/>letter-spacing: 0.16em;</text:p>
            <text:p text:style-name="P2714"><text:s text:c="2"/>text-transform: uppercase;</text:p>
            <text:p text:style-name="P2715"><text:s text:c="2"/>color: $color-muted;</text:p>
            <text:p text:style-name="P2716"><text:s text:c="2"/>font-weight: 500;</text:p>
            <text:p text:style-name="P2717">}</text:p>
            <text:p text:style-name="P2718"/>
            <text:p text:style-name="P2719">.field-line__input {</text:p>
            <text:p text:style-name="P2720"><text:s text:c="2"/>width: 100%;</text:p>
            <text:p text:style-name="P2721"><text:s text:c="2"/>border: none;</text:p>
            <text:p text:style-name="P2722"><text:s text:c="2"/>border-bottom: 1px solid<text:s/>rgba(26, 26, 26, 0.42);</text:p>
            <text:p text:style-name="P2723"><text:s text:c="2"/>padding: 0.4rem 0 0.55rem;</text:p>
            <text:p text:style-name="P2724"><text:s text:c="2"/>font-family: $font-sans;</text:p>
            <text:p text:style-name="P2725"><text:s text:c="2"/>font-size: 0.92rem;</text:p>
            <text:p text:style-name="P2726"><text:s text:c="2"/>background: transparent;</text:p>
            <text:p text:style-name="P2727"><text:s text:c="2"/>border-radius: 0;</text:p>
            <text:p text:style-name="P2728"><text:s text:c="2"/>resize: vertical;</text:p>
            <text:p text:style-name="P2729">}</text:p>
            <text:p text:style-name="P2730"/>
            <text:p text:style-name="P2731">.field-line__input:focus {</text:p>
            <text:p text:style-name="P2732"><text:s text:c="2"/>outline: none;</text:p>
            <text:p text:style-name="P2733"><text:s text:c="2"/>border-bottom-color: #000;</text:p>
            <text:p text:style-name="P2734">}</text:p>
            <text:p text:style-name="P2735"/>
            <text:p text:style-name="P2736">.field-line__input--area {</text:p>
            <text:p text:style-name="P2737"><text:s text:c="2"/>min-height: 5rem;</text:p>
            <text:p text:style-name="P2738">}</text:p>
            <text:p text:style-name="P2739"/>
            <text:p text:style-name="P2740">.faq-layout {</text:p>
            <text:p text:style-name="P2741"><text:s text:c="2"/>display: grid;</text:p>
            <text:p text:style-name="P2742"><text:s text:c="2"/>grid-template-columns: minmax(0, 0.95fr) minmax(0, 1.2fr);</text:p>
            <text:p text:style-name="P2743"><text:s text:c="2"/>gap: 2rem;</text:p>
            <text:p text:style-name="P2744"><text:s text:c="2"/>align-items: start;</text:p>
            <text:p text:style-name="P2745">}</text:p>
            <text:p text:style-name="P2746"/>
            <text:p text:style-name="P2747">@media (max-width: 900px) {</text:p>
            <text:p text:style-name="P2748"><text:s text:c="2"/>.faq-layout {</text:p>
            <text:p text:style-name="P2749"><text:s text:c="4"/>grid-template-columns: 1fr;</text:p>
            <text:p text:style-name="P2750"><text:s text:c="2"/>}</text:p>
            <text:p text:style-name="P2751">}</text:p>
            <text:p text:style-name="P2752"/>
            <text:p text:style-name="P2753">.faq-layout__photo img {</text:p>
            <text:p text:style-name="P2754"><text:s text:c="2"/>width: 100%;</text:p>
            <text:p text:style-name="P2755"><text:s text:c="2"/>max-height: 560px;</text:p>
            <text:p text:style-name="P2756"><text:s text:c="2"/>object-fit: cover;</text:p>
            <text:p text:style-name="P2757">}</text:p>
            <text:p text:style-name="P2758"/>
            <text:p text:style-name="P2759">.accordion {</text:p>
            <text:p text:style-name="P2760"><text:s text:c="2"/>border-top: 1px solid $color-line;</text:p>
            <text:p text:style-name="P2761">}</text:p>
            <text:p text:style-name="P2762"/>
            <text:p text:style-name="P2763">.accordion__item {</text:p>
            <text:p text:style-name="P2764"><text:s text:c="2"/>border-bottom: 1px solid $color-line;</text:p>
            <text:p text:style-name="P2765">}</text:p>
            <text:p text:style-name="P2766"/>
            <text:p text:style-name="P2767">.accordion__btn {</text:p>
            <text:p text:style-name="P2768"><text:s text:c="2"/>width: 100%;</text:p>
            <text:p text:style-name="P2769"><text:s text:c="2"/>text-align: left;</text:p>
            <text:p text:style-name="P2770"><text:s text:c="2"/>padding: 0.85rem 2rem 0.85rem 0;</text:p>
            <text:p text:style-name="P2771"><text:s text:c="2"/>border: none;</text:p>
            <text:p text:style-name="P2772"><text:s text:c="2"/>background: none;</text:p>
            <text:p text:style-name="P2773"><text:s text:c="2"/>font-family: $font-serif;</text:p>
            <text:p text:style-name="P2774"><text:s text:c="2"/>font-size: clamp(1rem, 2.4vw, 1.15rem);</text:p>
            <text:p text:style-name="P2775"><text:s text:c="2"/>font-weight: 600;</text:p>
            <text:p text:style-name="P2776"><text:s text:c="2"/>line-height: 1.5;</text:p>
            <text:p text:style-name="P2777"><text:s text:c="2"/>color: $color-text;</text:p>
            <text:p text:style-name="P2778"><text:s text:c="2"/>position: relative;</text:p>
            <text:p text:style-name="P2779">}</text:p>
            <text:p text:style-name="P2780"/>
            <text:p text:style-name="P2781">.accordion__btn::after {</text:p>
            <text:p text:style-name="P2782"><text:s text:c="2"/>content: "+";</text:p>
            <text:p text:style-name="P2783"><text:s text:c="2"/>position: absolute;</text:p>
            <text:p text:style-name="P2784"><text:s text:c="2"/>right: 0.25rem;</text:p>
            <text:p text:style-name="P2785"><text:s text:c="2"/>top: 50%;</text:p>
            <text:p text:style-name="P2786"><text:s text:c="2"/>transform: translateY(-50%);</text:p>
            <text:p text:style-name="P2787"><text:s text:c="2"/>font-family: $font-serif;</text:p>
            <text:p text:style-name="P2788"><text:s text:c="2"/>font-size: 1.15rem;</text:p>
            <text:p text:style-name="P2789"><text:s text:c="2"/>font-weight: 500;</text:p>
            <text:p text:style-name="P2790"><text:s text:c="2"/>color: $color-text;</text:p>
            <text:p text:style-name="P2791"><text:s text:c="2"/>transition: transform 0.25s ease;</text:p>
            <text:p text:style-name="P2792">}</text:p>
            <text:p text:style-name="P2793"/>
            <text:p text:style-name="P2794">.accordion__item.is-open .accordion__btn::after {</text:p>
            <text:p text:style-name="P2795"><text:s text:c="2"/>content: "–";</text:p>
            <text:p text:style-name="P2796">}</text:p>
            <text:p text:style-name="P2797"/>
            <text:p text:style-name="P2798">.accordion__panel {</text:p>
            <text:p text:style-name="P2799"><text:s text:c="2"/>display: grid;</text:p>
            <text:p text:style-name="P2800"><text:s text:c="2"/>grid-template-rows: 0fr;</text:p>
            <text:p text:style-name="P2801"><text:s text:c="2"/>overflow: hidden;</text:p>
            <text:p text:style-name="P2802"><text:s text:c="2"/>transition: grid-template-rows 0.55s cubic-bezier(0.4, 0, 0.2, 1);</text:p>
            <text:p text:style-name="P2803">}</text:p>
            <text:p text:style-name="P2804"/>
            <text:p text:style-name="P2805">.accordion__item.is-open .accordion__panel {</text:p>
            <text:p text:style-name="P2806"><text:s text:c="2"/>grid-template-rows: 1fr;</text:p>
            <text:p text:style-name="P2807">}</text:p>
            <text:p text:style-name="P2808"/>
            <text:p text:style-name="P2809">.accordion__panel-inner {</text:p>
            <text:p text:style-name="P2810"><text:s text:c="2"/>min-height: 0;</text:p>
            <text:p text:style-name="P2811"><text:s text:c="2"/>overflow: hidden;</text:p>
            <text:p text:style-name="P2812">}</text:p>
            <text:p text:style-name="P2813"/>
            <text:p text:style-name="P2814">.accordion__body {</text:p>
            <text:p text:style-name="P2815"><text:s text:c="2"/>padding: 0 0 1rem;</text:p>
            <text:p text:style-name="P2816"><text:s text:c="2"/>color: $color-muted;</text:p>
            <text:p text:style-name="P2817"><text:s text:c="2"/>white-space: pre-line;</text:p>
            <text:p text:style-name="P2818"><text:s text:c="2"/>font-family:<text:s/>$font-serif;</text:p>
            <text:p text:style-name="P2819"><text:s text:c="2"/>font-size: clamp(1rem, 2.4vw, 1.15rem);</text:p>
            <text:p text:style-name="P2820"><text:s text:c="2"/>font-weight: 400;</text:p>
            <text:p text:style-name="P2821"><text:s text:c="2"/>line-height: 1.5;</text:p>
            <text:p text:style-name="P2822">}</text:p>
            <text:p text:style-name="P2823"/>
            <text:p text:style-name="P2824">.connect-block--row {</text:p>
            <text:p text:style-name="P2825"><text:s text:c="2"/>margin-top: 2.5rem;</text:p>
            <text:p text:style-name="P2826"><text:s text:c="2"/>padding-top: 2rem;</text:p>
            <text:p text:style-name="P2827">}</text:p>
            <text:p text:style-name="P2828"/>
            <text:p text:style-name="P2829">.site-main--gallery {</text:p>
            <text:p text:style-name="P2830"><text:s text:c="2"/>max-width: 1180px;</text:p>
            <text:p text:style-name="P2831"><text:s text:c="2"/>padding-top: 1.25rem;</text:p>
            <text:p text:style-name="P2832">}</text:p>
            <text:p text:style-name="P2833"/>
            <text:p text:style-name="P2834">.gallery-back {</text:p>
            <text:p text:style-name="P2835"><text:s text:c="2"/>margin: 0 0 0.75rem;</text:p>
            <text:p text:style-name="P2836"><text:s text:c="2"/>font-size: 0.65rem;</text:p>
            <text:p text:style-name="P2837"><text:s text:c="2"/>letter-spacing: 0.12em;</text:p>
            <text:p text:style-name="P2838"><text:s text:c="2"/>text-transform: uppercase;</text:p>
            <text:p text:style-name="P2839"><text:s text:c="2"/>font-family: $font-sans;</text:p>
            <text:p text:style-name="P2840"><text:s text:c="2"/>font-weight: 500;</text:p>
            <text:p text:style-name="P2841">}</text:p>
            <text:p text:style-name="P2842"/>
            <text:p text:style-name="P2843">.gallery-back a {</text:p>
            <text:p text:style-name="P2844"><text:s text:c="2"/>text-decoration: underline;</text:p>
            <text:p text:style-name="P2845"><text:s text:c="2"/>text-underline-offset: 3px;</text:p>
            <text:p text:style-name="P2846">}</text:p>
            <text:p text:style-name="P2847"/>
            <text:p text:style-name="P2848">.gallery-head {</text:p>
            <text:p text:style-name="P2849"><text:s text:c="2"/>text-align: center;</text:p>
            <text:p text:style-name="P2850"><text:s text:c="2"/>margin-bottom: 1.75rem;</text:p>
            <text:p text:style-name="P2851">}</text:p>
            <text:p text:style-name="P2852"/>
            <text:p text:style-name="P2853">.gallery-head__title {</text:p>
            <text:p text:style-name="P2854"><text:s text:c="2"/>margin: 0 0 0.35rem;</text:p>
            <text:p text:style-name="P2855"><text:s text:c="2"/>font-family: $font-serif;</text:p>
            <text:p text:style-name="P2856"><text:s text:c="2"/>font-weight: 500;</text:p>
            <text:p text:style-name="P2857"><text:s text:c="2"/>font-size: clamp(2rem, 5vw, 3.25rem);</text:p>
            <text:p text:style-name="P2858"><text:s text:c="2"/>line-height: 1.15;</text:p>
            <text:p text:style-name="P2859">}</text:p>
            <text:p text:style-name="P2860"/>
            <text:p text:style-name="P2861">.gallery-head__sub {</text:p>
            <text:p text:style-name="P2862"><text:s text:c="2"/>margin: 0;</text:p>
            <text:p text:style-name="P2863"><text:s text:c="2"/>font-family: $font-sans;</text:p>
            <text:p text:style-name="P2864"><text:s text:c="2"/>font-size: 0.65rem;</text:p>
            <text:p text:style-name="P2865"><text:s text:c="2"/>letter-spacing: 0.2em;</text:p>
            <text:p text:style-name="P2866"><text:s text:c="2"/>text-transform: uppercase;</text:p>
            <text:p text:style-name="P2867"><text:s text:c="2"/>color: $color-muted;</text:p>
            <text:p text:style-name="P2868">}</text:p>
            <text:p text:style-name="P2869"/>
            <text:p text:style-name="P2870">.gallery-empty {</text:p>
            <text:p text:style-name="P2871"><text:s text:c="2"/>text-align: center;</text:p>
            <text:p text:style-name="P2872"><text:s text:c="2"/>color: $color-muted;</text:p>
            <text:p text:style-name="P2873"><text:s text:c="2"/>font-family: $font-sans;</text:p>
            <text:p text:style-name="P2874"><text:s text:c="2"/>font-size: 0.95rem;</text:p>
            <text:p text:style-name="P2875">}</text:p>
            <text:p text:style-name="P2876"/>
            <text:p text:style-name="P2877">.gallery-masonry {</text:p>
            <text:p text:style-name="P2878"><text:s text:c="2"/>column-count: 3;</text:p>
            <text:p text:style-name="P2879"><text:s text:c="2"/>column-gap: 0.5rem;</text:p>
            <text:p text:style-name="P2880"><text:s text:c="2"/>margin: 0 auto;</text:p>
            <text:p text:style-name="P2881">}</text:p>
            <text:p text:style-name="P2882"/>
            <text:p text:style-name="P2883">@media (max-width: 900px) {</text:p>
            <text:p text:style-name="P2884"><text:s text:c="2"/>.gallery-masonry {</text:p>
            <text:p text:style-name="P2885"><text:s text:c="4"/>column-count: 2;</text:p>
            <text:p text:style-name="P2886"><text:s text:c="2"/>}</text:p>
            <text:p text:style-name="P2887">}</text:p>
            <text:p text:style-name="P2888"/>
            <text:p text:style-name="P2889">@media (max-width: 560px) {</text:p>
            <text:p text:style-name="P2890"><text:s text:c="2"/>.gallery-masonry {</text:p>
            <text:p text:style-name="P2891"><text:s text:c="4"/>column-count: 1;</text:p>
            <text:p text:style-name="P2892"><text:s text:c="2"/>}</text:p>
            <text:p text:style-name="P2893">}</text:p>
            <text:p text:style-name="P2894"/>
            <text:p text:style-name="P2895">.gallery-masonry__item {</text:p>
            <text:p text:style-name="P2896"><text:s text:c="2"/>break-inside: avoid;</text:p>
            <text:p text:style-name="P2897"><text:s text:c="2"/>margin: 0 0 0.5rem;</text:p>
            <text:p text:style-name="P2898">}</text:p>
            <text:p text:style-name="P2899"/>
            <text:p text:style-name="P2900">.gallery-masonry__btn {</text:p>
            <text:p text:style-name="P2901"><text:s text:c="2"/>display: block;</text:p>
            <text:p text:style-name="P2902"><text:s text:c="2"/>width: 100%;</text:p>
            <text:p text:style-name="P2903"><text:s text:c="2"/>padding: 0;</text:p>
            <text:p text:style-name="P2904"><text:s text:c="2"/>margin: 0;</text:p>
            <text:p text:style-name="P2905"><text:s text:c="2"/>border: none;</text:p>
            <text:p text:style-name="P2906"><text:s text:c="2"/>background: none;</text:p>
            <text:p text:style-name="P2907"><text:s text:c="2"/>cursor: pointer;</text:p>
            <text:p text:style-name="P2908"><text:s text:c="2"/>line-height: 0;</text:p>
            <text:p text:style-name="P2909">}</text:p>
            <text:p text:style-name="P2910"/>
            <text:p text:style-name="P2911">.gallery-masonry__btn:focus-visible {</text:p>
            <text:p text:style-name="P2912"><text:s text:c="2"/>outline: 2px solid #111;</text:p>
            <text:p text:style-name="P2913"><text:s text:c="2"/>outline-offset: 2px;</text:p>
            <text:p text:style-name="P2914">}</text:p>
            <text:p text:style-name="P2915"/>
            <text:p text:style-name="P2916">.gallery-masonry__btn img {</text:p>
            <text:p text:style-name="P2917"><text:s text:c="2"/>width: 100%;</text:p>
            <text:p text:style-name="P2918"><text:s text:c="2"/>height: auto;</text:p>
            <text:p text:style-name="P2919"><text:s text:c="2"/>vertical-align: middle;</text:p>
            <text:p text:style-name="P2920">}</text:p>
          </table:table-cell>
        </table:table-row>
      </table:table>
      <text:p text:style-name="P2921"/>
      <text:p text:style-name="P2922">Листинг Г.1 - Листинг SCSS-файла (main.scss)</text:p>
      <text:p text:style-name="P2923"/>
      <text:p text:style-name="P2924">Приложение Д</text:p>
      <text:p text:style-name="P2925">Листинг<text:s/>XML-файла для хранения данных</text:p>
      <table:table table:style-name="Table2926">
        <table:table-columns>
          <table:table-column table:style-name="TableColumn2927"/>
        </table:table-columns>
        <table:table-row table:style-name="TableRow2928">
          <table:table-cell table:style-name="TableCell2929">
            <text:p text:style-name="P2930">&lt;?xml version="1.0" encoding="UTF-8"?&gt;</text:p>
            <text:p text:style-name="P2931">&lt;pages&gt;</text:p>
            <text:p text:style-name="P2932"><text:s text:c="2"/>&lt;page id="home" file="index.html" title="Главная"/&gt;</text:p>
            <text:p text:style-name="P2933"><text:s text:c="2"/>&lt;page id="portfolio" file="portfolio.html" title="Портфолио"/&gt;</text:p>
            <text:p text:style-name="P2934"><text:s text:c="2"/>&lt;page id="contacts" file="contacts.html" title="Контакты"/&gt;</text:p>
            <text:p text:style-name="P2935"><text:s text:c="2"/>&lt;page id="questions" file="questions.html" title="Вопросы"/&gt;</text:p>
            <text:p text:style-name="P2936"><text:s text:c="2"/>&lt;page id="gallery" file="gallery.html" title="Галерея"/&gt;</text:p>
            <text:p text:style-name="P2937">&lt;/pages&gt;</text:p>
          </table:table-cell>
        </table:table-row>
      </table:table>
      <text:p text:style-name="P2938"><text:span text:style-name="T2939">Листинг Д.1 - XML-файла для хранения данных( p</text:span><text:span text:style-name="T2940">ages</text:span><text:span text:style-name="T2941">.xml)</text:span></text:p>
      <text:p text:style-name="P2942"/>
      <text:p text:style-name="P2943"/>
      <text:p text:style-name="P2944"/>
      <text:p text:style-name="P2945">ПРИЛОЖЕНИЕ Е</text:p>
      <text:p text:style-name="P2946"><text:span text:style-name="T2947">Листинг SVG-изображений</text:span></text:p>
      <table:table table:style-name="Table2948">
        <table:table-columns>
          <table:table-column table:style-name="TableColumn2949"/>
        </table:table-columns>
        <table:table-row table:style-name="TableRow2950">
          <table:table-cell table:style-name="TableCell2951">
            <text:p text:style-name="P2952">&lt;svg xmlns="http://www.w3.org/2000/svg" width="24" height="24" viewBox="0 0 24 24" fill="none" stroke="currentColor" stroke-width="2" stroke-linecap="round" stroke-linejoin="round"&gt;</text:p>
            <text:p text:style-name="P2953"><text:s text:c="2"/>&lt;!-- Основной корпус камеры --&gt;</text:p>
            <text:p text:style-name="P2954"><text:s text:c="2"/>&lt;path d="M23 19a2 2 0 0 1-2 2H3a2 2 0 0 1-2-2V8a2 2 0 0 1<text:s/>2-2h4l2-3h6l2 3h4a2 2 0 0 1 2 2z"&gt;&lt;/path&gt;</text:p>
            <text:p text:style-name="P2955"><text:s text:c="2"/>&lt;!-- Объектив --&gt;</text:p>
            <text:p text:style-name="P2956"><text:s text:c="2"/>&lt;circle cx="12" cy="13" r="4"&gt;&lt;/circle&gt;</text:p>
            <text:p text:style-name="P2957">&lt;/svg&gt;</text:p>
          </table:table-cell>
        </table:table-row>
      </table:table>
      <text:p text:style-name="P2958"><text:span text:style-name="T2959">Листинг Е.1 - Пример<text:s/></text:span><text:span text:style-name="T2960">SVG</text:span><text:span text:style-name="T2961">-символ</text:span><text:span text:style-name="T2962">а (</text:span><text:span text:style-name="T2963">camera</text:span><text:span text:style-name="T2964">.</text:span><text:span text:style-name="T2965">svg</text:span><text:span text:style-name="T2966">)</text:span></text:p>
      <text:p text:style-name="P2967"/>
      <text:p text:style-name="P2968">ПРИЛОЖЕНИЕ Ж</text:p>
      <text:p text:style-name="P2969">Листинг JavaScript</text:p>
      <table:table table:style-name="Table2970">
        <table:table-columns>
          <table:table-column table:style-name="TableColumn2971"/>
        </table:table-columns>
        <table:table-row table:style-name="TableRow2972">
          <table:table-cell table:style-name="TableCell2973">
            <text:p text:style-name="P2974">(function () {</text:p>
            <text:p text:style-name="P2975"><text:s text:c="2"/>"use strict";</text:p>
            <text:p text:style-name="P2976"/>
            <text:p text:style-name="P2977"><text:s text:c="2"/>function<text:s/>showToast(message) {</text:p>
            <text:p text:style-name="P2978"><text:s text:c="4"/>var el = document.getElementById("toast");</text:p>
            <text:p text:style-name="P2979"><text:s text:c="4"/>if (!el) return;</text:p>
            <text:p text:style-name="P2980"><text:s text:c="4"/>el.textContent = message;</text:p>
            <text:p text:style-name="P2981"><text:s text:c="4"/>el.hidden = false;</text:p>
            <text:p text:style-name="P2982"><text:s text:c="4"/>clearTimeout(el._t);</text:p>
            <text:p text:style-name="P2983"><text:s text:c="4"/>el._t = setTimeout(function () {</text:p>
            <text:p text:style-name="P2984"><text:s text:c="6"/>el.hidden = true;</text:p>
            <text:p text:style-name="P2985"><text:s text:c="4"/>}, 2200);</text:p>
            <text:p text:style-name="P2986"><text:s text:c="2"/>}</text:p>
            <text:p text:style-name="P2987"/>
            <text:p text:style-name="P2988"><text:s text:c="2"/>function copyText(text) {</text:p>
            <text:p text:style-name="P2989"><text:s text:c="4"/>if (navigator.clipboard &amp;&amp; navigator.clipboard.writeText) {</text:p>
            <text:p text:style-name="P2990"><text:s text:c="6"/>return navigator.clipboard.writeText(text);</text:p>
            <text:p text:style-name="P2991"><text:s text:c="4"/>}</text:p>
            <text:p text:style-name="P2992"><text:s text:c="4"/>var ta = document.createElement("textarea");</text:p>
            <text:p text:style-name="P2993"><text:s text:c="4"/>ta.value = text;</text:p>
            <text:p text:style-name="P2994"><text:s text:c="4"/>ta.setAttribute("readonly", "");</text:p>
            <text:p text:style-name="P2995"><text:s text:c="3"/><text:s/>ta.style.position = "absolute";</text:p>
            <text:p text:style-name="P2996"><text:s text:c="4"/>ta.style.left = "-9999px";</text:p>
            <text:p text:style-name="P2997"><text:s text:c="4"/>document.body.appendChild(ta);</text:p>
            <text:p text:style-name="P2998"><text:s text:c="4"/>ta.select();</text:p>
            <text:p text:style-name="P2999"><text:s text:c="4"/>var ok = false;</text:p>
            <text:p text:style-name="P3000"><text:s text:c="4"/>try {</text:p>
            <text:p text:style-name="P3001"><text:s text:c="6"/>ok = document.execCommand("copy");</text:p>
            <text:p text:style-name="P3002"><text:s text:c="4"/>} catch (e) {</text:p>
            <text:p text:style-name="P3003"><text:s text:c="6"/>ok = false;</text:p>
            <text:p text:style-name="P3004"><text:s text:c="4"/>}</text:p>
            <text:p text:style-name="P3005"><text:s text:c="4"/>document.body.removeChild(ta);</text:p>
            <text:p text:style-name="P3006"><text:s text:c="4"/>return ok ? Promise.resolve() : Promise.reject();</text:p>
            <text:p text:style-name="P3007"><text:s text:c="2"/>}</text:p>
            <text:p text:style-name="P3008"/>
            <text:p text:style-name="P3009"><text:s text:c="2"/>function fetchXml(url) {</text:p>
            <text:p text:style-name="P3010"><text:s text:c="4"/>return fetch(url, { credentials: "same-origin" }).then(function (res) {</text:p>
            <text:p text:style-name="P3011"><text:s text:c="6"/>if (!res.ok) throw new Error("XML load failed: " + url);</text:p>
            <text:p text:style-name="P3012"><text:s text:c="6"/>return<text:s/>res.text();</text:p>
            <text:p text:style-name="P3013"><text:s text:c="4"/>}).then(function (txt) {</text:p>
            <text:p text:style-name="P3014"><text:s text:c="6"/>var p = new DOMParser();</text:p>
            <text:p text:style-name="P3015"><text:s text:c="6"/>return p.parseFromString(txt, "application/xml");</text:p>
            <text:p text:style-name="P3016"><text:s text:c="4"/>});</text:p>
            <text:p text:style-name="P3017"><text:s text:c="2"/>}</text:p>
            <text:p text:style-name="P3018"/>
            <text:p text:style-name="P3019"><text:s text:c="2"/>function initNavToggle() {</text:p>
            <text:p text:style-name="P3020"><text:s text:c="4"/>var btn = document.getElementById("nav-toggle");</text:p>
            <text:p text:style-name="P3021"><text:s text:c="4"/>var nav = document.getElementById("site-nav");</text:p>
            <text:p text:style-name="P3022"><text:s text:c="4"/>if (!btn || !nav) return;</text:p>
            <text:p text:style-name="P3023"><text:s text:c="4"/>btn.addEventListener("click", function () {</text:p>
            <text:p text:style-name="P3024"><text:s text:c="6"/>var open = !nav.classList.contains("is-open");</text:p>
            <text:p text:style-name="P3025"><text:s text:c="6"/>nav.classList.toggle("is-open", open);</text:p>
            <text:p text:style-name="P3026"><text:s text:c="6"/>btn.setAttribute("aria-expanded", open ? "true" : "false");</text:p>
            <text:p text:style-name="P3027"><text:s text:c="4"/>});</text:p>
            <text:p text:style-name="P3028"><text:s text:c="2"/>}</text:p>
            <text:p text:style-name="P3029"/>
            <text:p text:style-name="P3030"><text:s text:c="2"/>function initFabScroll() {</text:p>
            <text:p text:style-name="P3031"><text:s text:c="4"/>var b = document.getElementById("fab-scroll");</text:p>
            <text:p text:style-name="P3032"><text:s text:c="4"/>if (!b) return;</text:p>
            <text:p text:style-name="P3033"><text:s text:c="4"/>b.addEventListener("click", function () {</text:p>
            <text:p text:style-name="P3034"><text:s text:c="6"/>window.scrollTo({ top: 0, behavior: "smooth" });</text:p>
            <text:p text:style-name="P3035"><text:s text:c="4"/>});</text:p>
            <text:p text:style-name="P3036"><text:s text:c="2"/>}</text:p>
            <text:p text:style-name="P3037"/>
            <text:p text:style-name="P3038"><text:s text:c="2"/>function<text:s/>initMarqueeFromPortfolioXml() {</text:p>
            <text:p text:style-name="P3039"><text:s text:c="4"/>var track = document.getElementById("marquee-track");</text:p>
            <text:p text:style-name="P3040"><text:s text:c="4"/>if (!track) return;</text:p>
            <text:p text:style-name="P3041"><text:s text:c="4"/>fetchXml("data/portfolio.xml").then(function (doc) {</text:p>
            <text:p text:style-name="P3042"><text:s text:c="6"/>var imgs = Array.prototype.map.call(doc.getElementsByTagName("marqueeImage"), function (n) {</text:p>
            <text:p text:style-name="P3043"><text:s text:c="8"/>return n.textContent.trim();</text:p>
            <text:p text:style-name="P3044"><text:s text:c="6"/>}).filter(Boolean);</text:p>
            <text:p text:style-name="P3045"><text:s text:c="6"/>if (!imgs.length) return;</text:p>
            <text:p text:style-name="P3046"><text:s text:c="6"/>var frag = document.createDocumentFragment();</text:p>
            <text:p text:style-name="P3047"><text:s text:c="6"/>function appendRow() {</text:p>
            <text:p text:style-name="P3048"><text:s text:c="8"/>imgs.forEach(function (src) {</text:p>
            <text:p text:style-name="P3049"><text:s text:c="10"/>var im = document.createElement("img");</text:p>
            <text:p text:style-name="P3050"><text:s text:c="10"/>im.src = src;</text:p>
            <text:p text:style-name="P3051"><text:s text:c="10"/>im.alt = "";</text:p>
            <text:p text:style-name="P3052"><text:s text:c="10"/>im.loading = "lazy";</text:p>
            <text:p text:style-name="P3053"><text:s text:c="10"/>frag.appendChild(im);</text:p>
            <text:p text:style-name="P3054"><text:s text:c="8"/>});</text:p>
            <text:p text:style-name="P3055"><text:s text:c="6"/>}</text:p>
            <text:p text:style-name="P3056"><text:s text:c="6"/>appendRow();</text:p>
            <text:p text:style-name="P3057"><text:s text:c="6"/>appendRow();</text:p>
            <text:p text:style-name="P3058"><text:s text:c="6"/>track.appendChild(frag);</text:p>
            <text:p text:style-name="P3059"><text:s text:c="4"/>}).catch(function () {});</text:p>
            <text:p text:style-name="P3060"><text:s text:c="2"/>}</text:p>
            <text:p text:style-name="P3061"/>
            <text:p text:style-name="P3062"><text:s text:c="2"/>function initHomeFromSiteXml() {</text:p>
            <text:p text:style-name="P3063"><text:s text:c="4"/>var intro = document.getElementById("intro-text");</text:p>
            <text:p text:style-name="P3064"><text:s text:c="4"/>var cta = document.getElementById("cta-text");</text:p>
            <text:p text:style-name="P3065"><text:s text:c="4"/>var foot = document.getElementById("footer-copy");</text:p>
            <text:p text:style-name="P3066"><text:s text:c="4"/>if (!intro &amp;&amp; !cta &amp;&amp; !foot) return;</text:p>
            <text:p text:style-name="P3067"><text:s text:c="4"/>fetchXml("data/site.xml").then(function (doc) {</text:p>
            <text:p text:style-name="P3068"><text:s text:c="6"/>var introNode = doc.getElementsByTagName("intro")[0];</text:p>
            <text:p text:style-name="P3069"><text:s text:c="6"/>var ctaNode = doc.getElementsByTagName("cta")[0];</text:p>
            <text:p text:style-name="P3070"><text:s text:c="6"/>var copyNode = doc.getElementsByTagName("copyright")[0];</text:p>
            <text:p text:style-name="P3071"><text:s text:c="6"/>if (intro &amp;&amp; introNode)<text:s/>intro.textContent = introNode.textContent.trim();</text:p>
            <text:p text:style-name="P3072"><text:s text:c="6"/>if (cta &amp;&amp; ctaNode) cta.textContent = ctaNode.textContent.trim();</text:p>
            <text:p text:style-name="P3073"><text:s text:c="6"/>if (foot &amp;&amp; copyNode) foot.textContent = copyNode.textContent.trim();</text:p>
            <text:p text:style-name="P3074"><text:s text:c="4"/>}).catch(function () {</text:p>
            <text:p text:style-name="P3075"><text:s text:c="6"/>if (intro) {</text:p>
            <text:p text:style-name="P3076"><text:s text:c="8"/>intro.textContent =</text:p>
            <text:p text:style-name="P3077"><text:span text:style-name="T3078"><text:s text:c="10"/></text:span><text:span text:style-name="T3079">"Привет. Добро пожаловать на мой сайт!\n\nВот уже 2,5 года я влюблена в фотографию...";</text:span></text:p>
            <text:p text:style-name="P3080"><text:s text:c="6"/>}</text:p>
            <text:p text:style-name="P3081"><text:s text:c="6"/>if (cta) {</text:p>
            <text:p text:style-name="P3082"><text:s text:c="8"/>cta.textContent =</text:p>
            <text:p text:style-name="P3083"><text:s text:c="10"/>"Если вам близко мое виденье и вы хотели бы увидеть меня в качестве вашего<text:s/>фотографа, то свяжитесь со мной любым удобным для вас способом.";</text:p>
            <text:p text:style-name="P3084"><text:span text:style-name="T3085"><text:s text:c="6"/></text:span><text:span text:style-name="T3086">}</text:span></text:p>
            <text:p text:style-name="P3087"><text:span text:style-name="T3088"><text:s text:c="6"/>if (foot) foot.textContent = "© 2026 Angelina Telpuk.<text:s/></text:span><text:span text:style-name="T3089">Все фотографии защищены авторским правом";</text:span></text:p>
            <text:p text:style-name="P3090"><text:span text:style-name="T3091"><text:s text:c="4"/></text:span><text:span text:style-name="T3092">});</text:span></text:p>
            <text:p text:style-name="P3093"><text:s text:c="2"/>}</text:p>
            <text:p text:style-name="P3094"/>
            <text:p text:style-name="P3095"><text:s text:c="2"/>function initQuestionsAccordion() {</text:p>
            <text:p text:style-name="P3096"><text:s text:c="4"/>var root = document.getElementById("faq-accordion");</text:p>
            <text:p text:style-name="P3097"><text:s text:c="4"/>if (!root) return;</text:p>
            <text:p text:style-name="P3098"><text:s text:c="4"/>fetchXml("data/site.xml").then(function (doc) {</text:p>
            <text:p text:style-name="P3099"><text:s text:c="6"/>var items = doc.getElementsByTagName("item");</text:p>
            <text:p text:style-name="P3100"><text:s text:c="6"/>Array.prototype.forEach.call(items, function (item, idx) {</text:p>
            <text:p text:style-name="P3101"><text:s text:c="8"/>var q =<text:s/>item.getElementsByTagName("question")[0];</text:p>
            <text:p text:style-name="P3102"><text:s text:c="8"/>var a = item.getElementsByTagName("answer")[0];</text:p>
            <text:p text:style-name="P3103"><text:s text:c="8"/>if (!q || !a) return;</text:p>
            <text:p text:style-name="P3104"><text:s text:c="8"/>var wrap = document.createElement("div");</text:p>
            <text:p text:style-name="P3105"><text:s text:c="8"/>wrap.className = "accordion__item";</text:p>
            <text:p text:style-name="P3106"><text:s text:c="8"/>wrap.dataset.index = String(idx);</text:p>
            <text:p text:style-name="P3107"><text:s text:c="8"/>var btn = document.createElement("button");</text:p>
            <text:p text:style-name="P3108"><text:s text:c="8"/>btn.type = "button";</text:p>
            <text:p text:style-name="P3109"><text:s text:c="8"/>btn.className = "accordion__btn";</text:p>
            <text:p text:style-name="P3110"><text:s text:c="8"/>btn.setAttribute("aria-expanded", "false");</text:p>
            <text:p text:style-name="P3111"><text:s text:c="8"/>btn.textContent = q.textContent.trim();</text:p>
            <text:p text:style-name="P3112"><text:s text:c="8"/>var panel = document.createElement("div");</text:p>
            <text:p text:style-name="P3113"><text:s text:c="8"/>panel.className = "accordion__panel";</text:p>
            <text:p text:style-name="P3114"><text:s text:c="8"/>var inner = document.createElement("div");</text:p>
            <text:p text:style-name="P3115"><text:s text:c="8"/>inner.className = "accordion__panel-inner";</text:p>
            <text:p text:style-name="P3116"><text:s text:c="8"/>var body = document.createElement("div");</text:p>
            <text:p text:style-name="P3117"><text:s text:c="8"/>body.className = "accordion__body";</text:p>
            <text:p text:style-name="P3118"><text:s text:c="8"/>body.textContent = a.textContent.trim();</text:p>
            <text:p text:style-name="P3119"><text:s text:c="8"/>inner.appendChild(body);</text:p>
            <text:p text:style-name="P3120"><text:s text:c="8"/>panel.appendChild(inner);</text:p>
            <text:p text:style-name="P3121"><text:s text:c="8"/>btn.addEventListener("click", function () {</text:p>
            <text:p text:style-name="P3122"><text:s text:c="10"/>var wasOpen = wrap.classList.contains("is-open");</text:p>
            <text:p text:style-name="P3123"><text:s text:c="10"/>Array.prototype.forEach.call(root.querySelectorAll(".accordion__item"), function (el) {</text:p>
            <text:p text:style-name="P3124"><text:s text:c="12"/>el.classList.remove("is-open");</text:p>
            <text:p text:style-name="P3125"><text:s text:c="12"/>var b = el.querySelector(".accordion__btn");</text:p>
            <text:p text:style-name="P3126"><text:s text:c="12"/>if (b) b.setAttribute("aria-expanded", "false");</text:p>
            <text:p text:style-name="P3127"><text:s text:c="10"/>});</text:p>
            <text:p text:style-name="P3128"><text:s text:c="10"/>if (!wasOpen) {</text:p>
            <text:p text:style-name="P3129"><text:s text:c="12"/>wrap.classList.add("is-open");</text:p>
            <text:p text:style-name="P3130"><text:s text:c="12"/>btn.setAttribute("aria-expanded", "true");</text:p>
            <text:p text:style-name="P3131"><text:s text:c="10"/>}</text:p>
            <text:p text:style-name="P3132"><text:s text:c="8"/>});</text:p>
            <text:p text:style-name="P3133"><text:s text:c="8"/>wrap.appendChild(btn);</text:p>
            <text:p text:style-name="P3134"><text:s text:c="8"/>wrap.appendChild(panel);</text:p>
            <text:p text:style-name="P3135"><text:s text:c="8"/>root.appendChild(wrap);</text:p>
            <text:p text:style-name="P3136"><text:s text:c="6"/>});</text:p>
            <text:p text:style-name="P3137"><text:s text:c="4"/>}).catch(function () {});</text:p>
            <text:p text:style-name="P3138"><text:s text:c="2"/>}</text:p>
            <text:p text:style-name="P3139"/>
            <text:p text:style-name="P3140"><text:s text:c="2"/>function initPortfolioPage() {</text:p>
            <text:p text:style-name="P3141"><text:s text:c="4"/>var grid = document.getElementById("portfolio-grid");</text:p>
            <text:p text:style-name="P3142"><text:s text:c="4"/>if (!grid) return;</text:p>
            <text:p text:style-name="P3143"><text:s text:c="4"/>fetchXml("data/portfolio.xml").then(function (doc) {</text:p>
            <text:p text:style-name="P3144"><text:s text:c="6"/>var nodes<text:s/>= doc.getElementsByTagName("session");</text:p>
            <text:p text:style-name="P3145"><text:s text:c="6"/>Array.prototype.forEach.call(nodes, function (node) {</text:p>
            <text:p text:style-name="P3146"><text:span text:style-name="T3147"><text:s text:c="8"/>var title = node.getAttribute("title") || "</text:span><text:span text:style-name="T3148">Фотосессия</text:span><text:span text:style-name="T3149">";</text:span></text:p>
            <text:p text:style-name="P3150"><text:s text:c="8"/>var coverEl = node.getElementsByTagName("cover")[0];</text:p>
            <text:p text:style-name="P3151"><text:s text:c="8"/>var cover = coverEl ? coverEl.textContent.trim() : "";</text:p>
            <text:p text:style-name="P3152"><text:s text:c="8"/>var imgs = Array.prototype.map.call(node.getElementsByTagName("image"), function (n) {</text:p>
            <text:p text:style-name="P3153"><text:s text:c="10"/>return n.textContent.trim();</text:p>
            <text:p text:style-name="P3154"><text:s text:c="8"/>}).filter(Boolean);</text:p>
            <text:p text:style-name="P3155"><text:s text:c="8"/>if (!cover &amp;&amp; imgs.length) cover = imgs[0];</text:p>
            <text:p text:style-name="P3156"/>
            <text:p text:style-name="P3157"><text:s text:c="8"/>var a = document.createElement("a");</text:p>
            <text:p text:style-name="P3158"><text:s text:c="8"/>a.className = "portfolio-card";</text:p>
            <text:p text:style-name="P3159"><text:s text:c="8"/>a.href = "gallery.html#" + encodeURIComponent(title);</text:p>
            <text:p text:style-name="P3160"><text:span text:style-name="T3161"><text:s text:c="8"/>a.setAttribute("aria-label", "</text:span><text:span text:style-name="T3162">Открыть</text:span><text:span text:style-name="T3163"><text:s/></text:span><text:span text:style-name="T3164">галерею</text:span><text:span text:style-name="T3165">: " + title);</text:span></text:p>
            <text:p text:style-name="P3166"><text:s text:c="8"/>var im =<text:s/>document.createElement("img");</text:p>
            <text:p text:style-name="P3167"><text:s text:c="8"/>im.className = "portfolio-card__img";</text:p>
            <text:p text:style-name="P3168"><text:s text:c="8"/>im.src = cover;</text:p>
            <text:p text:style-name="P3169"><text:s text:c="8"/>im.alt = title;</text:p>
            <text:p text:style-name="P3170"><text:s text:c="8"/>im.loading = "lazy";</text:p>
            <text:p text:style-name="P3171"><text:s text:c="8"/>var ov = document.createElement("div");</text:p>
            <text:p text:style-name="P3172"><text:s text:c="8"/>ov.className =<text:s/>"portfolio-card__overlay";</text:p>
            <text:p text:style-name="P3173"><text:s text:c="8"/>ov.textContent = title;</text:p>
            <text:p text:style-name="P3174"><text:s text:c="8"/>a.appendChild(im);</text:p>
            <text:p text:style-name="P3175"><text:s text:c="8"/>a.appendChild(ov);</text:p>
            <text:p text:style-name="P3176"><text:s text:c="8"/>grid.appendChild(a);</text:p>
            <text:p text:style-name="P3177"><text:s text:c="6"/>});</text:p>
            <text:p text:style-name="P3178"><text:s text:c="4"/>}).catch(function () {});</text:p>
            <text:p text:style-name="P3179"><text:s text:c="2"/>}</text:p>
            <text:p text:style-name="P3180"/>
            <text:p text:style-name="P3181"><text:s text:c="2"/>function initGalleryPage() {</text:p>
            <text:p text:style-name="P3182"><text:s text:c="4"/>var lightbox = document.getElementById("lightbox");</text:p>
            <text:p text:style-name="P3183"><text:s text:c="4"/>var lbImg = document.getElementById("lightbox-img");</text:p>
            <text:p text:style-name="P3184"><text:s text:c="4"/>var lbCap = document.getElementById("lightbox-cap");</text:p>
            <text:p text:style-name="P3185"><text:s text:c="4"/>var lbClose = document.getElementById("lightbox-close");</text:p>
            <text:p text:style-name="P3186"><text:s text:c="4"/>var lbPrev = document.getElementById("lightbox-prev");</text:p>
            <text:p text:style-name="P3187"><text:s text:c="4"/>var lbNext = document.getElementById("lightbox-next");</text:p>
            <text:p text:style-name="P3188"><text:s text:c="4"/>var state = { images: [], title: "", ii: 0 };</text:p>
            <text:p text:style-name="P3189"/>
            <text:p text:style-name="P3190"><text:s text:c="4"/>function openAt(i) {</text:p>
            <text:p text:style-name="P3191"><text:s text:c="6"/>if (!state.images.length || !lbImg || !lbCap || !lightbox) return;</text:p>
            <text:p text:style-name="P3192"><text:s text:c="6"/>state.ii = ((i %<text:s/>state.images.length) + state.images.length) % state.images.length;</text:p>
            <text:p text:style-name="P3193"><text:s text:c="6"/>lbImg.src = state.images[state.ii];</text:p>
            <text:p text:style-name="P3194"><text:s text:c="6"/>lbImg.alt = state.title;</text:p>
            <text:p text:style-name="P3195"><text:s text:c="6"/>lbCap.textContent = state.title + " — " + (state.ii + 1) + " / " + state.images.length;</text:p>
            <text:p text:style-name="P3196"><text:s text:c="6"/>lightbox.hidden<text:s/>= false;</text:p>
            <text:p text:style-name="P3197"><text:s text:c="6"/>document.body.style.overflow = "hidden";</text:p>
            <text:p text:style-name="P3198"><text:s text:c="4"/>}</text:p>
            <text:p text:style-name="P3199"/>
            <text:p text:style-name="P3200"><text:s text:c="4"/>function closeLb() {</text:p>
            <text:p text:style-name="P3201"><text:s text:c="6"/>if (!lightbox || !lbImg) return;</text:p>
            <text:p text:style-name="P3202"><text:s text:c="6"/>lightbox.hidden = true;</text:p>
            <text:p text:style-name="P3203"><text:s text:c="6"/>document.body.style.overflow = "";</text:p>
            <text:p text:style-name="P3204"><text:s text:c="6"/>lbImg.removeAttribute("src");</text:p>
            <text:p text:style-name="P3205"><text:s text:c="4"/>}</text:p>
            <text:p text:style-name="P3206"/>
            <text:p text:style-name="P3207"><text:s text:c="4"/>if (lbClose) lbClose.addEventListener("click", closeLb);</text:p>
            <text:p text:style-name="P3208"><text:s text:c="4"/>if (lightbox) {</text:p>
            <text:p text:style-name="P3209"><text:s text:c="6"/>lightbox.addEventListener("click", function (e) {</text:p>
            <text:p text:style-name="P3210"><text:s text:c="8"/>if (e.target === lightbox) closeLb();</text:p>
            <text:p text:style-name="P3211"><text:s text:c="6"/>});</text:p>
            <text:p text:style-name="P3212"><text:s text:c="4"/>}</text:p>
            <text:p text:style-name="P3213"><text:s text:c="4"/>if (lbPrev) lbPrev.addEventListener("click", function () { openAt(state.ii - 1); });</text:p>
            <text:p text:style-name="P3214"><text:s text:c="4"/>if (lbNext) lbNext.addEventListener("click", function () { openAt(state.ii + 1); });</text:p>
            <text:p text:style-name="P3215"><text:s text:c="4"/>document.addEventListener("keydown", function (e) {</text:p>
            <text:p text:style-name="P3216"><text:s text:c="6"/>if (!lightbox || lightbox.hidden) return;</text:p>
            <text:p text:style-name="P3217"><text:s text:c="6"/>if (e.key === "Escape") closeLb();</text:p>
            <text:p text:style-name="P3218"><text:s text:c="5"/><text:s/>if (e.key === "ArrowLeft") openAt(state.ii - 1);</text:p>
            <text:p text:style-name="P3219"><text:s text:c="6"/>if (e.key === "ArrowRight") openAt(state.ii + 1);</text:p>
            <text:p text:style-name="P3220"><text:s text:c="4"/>});</text:p>
            <text:p text:style-name="P3221"/>
            <text:p text:style-name="P3222"><text:s text:c="4"/>function renderGallery(title, imagePaths) {</text:p>
            <text:p text:style-name="P3223"><text:s text:c="6"/>var titleEl =<text:s/>document.getElementById("gallery-title");</text:p>
            <text:p text:style-name="P3224"><text:s text:c="6"/>var subEl = document.getElementById("gallery-sub");</text:p>
            <text:p text:style-name="P3225"><text:s text:c="6"/>var emptyEl = document.getElementById("gallery-empty");</text:p>
            <text:p text:style-name="P3226"><text:s text:c="6"/>var masonry =<text:s/>document.getElementById("gallery-masonry");</text:p>
            <text:p text:style-name="P3227"><text:s text:c="6"/>if (!titleEl || !masonry) return;</text:p>
            <text:p text:style-name="P3228"/>
            <text:p text:style-name="P3229"><text:s text:c="6"/>state.images = imagePaths;</text:p>
            <text:p text:style-name="P3230"><text:s text:c="6"/>state.title = title;</text:p>
            <text:p text:style-name="P3231"><text:s text:c="6"/>state.ii = 0;</text:p>
            <text:p text:style-name="P3232"/>
            <text:p text:style-name="P3233"><text:s text:c="6"/>if (!title || !imagePaths.length) {</text:p>
            <text:p text:style-name="P3234"><text:span text:style-name="T3235"><text:s text:c="8"/>titleEl.textContent = "</text:span><text:span text:style-name="T3236">Галерея</text:span><text:span text:style-name="T3237">";</text:span></text:p>
            <text:p text:style-name="P3238"><text:s text:c="7"/><text:s/>if (subEl) {</text:p>
            <text:p text:style-name="P3239"><text:s text:c="10"/>subEl.hidden = false;</text:p>
            <text:p text:style-name="P3240"><text:span text:style-name="T3241"><text:s text:c="10"/>subEl.textContent = "</text:span><text:span text:style-name="T3242">Портфолио</text:span><text:span text:style-name="T3243">";</text:span></text:p>
            <text:p text:style-name="P3244"><text:s text:c="8"/>}</text:p>
            <text:p text:style-name="P3245"><text:s text:c="8"/>if (emptyEl) {</text:p>
            <text:p text:style-name="P3246"><text:s text:c="10"/>emptyEl.hidden = false;</text:p>
            <text:p text:style-name="P3247"><text:span text:style-name="T3248"><text:s text:c="10"/>emptyEl.innerHTML = '</text:span><text:span text:style-name="T3249">Выберите</text:span><text:span text:style-name="T3250"><text:s/></text:span><text:span text:style-name="T3251">фотосессию</text:span><text:span text:style-name="T3252"><text:s/></text:span><text:span text:style-name="T3253">в</text:span><text:span text:style-name="T3254"><text:s/></text:span><text:span text:style-name="T3255">разделе</text:span><text:span text:style-name="T3256"><text:s/>&lt;a href="portfolio.html"&gt;</text:span><text:span text:style-name="T3257">Портфолио</text:span><text:span text:style-name="T3258">&lt;/a&gt;.</text:span><text:span text:style-name="T3259">';</text:span></text:p>
            <text:p text:style-name="P3260"><text:s text:c="8"/>}</text:p>
            <text:p text:style-name="P3261"><text:s text:c="8"/>masonry.innerHTML = "";</text:p>
            <text:p text:style-name="P3262"><text:s text:c="8"/>return;</text:p>
            <text:p text:style-name="P3263"><text:s text:c="6"/>}</text:p>
            <text:p text:style-name="P3264"/>
            <text:p text:style-name="P3265"><text:s text:c="6"/>if (emptyEl) emptyEl.hidden = true;</text:p>
            <text:p text:style-name="P3266"><text:s text:c="6"/>if (subEl) subEl.hidden = true;</text:p>
            <text:p text:style-name="P3267"><text:s text:c="6"/>titleEl.textContent = title;</text:p>
            <text:p text:style-name="P3268"/>
            <text:p text:style-name="P3269"><text:s text:c="6"/>masonry.innerHTML = "";</text:p>
            <text:p text:style-name="P3270"><text:s text:c="6"/>var frag =<text:s/>document.createDocumentFragment();</text:p>
            <text:p text:style-name="P3271"><text:s text:c="6"/>imagePaths.forEach(function (src, idx) {</text:p>
            <text:p text:style-name="P3272"><text:s text:c="8"/>var fig = document.createElement("figure");</text:p>
            <text:p text:style-name="P3273"><text:s text:c="8"/>fig.className = "gallery-masonry__item";</text:p>
            <text:p text:style-name="P3274"><text:s text:c="8"/>var btn = document.createElement("button");</text:p>
            <text:p text:style-name="P3275"><text:s text:c="8"/>btn.type = "button";</text:p>
            <text:p text:style-name="P3276"><text:s text:c="8"/>btn.className = "gallery-masonry__btn";</text:p>
            <text:p text:style-name="P3277"><text:span text:style-name="T3278"><text:s text:c="8"/>btn.setAttribute("aria-label", "</text:span><text:span text:style-name="T3279">Увеличить</text:span><text:span text:style-name="T3280"><text:s/></text:span><text:span text:style-name="T3281">фото</text:span><text:span text:style-name="T3282"><text:s/>" + (idx + 1));</text:span></text:p>
            <text:p text:style-name="P3283"><text:s text:c="8"/>var im = document.createElement("img");</text:p>
            <text:p text:style-name="P3284"><text:s text:c="8"/>im.src = src;</text:p>
            <text:p text:style-name="P3285"><text:span text:style-name="T3286"><text:s text:c="8"/>im.alt = title + ",<text:s/></text:span><text:span text:style-name="T3287">фото</text:span><text:span text:style-name="T3288"><text:s/>" + (idx + 1);</text:span></text:p>
            <text:p text:style-name="P3289"><text:s text:c="8"/>im.loading = "lazy";</text:p>
            <text:p text:style-name="P3290"><text:s text:c="8"/>btn.appendChild(im);</text:p>
            <text:p text:style-name="P3291"><text:s text:c="8"/>btn.addEventListener("click", function () {</text:p>
            <text:p text:style-name="P3292"><text:s text:c="10"/>openAt(idx);</text:p>
            <text:p text:style-name="P3293"><text:s text:c="8"/>});</text:p>
            <text:p text:style-name="P3294"><text:s text:c="8"/>fig.appendChild(btn);</text:p>
            <text:p text:style-name="P3295"><text:s text:c="8"/>frag.appendChild(fig);</text:p>
            <text:p text:style-name="P3296"><text:s text:c="6"/>});</text:p>
            <text:p text:style-name="P3297"><text:s text:c="6"/>masonry.appendChild(frag);</text:p>
            <text:p text:style-name="P3298"><text:s text:c="4"/>}</text:p>
            <text:p text:style-name="P3299"/>
            <text:p text:style-name="P3300"><text:s text:c="4"/>function loadGalleryFromHash() {</text:p>
            <text:p text:style-name="P3301"><text:s text:c="6"/>var raw = window.location.hash.replace(/^#/, "");</text:p>
            <text:p text:style-name="P3302"><text:s text:c="6"/>if (!raw) {</text:p>
            <text:p text:style-name="P3303"><text:s text:c="8"/>renderGallery("", []);</text:p>
            <text:p text:style-name="P3304"><text:s text:c="8"/>return;</text:p>
            <text:p text:style-name="P3305"><text:s text:c="6"/>}</text:p>
            <text:p text:style-name="P3306"><text:s text:c="6"/>var titleKey =<text:s/>decodeURIComponent(raw.replace(/\+/g, " "));</text:p>
            <text:p text:style-name="P3307"><text:s text:c="6"/>fetchXml("data/portfolio.xml").then(function (doc) {</text:p>
            <text:p text:style-name="P3308"><text:s text:c="8"/>var nodes = doc.getElementsByTagName("session");</text:p>
            <text:p text:style-name="P3309"><text:s text:c="8"/>var found = null;</text:p>
            <text:p text:style-name="P3310"><text:s text:c="8"/>Array.prototype.forEach.call(nodes, function (node) {</text:p>
            <text:p text:style-name="P3311"><text:s text:c="7"/><text:s text:c="3"/>var t = node.getAttribute("title") || "";</text:p>
            <text:p text:style-name="P3312"><text:s text:c="10"/>if (t === titleKey) found = node;</text:p>
            <text:p text:style-name="P3313"><text:s text:c="8"/>});</text:p>
            <text:p text:style-name="P3314"><text:s text:c="8"/>if (!found) {</text:p>
            <text:p text:style-name="P3315"><text:s text:c="10"/>renderGallery("", []);</text:p>
            <text:p text:style-name="P3316"><text:s text:c="10"/>var titleEl = document.getElementById("gallery-title");</text:p>
            <text:p text:style-name="P3317"><text:s text:c="10"/>var emptyEl = document.getElementById("gallery-empty");</text:p>
            <text:p text:style-name="P3318"><text:span text:style-name="T3319"><text:s text:c="10"/>if (titleEl) titleEl.textContent = "</text:span><text:span text:style-name="T3320">Не</text:span><text:span text:style-name="T3321"><text:s/></text:span><text:span text:style-name="T3322">найдено</text:span><text:span text:style-name="T3323">";</text:span></text:p>
            <text:p text:style-name="P3324"><text:s text:c="10"/>if (emptyEl) {</text:p>
            <text:p text:style-name="P3325"><text:s text:c="12"/>emptyEl.hidden = false;</text:p>
            <text:p text:style-name="P3326"><text:span text:style-name="T3327"><text:s text:c="12"/></text:span><text:span text:style-name="T3328">emptyEl.innerHTML = 'Такой фотосессии нет. Вернитесь в &lt;a href="portfolio.html"&gt;Портфолио&lt;/a</text:span><text:span text:style-name="T3329">&gt;.';</text:span></text:p>
            <text:p text:style-name="P3330"><text:span text:style-name="T3331"><text:s text:c="10"/></text:span><text:span text:style-name="T3332">}</text:span></text:p>
            <text:p text:style-name="P3333"><text:s text:c="10"/>return;</text:p>
            <text:p text:style-name="P3334"><text:s text:c="8"/>}</text:p>
            <text:p text:style-name="P3335"><text:span text:style-name="T3336"><text:s text:c="8"/>var t = found.getAttribute("title") || "</text:span><text:span text:style-name="T3337">Фотосессия</text:span><text:span text:style-name="T3338">";</text:span></text:p>
            <text:p text:style-name="P3339"><text:s text:c="8"/>var imgs = Array.prototype.map.call(found.getElementsByTagName("image"), function (n) {</text:p>
            <text:p text:style-name="P3340"><text:s text:c="10"/>return<text:s/>n.textContent.trim();</text:p>
            <text:p text:style-name="P3341"><text:s text:c="8"/>}).filter(Boolean);</text:p>
            <text:p text:style-name="P3342"><text:s text:c="8"/>renderGallery(t, imgs);</text:p>
            <text:p text:style-name="P3343"><text:s text:c="6"/>}).catch(function () {</text:p>
            <text:p text:style-name="P3344"><text:s text:c="8"/>renderGallery("", []);</text:p>
            <text:p text:style-name="P3345"><text:s text:c="6"/>});</text:p>
            <text:p text:style-name="P3346"><text:s text:c="4"/>}</text:p>
            <text:p text:style-name="P3347"/>
            <text:p text:style-name="P3348"><text:s text:c="4"/>loadGalleryFromHash();</text:p>
            <text:p text:style-name="P3349"><text:s text:c="4"/>window.addEventListener("hashchange", loadGalleryFromHash);</text:p>
            <text:p text:style-name="P3350"><text:s text:c="2"/>}</text:p>
            <text:p text:style-name="P3351"/>
            <text:p text:style-name="P3352"><text:s text:c="2"/>function initPhoneCopy() {</text:p>
            <text:p text:style-name="P3353"><text:s text:c="4"/>var btn = document.getElementById("phone-copy");</text:p>
            <text:p text:style-name="P3354"><text:s text:c="4"/>var hint = document.getElementById("phone-hint");</text:p>
            <text:p text:style-name="P3355"><text:s text:c="4"/>if (!btn) return;</text:p>
            <text:p text:style-name="P3356"><text:s text:c="4"/>var num = btn.getAttribute("data-phone") || btn.textContent.trim();</text:p>
            <text:p text:style-name="P3357"><text:s text:c="4"/>btn.addEventListener("click", function () {</text:p>
            <text:p text:style-name="P3358"><text:s text:c="6"/>copyText(num).then(function () {</text:p>
            <text:p text:style-name="P3359"><text:span text:style-name="T3360"><text:s text:c="8"/>showToast("</text:span><text:span text:style-name="T3361">Номер</text:span><text:span text:style-name="T3362"><text:s/></text:span><text:span text:style-name="T3363">скопирован</text:span><text:span text:style-name="T3364">");</text:span></text:p>
            <text:p text:style-name="P3365"><text:span text:style-name="T3366"><text:s text:c="8"/>if (hint) hint.textContent = "</text:span><text:span text:style-name="T3367">Номер</text:span><text:span text:style-name="T3368"><text:s/></text:span><text:span text:style-name="T3369">скопирован</text:span><text:span text:style-name="T3370"><text:s/></text:span><text:span text:style-name="T3371">в</text:span><text:span text:style-name="T3372"><text:s/></text:span><text:span text:style-name="T3373">буфер</text:span><text:span text:style-name="T3374"><text:s/></text:span><text:span text:style-name="T3375">обмена</text:span><text:span text:style-name="T3376">";</text:span></text:p>
            <text:p text:style-name="P3377"><text:span text:style-name="T3378"><text:s text:c="6"/></text:span><text:span text:style-name="T3379">}).catch(func</text:span><text:span text:style-name="T3380">tion () {</text:span></text:p>
            <text:p text:style-name="P3381"><text:s text:c="8"/>showToast("Не удалось скопировать");</text:p>
            <text:p text:style-name="P3382"><text:span text:style-name="T3383"><text:s text:c="6"/></text:span><text:span text:style-name="T3384">});</text:span></text:p>
            <text:p text:style-name="P3385"><text:s text:c="4"/>});</text:p>
            <text:p text:style-name="P3386"><text:s text:c="2"/>}</text:p>
            <text:p text:style-name="P3387"/>
            <text:p text:style-name="P3388"><text:s text:c="2"/>function initNavActive() {</text:p>
            <text:p text:style-name="P3389"><text:s text:c="4"/>var page = document.body.getAttribute("data-page");</text:p>
            <text:p text:style-name="P3390"><text:s text:c="4"/>if (!page) return;</text:p>
            <text:p text:style-name="P3391"><text:s text:c="4"/>var href =</text:p>
            <text:p text:style-name="P3392"><text:s text:c="6"/>page === "home"</text:p>
            <text:p text:style-name="P3393"><text:s text:c="8"/>?<text:s/>"index.html"</text:p>
            <text:p text:style-name="P3394"><text:s text:c="8"/>: page === "portfolio"</text:p>
            <text:p text:style-name="P3395"><text:s text:c="10"/>? "portfolio.html"</text:p>
            <text:p text:style-name="P3396"><text:s text:c="10"/>: page === "contacts"</text:p>
            <text:p text:style-name="P3397"><text:s text:c="12"/>? "contacts.html"</text:p>
            <text:p text:style-name="P3398"><text:s text:c="12"/>: page === "questions"</text:p>
            <text:p text:style-name="P3399"><text:s text:c="14"/>? "questions.html"</text:p>
            <text:p text:style-name="P3400"><text:s text:c="14"/>: page === "gallery"</text:p>
            <text:p text:style-name="P3401"><text:s text:c="16"/>? "portfolio.html"</text:p>
            <text:p text:style-name="P3402"><text:s text:c="16"/>: null;</text:p>
            <text:p text:style-name="P3403"><text:s text:c="4"/>if (!href) return;</text:p>
            <text:p text:style-name="P3404"><text:s text:c="4"/>document.querySelectorAll('.site-nav a[href="' + href + '"]').forEach(function (a) {</text:p>
            <text:p text:style-name="P3405"><text:s text:c="6"/>a.classList.add("is-active");</text:p>
            <text:p text:style-name="P3406"><text:s text:c="4"/>});</text:p>
            <text:p text:style-name="P3407"><text:s text:c="2"/>}</text:p>
            <text:p text:style-name="P3408"/>
            <text:p text:style-name="P3409"><text:s text:c="2"/>document.addEventListener("DOMContentLoaded", function () {</text:p>
            <text:p text:style-name="P3410"><text:s text:c="4"/>initNavToggle();</text:p>
            <text:p text:style-name="P3411"><text:s text:c="4"/>initFabScroll();</text:p>
            <text:p text:style-name="P3412"><text:s text:c="4"/>initNavActive();</text:p>
            <text:p text:style-name="P3413"><text:s text:c="4"/>var page = document.body.getAttribute("data-page");</text:p>
            <text:p text:style-name="P3414"><text:s text:c="4"/>if (page === "home") {</text:p>
            <text:p text:style-name="P3415"><text:s text:c="6"/>initMarqueeFromPortfolioXml();</text:p>
            <text:p text:style-name="P3416"><text:s text:c="6"/>initHomeFromSiteXml();</text:p>
            <text:p text:style-name="P3417"><text:s text:c="4"/>}</text:p>
            <text:p text:style-name="P3418"><text:s text:c="4"/>if (page<text:s/>=== "questions") {</text:p>
            <text:p text:style-name="P3419"><text:s text:c="6"/>initQuestionsAccordion();</text:p>
            <text:p text:style-name="P3420"><text:s text:c="4"/>}</text:p>
            <text:p text:style-name="P3421"><text:s text:c="4"/>if (page === "portfolio") {</text:p>
            <text:p text:style-name="P3422"><text:s text:c="6"/>initPortfolioPage();</text:p>
            <text:p text:style-name="P3423"><text:s text:c="4"/>}</text:p>
            <text:p text:style-name="P3424"><text:s text:c="4"/>if (page === "gallery") {</text:p>
            <text:p text:style-name="P3425"><text:s text:c="6"/>initGalleryPage();</text:p>
            <text:p text:style-name="P3426"><text:span text:style-name="T3427"><text:s text:c="4"/></text:span><text:span text:style-name="T3428">}</text:span></text:p>
            <text:p text:style-name="P3429"><text:s text:c="4"/>if (page === "contacts") {</text:p>
            <text:p text:style-name="P3430"><text:s text:c="6"/>initPhoneCopy();</text:p>
            <text:p text:style-name="P3431"><text:s text:c="4"/>}</text:p>
            <text:p text:style-name="P3432"><text:s text:c="2"/>});</text:p>
            <text:p text:style-name="P3433">})();</text:p>
          </table:table-cell>
        </table:table-row>
      </table:table>
      <text:p text:style-name="P3434"/>
      <text:p text:style-name="P3435"><text:span text:style-name="T3436">Листинг Ж.1 - Листинг<text:s/></text:span><text:span text:style-name="T3437">JS</text:span><text:span text:style-name="T3438">(</text:span><text:span text:style-name="T3439"><text:s/></text:span><text:span text:style-name="T3440">main</text:span><text:span text:style-name="T3441">.</text:span><text:span text:style-name="T3442">js</text:span><text:span text:style-name="T3443">)</text:span></text:p>
      <text:p text:style-name="P3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widows="2" fo:orphans="2" fo:text-align="justify" style:vertical-align="auto" fo:margin-top="0.1388in" fo:text-indent="0.5909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style:letter-kerning="false" fo:font-size="14pt" style:font-size-asian="14pt" style:font-size-complex="10pt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сновнойтекст" style:display-name="Основной текст" style:family="paragraph" style:parent-style-name="Обычный">
      <style:paragraph-properties style:snap-to-layout-grid="false" fo:text-align="justify" style:vertical-align="auto" fo:margin-bottom="0.0833in" fo:text-indent="0.2951in"/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style:letter-kerning="false" fo:font-size="14pt" style:font-size-asian="14pt" style:font-size-complex="10pt" style:language-complex="ar" style:country-complex="SA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-asian="Times New Roman" style:font-name-complex="Times New Roman" fo:color="#000000" style:letter-kerning="false" fo:language="ru" fo:country="RU" style:language-asian="ru" style:country-asian="RU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ds-markdown-paragraph" style:display-name="ds-markdown-paragraph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d813de27" style:display-name="d813de27" style:family="text" style:parent-style-name="Основнойшрифтабзаца"/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oken" style:display-name="token" style:family="text" style:parent-style-name="Основнойшрифтабзаца"/>
    <style:style style:name="Безинтервала" style:display-name="Без интервала" style:family="paragraph">
      <style:paragraph-properties fo:widows="2" fo:orphans="2" style:vertical-align="auto"/>
      <style:text-properties style:font-name="Calibri" style:font-name-asian="Calibri" style:font-name-complex="Times New Roman" fo:language="ru" fo:country="RU" style:language-asian="en" style:country-asian="US" style:language-complex="ar" style:country-complex="SA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2Знак" style:display-name="Заголовок 2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055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9055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9055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25" style:parent-style-name="Верхнийколонтитул" style:family="paragraph">
      <style:paragraph-properties fo:text-align="end"/>
    </style:style>
    <style:style style:name="T426" style:parent-style-name="Основнойшрифтабзаца" style:family="text">
      <style:text-properties fo:language="ru" fo:country="RU"/>
    </style:style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4" style:page-layout-name="PL4">
      <style:header>
        <text:p text:style-name="P425"><text:span text:style-name="T426"><text:page-number text:fixed="false">2</text:page-number></text:span></text:p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rugovets1973@gmail.com</dc:creator>
    <meta:creation-date>2009-04-16T11:32:00Z</meta:creation-date>
    <dc:date>2026-05-20T21:20:00Z</dc:date>
    <meta:template xlink:href="Normal.dotm" xlink:type="simple"/>
    <meta:editing-cycles>28</meta:editing-cycles>
    <meta:editing-duration>PT47700S</meta:editing-duration>
    <meta:user-defined meta:name="Info 1"/>
    <meta:user-defined meta:name="Info 2"/>
    <meta:user-defined meta:name="Info 3"/>
    <meta:user-defined meta:name="Info 4"/>
    <meta:document-statistic meta:page-count="1" meta:paragraph-count="241" meta:word-count="18031" meta:character-count="120571" meta:row-count="856" meta:non-whitespace-character-count="102781"/>
  </office:meta>
</office:document-meta>
</file>